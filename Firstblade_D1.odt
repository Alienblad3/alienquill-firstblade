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justify" fo:margin-top="0.1666in" fo:line-height="150%"/>
      <style:text-properties style:font-name="Times New Roman" style:font-name-complex="Times New Roman"/>
    </style:style>
    <style:style style:name="P2" style:parent-style-name="Normal" style:family="paragraph">
      <style:paragraph-properties fo:text-align="justify" fo:margin-top="0.1666in" fo:line-height="150%"/>
      <style:text-properties style:font-name="Times New Roman" style:font-name-complex="Times New Roman"/>
    </style:style>
    <style:style style:name="P3" style:parent-style-name="Normal" style:family="paragraph">
      <style:paragraph-properties fo:text-align="justify" fo:margin-top="0.1666in" fo:line-height="150%"/>
      <style:text-properties style:font-name="Times New Roman" style:font-name-complex="Times New Roman"/>
    </style:style>
    <style:style style:name="P4"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5" style:parent-style-name="Normal" style:family="paragraph">
      <style:paragraph-properties fo:text-align="justify" fo:margin-top="0.1666in" fo:line-height="150%"/>
      <style:text-properties style:font-name="Times New Roman" style:font-name-complex="Times New Roman"/>
    </style:style>
    <style:style style:name="P6" style:parent-style-name="Normal" style:family="paragraph">
      <style:paragraph-properties fo:text-align="justify" fo:margin-top="0.1666in" fo:line-height="150%"/>
      <style:text-properties style:font-name="Times New Roman" style:font-name-complex="Times New Roman"/>
    </style:style>
    <style:style style:name="P7" style:parent-style-name="Normal" style:family="paragraph">
      <style:paragraph-properties fo:text-align="justify" fo:margin-top="0.1666in" fo:line-height="150%"/>
      <style:text-properties style:font-name="Times New Roman" style:font-name-complex="Times New Roman"/>
    </style:style>
    <style:style style:name="P8" style:parent-style-name="Normal" style:family="paragraph">
      <style:paragraph-properties fo:text-align="justify" fo:margin-top="0.1666in" fo:line-height="150%"/>
      <style:text-properties style:font-name="Times New Roman" style:font-name-complex="Times New Roman"/>
    </style:style>
    <style:style style:name="P9" style:parent-style-name="Normal" style:family="paragraph">
      <style:paragraph-properties fo:text-align="justify" fo:margin-top="0.1666in" fo:line-height="150%"/>
      <style:text-properties style:font-name="Times New Roman" style:font-name-complex="Times New Roman"/>
    </style:style>
    <style:style style:name="P10" style:parent-style-name="Normal" style:family="paragraph">
      <style:paragraph-properties fo:text-align="justify" fo:margin-top="0.1666in" fo:line-height="150%"/>
      <style:text-properties style:font-name="Times New Roman" style:font-name-complex="Times New Roman"/>
    </style:style>
    <style:style style:name="P11" style:parent-style-name="Normal" style:family="paragraph">
      <style:paragraph-properties fo:text-align="justify" fo:margin-top="0.1666in" fo:line-height="150%"/>
      <style:text-properties style:font-name="Times New Roman" style:font-name-complex="Times New Roman"/>
    </style:style>
    <style:style style:name="P12" style:parent-style-name="Normal" style:family="paragraph">
      <style:paragraph-properties fo:text-align="justify" fo:margin-top="0.1666in" fo:line-height="150%"/>
      <style:text-properties style:font-name="Times New Roman" style:font-name-complex="Times New Roman"/>
    </style:style>
    <style:style style:name="P13" style:parent-style-name="Normal" style:family="paragraph">
      <style:paragraph-properties fo:text-align="justify" fo:margin-top="0.1666in" fo:line-height="150%"/>
      <style:text-properties style:font-name="Times New Roman" style:font-name-complex="Times New Roman"/>
    </style:style>
    <style:style style:name="P14" style:parent-style-name="Normal" style:family="paragraph">
      <style:paragraph-properties fo:text-align="justify" fo:margin-top="0.1666in" fo:line-height="150%"/>
      <style:text-properties style:font-name="Times New Roman" style:font-name-complex="Times New Roman"/>
    </style:style>
    <style:style style:name="P15" style:parent-style-name="Normal" style:family="paragraph">
      <style:paragraph-properties fo:text-align="justify" fo:margin-top="0.1666in" fo:line-height="150%"/>
      <style:text-properties style:font-name="Times New Roman" style:font-name-complex="Times New Roman"/>
    </style:style>
    <style:style style:name="P16" style:parent-style-name="Normal" style:family="paragraph">
      <style:paragraph-properties fo:text-align="justify" fo:margin-top="0.1666in" fo:line-height="150%"/>
      <style:text-properties style:font-name="Times New Roman" style:font-name-complex="Times New Roman"/>
    </style:style>
    <style:style style:name="P17" style:parent-style-name="Normal" style:family="paragraph">
      <style:paragraph-properties fo:text-align="justify" fo:margin-top="0.1666in" fo:line-height="150%"/>
      <style:text-properties style:font-name="Times New Roman" style:font-name-complex="Times New Roman"/>
    </style:style>
    <style:style style:name="P18"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19" style:parent-style-name="Normal" style:family="paragraph">
      <style:paragraph-properties fo:text-align="justify" fo:margin-top="0.1666in" fo:line-height="150%"/>
      <style:text-properties style:font-name="Times New Roman" style:font-name-complex="Times New Roman"/>
    </style:style>
    <style:style style:name="P20" style:parent-style-name="Normal" style:family="paragraph">
      <style:paragraph-properties fo:text-align="justify" fo:margin-top="0.1666in" fo:line-height="150%"/>
      <style:text-properties style:font-name="Times New Roman" style:font-name-complex="Times New Roman"/>
    </style:style>
    <style:style style:name="P21" style:parent-style-name="Normal" style:family="paragraph">
      <style:paragraph-properties fo:text-align="justify" fo:margin-top="0.1666in" fo:line-height="150%"/>
      <style:text-properties style:font-name="Times New Roman" style:font-name-complex="Times New Roman"/>
    </style:style>
    <style:style style:name="P22" style:parent-style-name="Normal" style:family="paragraph">
      <style:paragraph-properties fo:text-align="justify" fo:margin-top="0.1666in" fo:line-height="150%"/>
      <style:text-properties style:font-name="Times New Roman" style:font-name-complex="Times New Roman"/>
    </style:style>
    <style:style style:name="P23" style:parent-style-name="Normal" style:family="paragraph">
      <style:paragraph-properties fo:text-align="justify" fo:margin-top="0.1666in" fo:line-height="150%"/>
      <style:text-properties style:font-name="Times New Roman" style:font-name-complex="Times New Roman"/>
    </style:style>
    <style:style style:name="P24" style:parent-style-name="Normal" style:family="paragraph">
      <style:paragraph-properties fo:text-align="justify" fo:margin-top="0.1666in" fo:line-height="150%"/>
      <style:text-properties style:font-name="Times New Roman" style:font-name-complex="Times New Roman"/>
    </style:style>
    <style:style style:name="P25" style:parent-style-name="Normal" style:family="paragraph">
      <style:paragraph-properties fo:text-align="justify" fo:margin-top="0.1666in" fo:line-height="150%"/>
      <style:text-properties style:font-name="Times New Roman" style:font-name-complex="Times New Roman"/>
    </style:style>
    <style:style style:name="P26" style:parent-style-name="Normal" style:family="paragraph">
      <style:paragraph-properties fo:text-align="justify" fo:margin-top="0.1666in" fo:line-height="150%"/>
      <style:text-properties style:font-name="Times New Roman" style:font-name-complex="Times New Roman"/>
    </style:style>
    <style:style style:name="P27" style:parent-style-name="Normal" style:family="paragraph">
      <style:paragraph-properties fo:text-align="justify" fo:margin-top="0.1666in" fo:line-height="150%"/>
      <style:text-properties style:font-name="Times New Roman" style:font-name-complex="Times New Roman"/>
    </style:style>
    <style:style style:name="P28" style:parent-style-name="Normal" style:family="paragraph">
      <style:paragraph-properties fo:text-align="justify" fo:margin-top="0.1666in" fo:line-height="150%"/>
      <style:text-properties style:font-name="Times New Roman" style:font-name-complex="Times New Roman"/>
    </style:style>
    <style:style style:name="P29" style:parent-style-name="Normal" style:family="paragraph">
      <style:paragraph-properties fo:text-align="justify" fo:margin-top="0.1666in" fo:line-height="150%"/>
      <style:text-properties style:font-name="Times New Roman" style:font-name-complex="Times New Roman"/>
    </style:style>
    <style:style style:name="P30" style:parent-style-name="Normal" style:family="paragraph">
      <style:paragraph-properties fo:text-align="justify" fo:margin-top="0.1666in" fo:line-height="150%"/>
      <style:text-properties style:font-name="Times New Roman" style:font-name-complex="Times New Roman"/>
    </style:style>
    <style:style style:name="P31" style:parent-style-name="Normal" style:family="paragraph">
      <style:paragraph-properties fo:text-align="justify" fo:margin-top="0.1666in" fo:line-height="150%"/>
      <style:text-properties style:font-name="Times New Roman" style:font-name-complex="Times New Roman"/>
    </style:style>
    <style:style style:name="P32"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33" style:parent-style-name="Normal" style:family="paragraph">
      <style:paragraph-properties fo:text-align="justify" fo:margin-top="0.1666in" fo:line-height="150%"/>
      <style:text-properties style:font-name="Times New Roman" style:font-name-complex="Times New Roman"/>
    </style:style>
    <style:style style:name="P34" style:parent-style-name="Normal" style:family="paragraph">
      <style:paragraph-properties fo:text-align="justify" fo:margin-top="0.1666in" fo:line-height="150%"/>
      <style:text-properties style:font-name="Times New Roman" style:font-name-complex="Times New Roman"/>
    </style:style>
    <style:style style:name="P35" style:parent-style-name="Normal" style:family="paragraph">
      <style:paragraph-properties fo:text-align="justify" fo:margin-top="0.1666in" fo:line-height="150%"/>
      <style:text-properties style:font-name="Times New Roman" style:font-name-complex="Times New Roman"/>
    </style:style>
    <style:style style:name="P36" style:parent-style-name="Normal" style:family="paragraph">
      <style:paragraph-properties fo:text-align="justify" fo:margin-top="0.1666in" fo:line-height="150%"/>
      <style:text-properties style:font-name="Times New Roman" style:font-name-complex="Times New Roman"/>
    </style:style>
    <style:style style:name="P37" style:parent-style-name="Normal" style:family="paragraph">
      <style:paragraph-properties fo:text-align="justify" fo:margin-top="0.1666in" fo:line-height="150%"/>
      <style:text-properties style:font-name="Times New Roman" style:font-name-complex="Times New Roman"/>
    </style:style>
    <style:style style:name="P38" style:parent-style-name="Normal" style:family="paragraph">
      <style:paragraph-properties fo:text-align="justify" fo:margin-top="0.1666in" fo:line-height="150%"/>
      <style:text-properties style:font-name="Times New Roman" style:font-name-complex="Times New Roman"/>
    </style:style>
    <style:style style:name="P39" style:parent-style-name="Normal" style:family="paragraph">
      <style:paragraph-properties fo:text-align="justify" fo:margin-top="0.1666in" fo:line-height="150%"/>
      <style:text-properties style:font-name="Times New Roman" style:font-name-complex="Times New Roman"/>
    </style:style>
    <style:style style:name="P40" style:parent-style-name="Normal" style:family="paragraph">
      <style:paragraph-properties fo:text-align="justify" fo:margin-top="0.1666in" fo:line-height="150%"/>
      <style:text-properties style:font-name="Times New Roman" style:font-name-complex="Times New Roman"/>
    </style:style>
    <style:style style:name="P41" style:parent-style-name="Normal" style:family="paragraph">
      <style:paragraph-properties fo:text-align="justify" fo:margin-top="0.1666in" fo:line-height="150%"/>
      <style:text-properties style:font-name="Times New Roman" style:font-name-complex="Times New Roman"/>
    </style:style>
    <style:style style:name="P42" style:parent-style-name="Normal" style:family="paragraph">
      <style:paragraph-properties fo:text-align="justify" fo:margin-top="0.1666in" fo:line-height="150%"/>
      <style:text-properties style:font-name="Times New Roman" style:font-name-complex="Times New Roman"/>
    </style:style>
    <style:style style:name="P43" style:parent-style-name="Normal" style:family="paragraph">
      <style:paragraph-properties fo:text-align="justify" fo:margin-top="0.1666in" fo:line-height="150%"/>
      <style:text-properties style:font-name="Times New Roman" style:font-name-complex="Times New Roman"/>
    </style:style>
    <style:style style:name="P44"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45" style:parent-style-name="Normal" style:family="paragraph">
      <style:paragraph-properties fo:text-align="justify" fo:margin-top="0.1666in" fo:line-height="150%"/>
      <style:text-properties style:font-name="Times New Roman" style:font-name-complex="Times New Roman"/>
    </style:style>
    <style:style style:name="P46" style:parent-style-name="Normal" style:family="paragraph">
      <style:paragraph-properties fo:text-align="justify" fo:margin-top="0.1666in" fo:line-height="150%"/>
      <style:text-properties style:font-name="Times New Roman" style:font-name-complex="Times New Roman"/>
    </style:style>
    <style:style style:name="P47" style:parent-style-name="Normal" style:family="paragraph">
      <style:paragraph-properties fo:text-align="justify" fo:margin-top="0.1666in" fo:line-height="150%"/>
      <style:text-properties style:font-name="Times New Roman" style:font-name-complex="Times New Roman"/>
    </style:style>
    <style:style style:name="P48" style:parent-style-name="Normal" style:family="paragraph">
      <style:paragraph-properties fo:text-align="justify" fo:margin-top="0.1666in" fo:line-height="150%"/>
      <style:text-properties style:font-name="Times New Roman" style:font-name-complex="Times New Roman"/>
    </style:style>
    <style:style style:name="P49" style:parent-style-name="Normal" style:family="paragraph">
      <style:paragraph-properties fo:text-align="justify" fo:margin-top="0.1666in" fo:line-height="150%"/>
      <style:text-properties style:font-name="Times New Roman" style:font-name-complex="Times New Roman"/>
    </style:style>
    <style:style style:name="P50" style:parent-style-name="Normal" style:family="paragraph">
      <style:paragraph-properties fo:text-align="justify" fo:margin-top="0.1666in" fo:line-height="150%"/>
    </style:style>
    <style:style style:name="T51" style:parent-style-name="DefaultParagraphFont" style:family="text">
      <style:text-properties style:font-name="Times New Roman" style:font-name-complex="Times New Roman" fo:font-style="italic" style:font-style-asian="italic" style:font-style-complex="italic"/>
    </style:style>
    <style:style style:name="T52" style:parent-style-name="DefaultParagraphFont" style:family="text">
      <style:text-properties style:font-name="Times New Roman" style:font-name-complex="Times New Roman"/>
    </style:style>
    <style:style style:name="P53" style:parent-style-name="Normal" style:family="paragraph">
      <style:paragraph-properties fo:text-align="justify" fo:margin-top="0.1666in" fo:line-height="150%"/>
      <style:text-properties style:font-name="Times New Roman" style:font-name-complex="Times New Roman"/>
    </style:style>
    <style:style style:name="P54"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55" style:parent-style-name="Normal" style:family="paragraph">
      <style:paragraph-properties fo:text-align="justify" fo:margin-top="0.1666in" fo:line-height="150%"/>
    </style:style>
    <style:style style:name="T56" style:parent-style-name="DefaultParagraphFont" style:family="text">
      <style:text-properties style:font-name="Times New Roman" style:font-name-complex="Times New Roman" fo:font-style="italic" style:font-style-asian="italic" style:font-style-complex="italic"/>
    </style:style>
    <style:style style:name="T57" style:parent-style-name="DefaultParagraphFont" style:family="text">
      <style:text-properties style:font-name="Times New Roman" style:font-name-complex="Times New Roman"/>
    </style:style>
    <style:style style:name="P58" style:parent-style-name="Normal" style:family="paragraph">
      <style:paragraph-properties fo:text-align="justify" fo:margin-top="0.1666in" fo:line-height="150%"/>
      <style:text-properties style:font-name="Times New Roman" style:font-name-complex="Times New Roman"/>
    </style:style>
    <style:style style:name="P59" style:parent-style-name="Normal" style:family="paragraph">
      <style:paragraph-properties fo:text-align="justify" fo:margin-top="0.1666in" fo:line-height="150%"/>
      <style:text-properties style:font-name="Times New Roman" style:font-name-complex="Times New Roman"/>
    </style:style>
    <style:style style:name="P60" style:parent-style-name="Normal" style:family="paragraph">
      <style:paragraph-properties fo:text-align="justify" fo:margin-top="0.1666in" fo:line-height="150%"/>
      <style:text-properties style:font-name="Times New Roman" style:font-name-complex="Times New Roman"/>
    </style:style>
    <style:style style:name="P61" style:parent-style-name="Normal" style:family="paragraph">
      <style:paragraph-properties fo:text-align="justify" fo:margin-top="0.1666in" fo:line-height="150%"/>
      <style:text-properties style:font-name="Times New Roman" style:font-name-complex="Times New Roman"/>
    </style:style>
    <style:style style:name="P62" style:parent-style-name="Normal" style:family="paragraph">
      <style:paragraph-properties fo:text-align="justify" fo:margin-top="0.1666in" fo:line-height="150%"/>
      <style:text-properties style:font-name="Times New Roman" style:font-name-complex="Times New Roman"/>
    </style:style>
    <style:style style:name="P63"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64" style:parent-style-name="Normal" style:family="paragraph">
      <style:paragraph-properties fo:text-align="justify" fo:margin-top="0.1666in" fo:line-height="150%"/>
      <style:text-properties style:font-name="Times New Roman" style:font-name-complex="Times New Roman"/>
    </style:style>
    <style:style style:name="P65" style:parent-style-name="Normal" style:family="paragraph">
      <style:paragraph-properties fo:text-align="justify" fo:margin-top="0.1666in" fo:line-height="150%"/>
      <style:text-properties style:font-name="Times New Roman" style:font-name-complex="Times New Roman"/>
    </style:style>
    <style:style style:name="P66" style:parent-style-name="Normal" style:family="paragraph">
      <style:paragraph-properties fo:text-align="justify" fo:margin-top="0.1666in" fo:line-height="150%"/>
      <style:text-properties style:font-name="Times New Roman" style:font-name-complex="Times New Roman"/>
    </style:style>
    <style:style style:name="P67" style:parent-style-name="Normal" style:family="paragraph">
      <style:paragraph-properties fo:text-align="justify" fo:margin-top="0.1666in" fo:line-height="150%"/>
      <style:text-properties style:font-name="Times New Roman" style:font-name-complex="Times New Roman"/>
    </style:style>
    <style:style style:name="P68" style:parent-style-name="Normal" style:family="paragraph">
      <style:paragraph-properties fo:text-align="justify" fo:margin-top="0.1666in" fo:line-height="150%"/>
      <style:text-properties style:font-name="Times New Roman" style:font-name-complex="Times New Roman"/>
    </style:style>
    <style:style style:name="P69" style:parent-style-name="Normal" style:family="paragraph">
      <style:paragraph-properties fo:text-align="justify" fo:margin-top="0.1666in" fo:line-height="150%"/>
      <style:text-properties style:font-name="Times New Roman" style:font-name-complex="Times New Roman"/>
    </style:style>
    <style:style style:name="P70" style:parent-style-name="Normal" style:family="paragraph">
      <style:paragraph-properties fo:text-align="justify" fo:margin-top="0.1666in" fo:line-height="150%"/>
      <style:text-properties style:font-name="Times New Roman" style:font-name-complex="Times New Roman"/>
    </style:style>
    <style:style style:name="P71" style:parent-style-name="Normal" style:family="paragraph">
      <style:paragraph-properties fo:text-align="justify" fo:margin-top="0.1666in" fo:line-height="150%"/>
      <style:text-properties style:font-name="Times New Roman" style:font-name-complex="Times New Roman"/>
    </style:style>
    <style:style style:name="P72" style:parent-style-name="Normal" style:family="paragraph">
      <style:paragraph-properties fo:text-align="justify" fo:margin-top="0.1666in" fo:line-height="150%"/>
      <style:text-properties style:font-name="Times New Roman" style:font-name-complex="Times New Roman"/>
    </style:style>
    <style:style style:name="P73" style:parent-style-name="Normal" style:family="paragraph">
      <style:paragraph-properties fo:text-align="justify" fo:margin-top="0.1666in" fo:line-height="150%"/>
      <style:text-properties style:font-name="Times New Roman" style:font-name-complex="Times New Roman"/>
    </style:style>
    <style:style style:name="P74" style:parent-style-name="Normal" style:family="paragraph">
      <style:paragraph-properties fo:text-align="justify" fo:margin-top="0.1666in" fo:line-height="150%"/>
      <style:text-properties style:font-name="Times New Roman" style:font-name-complex="Times New Roman"/>
    </style:style>
    <style:style style:name="P75" style:parent-style-name="Normal" style:family="paragraph">
      <style:paragraph-properties fo:text-align="justify" fo:margin-top="0.1666in" fo:line-height="150%"/>
      <style:text-properties style:font-name="Times New Roman" style:font-name-complex="Times New Roman"/>
    </style:style>
    <style:style style:name="P76" style:parent-style-name="Normal" style:family="paragraph">
      <style:paragraph-properties fo:text-align="justify" fo:margin-top="0.1666in" fo:line-height="150%"/>
      <style:text-properties style:font-name="Times New Roman" style:font-name-complex="Times New Roman"/>
    </style:style>
    <style:style style:name="P77" style:parent-style-name="Normal" style:family="paragraph">
      <style:paragraph-properties fo:text-align="justify" fo:margin-top="0.1666in" fo:line-height="150%"/>
      <style:text-properties style:font-name="Times New Roman" style:font-name-complex="Times New Roman"/>
    </style:style>
    <style:style style:name="P78" style:parent-style-name="Normal" style:family="paragraph">
      <style:paragraph-properties fo:text-align="justify" fo:margin-top="0.1666in" fo:line-height="150%"/>
      <style:text-properties style:font-name="Times New Roman" style:font-name-complex="Times New Roman"/>
    </style:style>
    <style:style style:name="P79" style:parent-style-name="Normal" style:family="paragraph">
      <style:paragraph-properties fo:text-align="justify" fo:margin-top="0.1666in" fo:line-height="150%"/>
      <style:text-properties style:font-name="Times New Roman" style:font-name-complex="Times New Roman"/>
    </style:style>
    <style:style style:name="P80" style:parent-style-name="Normal" style:family="paragraph">
      <style:paragraph-properties fo:text-align="justify" fo:margin-top="0.1666in" fo:line-height="150%"/>
      <style:text-properties style:font-name="Times New Roman" style:font-name-complex="Times New Roman"/>
    </style:style>
    <style:style style:name="P81" style:parent-style-name="Normal" style:family="paragraph">
      <style:paragraph-properties fo:text-align="justify" fo:margin-top="0.1666in" fo:line-height="150%"/>
      <style:text-properties style:font-name="Times New Roman" style:font-name-complex="Times New Roman"/>
    </style:style>
    <style:style style:name="P82" style:parent-style-name="Normal" style:family="paragraph">
      <style:paragraph-properties fo:text-align="justify" fo:margin-top="0.1666in" fo:line-height="150%"/>
      <style:text-properties style:font-name="Times New Roman" style:font-name-complex="Times New Roman"/>
    </style:style>
    <style:style style:name="P83" style:parent-style-name="Normal" style:family="paragraph">
      <style:paragraph-properties fo:text-align="justify" fo:margin-top="0.1666in" fo:line-height="150%"/>
      <style:text-properties style:font-name="Times New Roman" style:font-name-complex="Times New Roman"/>
    </style:style>
    <style:style style:name="P84" style:parent-style-name="Normal" style:family="paragraph">
      <style:paragraph-properties fo:text-align="justify" fo:margin-top="0.1666in" fo:line-height="150%"/>
      <style:text-properties style:font-name="Times New Roman" style:font-name-complex="Times New Roman"/>
    </style:style>
    <style:style style:name="P85" style:parent-style-name="Normal" style:family="paragraph">
      <style:paragraph-properties fo:text-align="justify" fo:margin-top="0.1666in" fo:line-height="150%"/>
      <style:text-properties style:font-name="Times New Roman" style:font-name-complex="Times New Roman"/>
    </style:style>
    <style:style style:name="P86" style:parent-style-name="Normal" style:family="paragraph">
      <style:paragraph-properties fo:text-align="justify" fo:margin-top="0.1666in" fo:line-height="150%"/>
      <style:text-properties style:font-name="Times New Roman" style:font-name-complex="Times New Roman"/>
    </style:style>
    <style:style style:name="P87" style:parent-style-name="Normal" style:family="paragraph">
      <style:paragraph-properties fo:text-align="justify" fo:margin-top="0.1666in" fo:line-height="150%"/>
      <style:text-properties style:font-name="Times New Roman" style:font-name-complex="Times New Roman"/>
    </style:style>
    <style:style style:name="P88" style:parent-style-name="Normal" style:family="paragraph">
      <style:paragraph-properties fo:text-align="justify" fo:margin-top="0.1666in" fo:line-height="150%"/>
      <style:text-properties style:font-name="Times New Roman" style:font-name-complex="Times New Roman"/>
    </style:style>
    <style:style style:name="P89" style:parent-style-name="Normal" style:family="paragraph">
      <style:paragraph-properties fo:text-align="justify" fo:margin-top="0.1666in" fo:line-height="150%"/>
      <style:text-properties style:font-name="Times New Roman" style:font-name-complex="Times New Roman"/>
    </style:style>
    <style:style style:name="P90" style:parent-style-name="Normal" style:family="paragraph">
      <style:paragraph-properties fo:text-align="justify" fo:margin-top="0.1666in" fo:line-height="150%"/>
      <style:text-properties style:font-name="Times New Roman" style:font-name-complex="Times New Roman"/>
    </style:style>
    <style:style style:name="P91" style:parent-style-name="Normal" style:family="paragraph">
      <style:paragraph-properties fo:text-align="justify" fo:margin-top="0.1666in" fo:line-height="150%"/>
      <style:text-properties style:font-name="Times New Roman" style:font-name-complex="Times New Roman"/>
    </style:style>
    <style:style style:name="P92" style:parent-style-name="Normal" style:family="paragraph">
      <style:paragraph-properties fo:text-align="justify" fo:margin-top="0.1666in" fo:line-height="150%"/>
      <style:text-properties style:font-name="Times New Roman" style:font-name-complex="Times New Roman"/>
    </style:style>
    <style:style style:name="P93" style:parent-style-name="Normal" style:family="paragraph">
      <style:paragraph-properties fo:text-align="justify" fo:margin-top="0.1666in" fo:line-height="150%"/>
      <style:text-properties style:font-name="Times New Roman" style:font-name-complex="Times New Roman"/>
    </style:style>
    <style:style style:name="P94" style:parent-style-name="Normal" style:family="paragraph">
      <style:paragraph-properties fo:text-align="justify" fo:margin-top="0.1666in" fo:line-height="150%"/>
      <style:text-properties style:font-name="Times New Roman" style:font-name-complex="Times New Roman"/>
    </style:style>
    <style:style style:name="P95"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96" style:parent-style-name="Normal" style:family="paragraph">
      <style:paragraph-properties fo:text-align="justify" fo:margin-top="0.1666in" fo:line-height="150%"/>
      <style:text-properties style:font-name="Times New Roman" style:font-name-complex="Times New Roman"/>
    </style:style>
    <style:style style:name="P97" style:parent-style-name="Normal" style:family="paragraph">
      <style:paragraph-properties fo:text-align="justify" fo:margin-top="0.1666in" fo:line-height="150%"/>
      <style:text-properties style:font-name="Times New Roman" style:font-name-complex="Times New Roman"/>
    </style:style>
    <style:style style:name="P98" style:parent-style-name="Normal" style:family="paragraph">
      <style:paragraph-properties fo:text-align="justify" fo:margin-top="0.1666in" fo:line-height="150%"/>
      <style:text-properties style:font-name="Times New Roman" style:font-name-complex="Times New Roman"/>
    </style:style>
    <style:style style:name="P99" style:parent-style-name="Normal" style:family="paragraph">
      <style:paragraph-properties fo:text-align="justify" fo:margin-top="0.1666in" fo:line-height="150%"/>
      <style:text-properties style:font-name="Times New Roman" style:font-name-complex="Times New Roman"/>
    </style:style>
    <style:style style:name="P100"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101" style:parent-style-name="Normal" style:family="paragraph">
      <style:paragraph-properties fo:text-align="justify" fo:margin-top="0.1666in" fo:line-height="150%"/>
      <style:text-properties style:font-name="Times New Roman" style:font-name-complex="Times New Roman"/>
    </style:style>
    <style:style style:name="P102" style:parent-style-name="Normal" style:family="paragraph">
      <style:paragraph-properties fo:text-align="justify" fo:margin-top="0.1666in" fo:line-height="150%"/>
      <style:text-properties style:font-name="Times New Roman" style:font-name-complex="Times New Roman"/>
    </style:style>
    <style:style style:name="P103" style:parent-style-name="Normal" style:family="paragraph">
      <style:paragraph-properties fo:text-align="justify" fo:margin-top="0.1666in" fo:line-height="150%"/>
      <style:text-properties style:font-name="Times New Roman" style:font-name-complex="Times New Roman"/>
    </style:style>
    <style:style style:name="P104" style:parent-style-name="Normal" style:family="paragraph">
      <style:paragraph-properties fo:text-align="justify" fo:margin-top="0.1666in" fo:line-height="150%"/>
      <style:text-properties style:font-name="Times New Roman" style:font-name-complex="Times New Roman"/>
    </style:style>
    <style:style style:name="P105"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106" style:parent-style-name="Normal" style:family="paragraph">
      <style:paragraph-properties fo:text-align="justify" fo:margin-top="0.1666in" fo:line-height="150%"/>
      <style:text-properties style:font-name="Times New Roman" style:font-name-complex="Times New Roman"/>
    </style:style>
    <style:style style:name="P107" style:parent-style-name="Normal" style:family="paragraph">
      <style:paragraph-properties fo:text-align="justify" fo:margin-top="0.1666in" fo:line-height="150%"/>
      <style:text-properties style:font-name="Times New Roman" style:font-name-complex="Times New Roman"/>
    </style:style>
    <style:style style:name="P108" style:parent-style-name="Normal" style:family="paragraph">
      <style:paragraph-properties fo:text-align="justify" fo:margin-top="0.1666in" fo:line-height="150%"/>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fo:font-style="italic" style:font-style-asian="italic" style:font-style-complex="italic"/>
    </style:style>
    <style:style style:name="P111" style:parent-style-name="Normal" style:family="paragraph">
      <style:paragraph-properties fo:text-align="justify" fo:margin-top="0.1666in" fo:line-height="150%"/>
      <style:text-properties style:font-name="Times New Roman" style:font-name-complex="Times New Roman"/>
    </style:style>
    <style:style style:name="P112" style:parent-style-name="Normal" style:family="paragraph">
      <style:paragraph-properties fo:text-align="justify" fo:margin-top="0.1666in" fo:line-height="150%"/>
      <style:text-properties style:font-name="Times New Roman" style:font-name-complex="Times New Roman"/>
    </style:style>
    <style:style style:name="P113" style:parent-style-name="Normal" style:family="paragraph">
      <style:paragraph-properties fo:text-align="justify" fo:margin-top="0.1666in" fo:line-height="150%"/>
      <style:text-properties style:font-name="Times New Roman" style:font-name-complex="Times New Roman"/>
    </style:style>
    <style:style style:name="P114" style:parent-style-name="Normal" style:family="paragraph">
      <style:paragraph-properties fo:text-align="justify" fo:margin-top="0.1666in" fo:line-height="150%"/>
      <style:text-properties style:font-name="Times New Roman" style:font-name-complex="Times New Roman"/>
    </style:style>
    <style:style style:name="P115" style:parent-style-name="Normal" style:family="paragraph">
      <style:paragraph-properties fo:text-align="justify" fo:margin-top="0.1666in" fo:line-height="150%"/>
      <style:text-properties style:font-name="Times New Roman" style:font-name-complex="Times New Roman"/>
    </style:style>
    <style:style style:name="P116" style:parent-style-name="Normal" style:family="paragraph">
      <style:paragraph-properties fo:text-align="justify" fo:margin-top="0.1666in" fo:line-height="150%"/>
      <style:text-properties style:font-name="Times New Roman" style:font-name-complex="Times New Roman"/>
    </style:style>
    <style:style style:name="P117" style:parent-style-name="Normal" style:family="paragraph">
      <style:paragraph-properties fo:text-align="justify" fo:margin-top="0.1666in" fo:line-height="150%"/>
      <style:text-properties style:font-name="Times New Roman" style:font-name-complex="Times New Roman"/>
    </style:style>
    <style:style style:name="P118" style:parent-style-name="Normal" style:family="paragraph">
      <style:paragraph-properties fo:text-align="justify" fo:margin-top="0.1666in" fo:line-height="150%"/>
      <style:text-properties style:font-name="Times New Roman" style:font-name-complex="Times New Roman"/>
    </style:style>
    <style:style style:name="P119" style:parent-style-name="Normal" style:family="paragraph">
      <style:paragraph-properties fo:text-align="justify" fo:margin-top="0.1666in" fo:line-height="150%"/>
      <style:text-properties style:font-name="Times New Roman" style:font-name-complex="Times New Roman"/>
    </style:style>
    <style:style style:name="P120" style:parent-style-name="Normal" style:family="paragraph">
      <style:paragraph-properties fo:text-align="justify" fo:margin-top="0.1666in" fo:line-height="150%"/>
      <style:text-properties style:font-name="Times New Roman" style:font-name-complex="Times New Roman"/>
    </style:style>
    <style:style style:name="P121" style:parent-style-name="Normal" style:family="paragraph">
      <style:paragraph-properties fo:text-align="justify" fo:margin-top="0.1666in" fo:line-height="150%"/>
      <style:text-properties style:font-name="Times New Roman" style:font-name-complex="Times New Roman"/>
    </style:style>
    <style:style style:name="P122" style:parent-style-name="Normal" style:family="paragraph">
      <style:paragraph-properties fo:text-align="justify" fo:margin-top="0.1666in" fo:line-height="150%"/>
      <style:text-properties style:font-name="Times New Roman" style:font-name-complex="Times New Roman"/>
    </style:style>
    <style:style style:name="P123" style:parent-style-name="Normal" style:family="paragraph">
      <style:paragraph-properties fo:text-align="justify" fo:margin-top="0.1666in" fo:line-height="150%"/>
      <style:text-properties style:font-name="Times New Roman" style:font-name-complex="Times New Roman"/>
    </style:style>
    <style:style style:name="P124"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125" style:parent-style-name="Normal" style:family="paragraph">
      <style:paragraph-properties fo:text-align="justify" fo:margin-top="0.1666in" fo:line-height="150%"/>
      <style:text-properties style:font-name="Times New Roman" style:font-name-complex="Times New Roman"/>
    </style:style>
    <style:style style:name="P126" style:parent-style-name="Normal" style:family="paragraph">
      <style:paragraph-properties fo:text-align="justify" fo:margin-top="0.1666in" fo:line-height="150%"/>
      <style:text-properties style:font-name="Times New Roman" style:font-name-complex="Times New Roman"/>
    </style:style>
    <style:style style:name="P127" style:parent-style-name="Normal" style:family="paragraph">
      <style:paragraph-properties fo:text-align="justify" fo:margin-top="0.1666in" fo:line-height="150%"/>
      <style:text-properties style:font-name="Times New Roman" style:font-name-complex="Times New Roman"/>
    </style:style>
    <style:style style:name="P128" style:parent-style-name="Normal" style:family="paragraph">
      <style:paragraph-properties fo:text-align="justify" fo:margin-top="0.1666in" fo:line-height="150%"/>
      <style:text-properties style:font-name="Times New Roman" style:font-name-complex="Times New Roman"/>
    </style:style>
    <style:style style:name="P129" style:parent-style-name="Normal" style:family="paragraph">
      <style:paragraph-properties fo:text-align="justify" fo:margin-top="0.1666in" fo:line-height="150%"/>
      <style:text-properties style:font-name="Times New Roman" style:font-name-complex="Times New Roman"/>
    </style:style>
    <style:style style:name="P130" style:parent-style-name="Normal" style:family="paragraph">
      <style:paragraph-properties fo:text-align="justify" fo:margin-top="0.1666in" fo:line-height="150%"/>
      <style:text-properties style:font-name="Times New Roman" style:font-name-complex="Times New Roman"/>
    </style:style>
    <style:style style:name="P131" style:parent-style-name="Normal" style:family="paragraph">
      <style:paragraph-properties fo:text-align="justify" fo:margin-top="0.1666in" fo:line-height="150%"/>
      <style:text-properties style:font-name="Times New Roman" style:font-name-complex="Times New Roman"/>
    </style:style>
    <style:style style:name="P132" style:parent-style-name="Normal" style:family="paragraph">
      <style:paragraph-properties fo:text-align="justify" fo:margin-top="0.1666in" fo:line-height="150%"/>
      <style:text-properties style:font-name="Times New Roman" style:font-name-complex="Times New Roman"/>
    </style:style>
    <style:style style:name="P133"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134" style:parent-style-name="Normal" style:family="paragraph">
      <style:paragraph-properties fo:text-align="justify" fo:margin-top="0.1666in" fo:line-height="150%"/>
      <style:text-properties style:font-name="Times New Roman" style:font-name-complex="Times New Roman"/>
    </style:style>
    <style:style style:name="P135" style:parent-style-name="Normal" style:family="paragraph">
      <style:paragraph-properties fo:text-align="justify" fo:margin-top="0.1666in" fo:line-height="150%"/>
      <style:text-properties style:font-name="Times New Roman" style:font-name-complex="Times New Roman"/>
    </style:style>
    <style:style style:name="P136" style:parent-style-name="Normal" style:family="paragraph">
      <style:paragraph-properties fo:text-align="justify" fo:margin-top="0.1666in" fo:line-height="150%"/>
      <style:text-properties style:font-name="Times New Roman" style:font-name-complex="Times New Roman"/>
    </style:style>
    <style:style style:name="P137" style:parent-style-name="Normal" style:family="paragraph">
      <style:paragraph-properties fo:text-align="justify" fo:margin-top="0.1666in" fo:line-height="150%"/>
    </style:style>
    <style:style style:name="T138" style:parent-style-name="DefaultParagraphFont" style:family="text">
      <style:text-properties style:font-name="Times New Roman" style:font-name-complex="Times New Roman" fo:font-style="italic" style:font-style-asian="italic" style:font-style-complex="italic"/>
    </style:style>
    <style:style style:name="T139" style:parent-style-name="DefaultParagraphFont" style:family="text">
      <style:text-properties style:font-name="Times New Roman" style:font-name-complex="Times New Roman"/>
    </style:style>
    <style:style style:name="P140" style:parent-style-name="Normal" style:family="paragraph">
      <style:paragraph-properties fo:text-align="justify" fo:margin-top="0.1666in" fo:line-height="150%"/>
      <style:text-properties style:font-name="Times New Roman" style:font-name-complex="Times New Roman"/>
    </style:style>
    <style:style style:name="P141" style:parent-style-name="Normal" style:family="paragraph">
      <style:paragraph-properties fo:text-align="justify" fo:margin-top="0.1666in" fo:line-height="150%"/>
      <style:text-properties style:font-name="Times New Roman" style:font-name-complex="Times New Roman"/>
    </style:style>
    <style:style style:name="P142" style:parent-style-name="Normal" style:family="paragraph">
      <style:paragraph-properties fo:text-align="justify" fo:margin-top="0.1666in" fo:line-height="150%"/>
      <style:text-properties style:font-name="Times New Roman" style:font-name-complex="Times New Roman"/>
    </style:style>
    <style:style style:name="P143" style:parent-style-name="Normal" style:family="paragraph">
      <style:paragraph-properties fo:text-align="justify" fo:margin-top="0.1666in" fo:line-height="150%"/>
      <style:text-properties style:font-name="Times New Roman" style:font-name-complex="Times New Roman"/>
    </style:style>
    <style:style style:name="P144" style:parent-style-name="Normal" style:family="paragraph">
      <style:paragraph-properties fo:text-align="justify" fo:margin-top="0.1666in" fo:line-height="150%"/>
      <style:text-properties style:font-name="Times New Roman" style:font-name-complex="Times New Roman"/>
    </style:style>
    <style:style style:name="P145" style:parent-style-name="Normal" style:family="paragraph">
      <style:paragraph-properties fo:text-align="justify" fo:margin-top="0.1666in" fo:line-height="150%"/>
      <style:text-properties style:font-name="Times New Roman" style:font-name-complex="Times New Roman"/>
    </style:style>
    <style:style style:name="P146" style:parent-style-name="Normal" style:family="paragraph">
      <style:paragraph-properties fo:text-align="justify" fo:margin-top="0.1666in" fo:line-height="150%"/>
      <style:text-properties style:font-name="Times New Roman" style:font-name-complex="Times New Roman"/>
    </style:style>
    <style:style style:name="P147" style:parent-style-name="Normal" style:family="paragraph">
      <style:paragraph-properties fo:text-align="justify" fo:margin-top="0.1666in" fo:line-height="150%"/>
      <style:text-properties style:font-name="Times New Roman" style:font-name-complex="Times New Roman"/>
    </style:style>
    <style:style style:name="P148" style:parent-style-name="Normal" style:family="paragraph">
      <style:paragraph-properties fo:text-align="justify" fo:margin-top="0.1666in" fo:line-height="150%"/>
      <style:text-properties style:font-name="Times New Roman" style:font-name-complex="Times New Roman"/>
    </style:style>
    <style:style style:name="P149" style:parent-style-name="Normal" style:family="paragraph">
      <style:paragraph-properties fo:text-align="justify" fo:margin-top="0.1666in" fo:line-height="150%"/>
      <style:text-properties style:font-name="Times New Roman" style:font-name-complex="Times New Roman"/>
    </style:style>
    <style:style style:name="P150" style:parent-style-name="Normal" style:family="paragraph">
      <style:paragraph-properties fo:text-align="justify" fo:margin-top="0.1666in" fo:line-height="150%"/>
      <style:text-properties style:font-name="Times New Roman" style:font-name-complex="Times New Roman"/>
    </style:style>
    <style:style style:name="P151" style:parent-style-name="Normal" style:family="paragraph">
      <style:paragraph-properties fo:text-align="justify" fo:margin-top="0.1666in" fo:line-height="150%"/>
      <style:text-properties style:font-name="Times New Roman" style:font-name-complex="Times New Roman"/>
    </style:style>
    <style:style style:name="P152" style:parent-style-name="Normal" style:family="paragraph">
      <style:paragraph-properties fo:text-align="justify" fo:margin-top="0.1666in" fo:line-height="150%"/>
      <style:text-properties style:font-name="Times New Roman" style:font-name-complex="Times New Roman"/>
    </style:style>
    <style:style style:name="P153" style:parent-style-name="Normal" style:family="paragraph">
      <style:paragraph-properties fo:text-align="justify" fo:margin-top="0.1666in" fo:line-height="150%"/>
      <style:text-properties style:font-name="Times New Roman" style:font-name-complex="Times New Roman"/>
    </style:style>
    <style:style style:name="P154" style:parent-style-name="Normal" style:family="paragraph">
      <style:paragraph-properties fo:text-align="justify" fo:margin-top="0.1666in" fo:line-height="150%"/>
      <style:text-properties style:font-name="Times New Roman" style:font-name-complex="Times New Roman"/>
    </style:style>
    <style:style style:name="P155" style:parent-style-name="Normal" style:family="paragraph">
      <style:paragraph-properties fo:text-align="justify" fo:margin-top="0.1666in" fo:line-height="150%"/>
      <style:text-properties style:font-name="Times New Roman" style:font-name-complex="Times New Roman"/>
    </style:style>
    <style:style style:name="P156" style:parent-style-name="Normal" style:family="paragraph">
      <style:paragraph-properties fo:text-align="justify" fo:margin-top="0.1666in" fo:line-height="150%"/>
      <style:text-properties style:font-name="Times New Roman" style:font-name-complex="Times New Roman"/>
    </style:style>
    <style:style style:name="P157" style:parent-style-name="Normal" style:family="paragraph">
      <style:paragraph-properties fo:text-align="justify" fo:margin-top="0.1666in" fo:line-height="150%"/>
      <style:text-properties style:font-name="Times New Roman" style:font-name-complex="Times New Roman"/>
    </style:style>
    <style:style style:name="P158" style:parent-style-name="Normal" style:family="paragraph">
      <style:paragraph-properties fo:text-align="justify" fo:margin-top="0.1666in" fo:line-height="150%"/>
      <style:text-properties style:font-name="Times New Roman" style:font-name-complex="Times New Roman"/>
    </style:style>
    <style:style style:name="P159" style:parent-style-name="Normal" style:family="paragraph">
      <style:paragraph-properties fo:text-align="justify" fo:margin-top="0.1666in" fo:line-height="150%"/>
      <style:text-properties style:font-name="Times New Roman" style:font-name-complex="Times New Roman"/>
    </style:style>
    <style:style style:name="P160" style:parent-style-name="Normal" style:family="paragraph">
      <style:paragraph-properties fo:text-align="justify" fo:margin-top="0.1666in" fo:line-height="150%"/>
      <style:text-properties style:font-name="Times New Roman" style:font-name-complex="Times New Roman"/>
    </style:style>
    <style:style style:name="P161" style:parent-style-name="Normal" style:family="paragraph">
      <style:paragraph-properties fo:text-align="justify" fo:margin-top="0.1666in" fo:line-height="150%"/>
      <style:text-properties style:font-name="Times New Roman" style:font-name-complex="Times New Roman"/>
    </style:style>
    <style:style style:name="P162" style:parent-style-name="Normal" style:family="paragraph">
      <style:paragraph-properties fo:text-align="justify" fo:margin-top="0.1666in" fo:line-height="150%"/>
      <style:text-properties style:font-name="Times New Roman" style:font-name-complex="Times New Roman"/>
    </style:style>
    <style:style style:name="P163" style:parent-style-name="Normal" style:family="paragraph">
      <style:paragraph-properties fo:text-align="justify" fo:margin-top="0.1666in" fo:line-height="150%"/>
      <style:text-properties style:font-name="Times New Roman" style:font-name-complex="Times New Roman"/>
    </style:style>
    <style:style style:name="P164" style:parent-style-name="Normal" style:family="paragraph">
      <style:paragraph-properties fo:text-align="justify" fo:margin-top="0.1666in" fo:line-height="150%"/>
      <style:text-properties style:font-name="Times New Roman" style:font-name-complex="Times New Roman"/>
    </style:style>
    <style:style style:name="P165"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166" style:parent-style-name="Normal" style:family="paragraph">
      <style:paragraph-properties fo:text-align="justify" fo:margin-top="0.1666in" fo:line-height="150%"/>
      <style:text-properties style:font-name="Times New Roman" style:font-name-complex="Times New Roman"/>
    </style:style>
    <style:style style:name="P167" style:parent-style-name="Normal" style:family="paragraph">
      <style:paragraph-properties fo:text-align="justify" fo:margin-top="0.1666in" fo:line-height="150%"/>
      <style:text-properties style:font-name="Times New Roman" style:font-name-complex="Times New Roman"/>
    </style:style>
    <style:style style:name="P168" style:parent-style-name="Normal" style:family="paragraph">
      <style:paragraph-properties fo:text-align="justify" fo:margin-top="0.1666in" fo:line-height="150%"/>
      <style:text-properties style:font-name="Times New Roman" style:font-name-complex="Times New Roman"/>
    </style:style>
    <style:style style:name="P169" style:parent-style-name="Normal" style:family="paragraph">
      <style:paragraph-properties fo:text-align="justify" fo:margin-top="0.1666in" fo:line-height="150%"/>
      <style:text-properties style:font-name="Times New Roman" style:font-name-complex="Times New Roman"/>
    </style:style>
    <style:style style:name="P170" style:parent-style-name="Normal" style:family="paragraph">
      <style:paragraph-properties fo:text-align="justify" fo:margin-top="0.1666in" fo:line-height="150%"/>
      <style:text-properties style:font-name="Times New Roman" style:font-name-complex="Times New Roman"/>
    </style:style>
    <style:style style:name="P171" style:parent-style-name="Normal" style:family="paragraph">
      <style:paragraph-properties fo:text-align="justify" fo:margin-top="0.1666in" fo:line-height="150%"/>
      <style:text-properties style:font-name="Times New Roman" style:font-name-complex="Times New Roman"/>
    </style:style>
    <style:style style:name="P172" style:parent-style-name="Normal" style:family="paragraph">
      <style:paragraph-properties fo:text-align="justify" fo:margin-top="0.1666in" fo:line-height="150%"/>
      <style:text-properties style:font-name="Times New Roman" style:font-name-complex="Times New Roman"/>
    </style:style>
    <style:style style:name="P173" style:parent-style-name="Normal" style:family="paragraph">
      <style:paragraph-properties fo:text-align="justify" fo:margin-top="0.1666in" fo:line-height="150%"/>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fo:font-style="italic" style:font-style-asian="italic" style:font-style-complex="italic"/>
    </style:style>
    <style:style style:name="T176" style:parent-style-name="DefaultParagraphFont" style:family="text">
      <style:text-properties style:font-name="Times New Roman" style:font-name-complex="Times New Roman"/>
    </style:style>
    <style:style style:name="P177" style:parent-style-name="Normal" style:family="paragraph">
      <style:paragraph-properties fo:text-align="justify" fo:margin-top="0.1666in" fo:line-height="150%"/>
      <style:text-properties style:font-name="Times New Roman" style:font-name-complex="Times New Roman"/>
    </style:style>
    <style:style style:name="P178" style:parent-style-name="Normal" style:family="paragraph">
      <style:paragraph-properties fo:text-align="justify" fo:margin-top="0.1666in" fo:line-height="150%"/>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fo:font-style="italic" style:font-style-asian="italic" style:font-style-complex="italic"/>
    </style:style>
    <style:style style:name="T181" style:parent-style-name="DefaultParagraphFont" style:family="text">
      <style:text-properties style:font-name="Times New Roman" style:font-name-complex="Times New Roman"/>
    </style:style>
    <style:style style:name="P182" style:parent-style-name="Normal" style:family="paragraph">
      <style:paragraph-properties fo:text-align="justify" fo:margin-top="0.1666in" fo:line-height="150%"/>
      <style:text-properties style:font-name="Times New Roman" style:font-name-complex="Times New Roman"/>
    </style:style>
    <style:style style:name="P183" style:parent-style-name="Normal" style:family="paragraph">
      <style:paragraph-properties fo:text-align="justify" fo:margin-top="0.1666in" fo:line-height="150%"/>
      <style:text-properties style:font-name="Times New Roman" style:font-name-complex="Times New Roman"/>
    </style:style>
    <style:style style:name="P184" style:parent-style-name="Normal" style:family="paragraph">
      <style:paragraph-properties fo:text-align="justify" fo:margin-top="0.1666in" fo:line-height="150%"/>
      <style:text-properties style:font-name="Times New Roman" style:font-name-complex="Times New Roman"/>
    </style:style>
    <style:style style:name="P185" style:parent-style-name="Normal" style:family="paragraph">
      <style:paragraph-properties fo:text-align="justify" fo:margin-top="0.1666in" fo:line-height="150%"/>
      <style:text-properties style:font-name="Times New Roman" style:font-name-complex="Times New Roman"/>
    </style:style>
    <style:style style:name="P186" style:parent-style-name="Normal" style:family="paragraph">
      <style:paragraph-properties fo:text-align="justify" fo:margin-top="0.1666in" fo:line-height="150%"/>
      <style:text-properties style:font-name="Times New Roman" style:font-name-complex="Times New Roman"/>
    </style:style>
    <style:style style:name="P187" style:parent-style-name="Normal" style:family="paragraph">
      <style:paragraph-properties fo:text-align="justify" fo:margin-top="0.1666in" fo:line-height="150%"/>
      <style:text-properties style:font-name="Times New Roman" style:font-name-complex="Times New Roman"/>
    </style:style>
    <style:style style:name="P188" style:parent-style-name="Normal" style:family="paragraph">
      <style:paragraph-properties fo:text-align="justify" fo:margin-top="0.1666in" fo:line-height="150%"/>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fo:font-style="italic" style:font-style-asian="italic" style:font-style-complex="italic"/>
    </style:style>
    <style:style style:name="T191" style:parent-style-name="DefaultParagraphFont" style:family="text">
      <style:text-properties style:font-name="Times New Roman" style:font-name-complex="Times New Roman"/>
    </style:style>
    <style:style style:name="P192" style:parent-style-name="Normal" style:family="paragraph">
      <style:paragraph-properties fo:text-align="justify" fo:margin-top="0.1666in" fo:line-height="150%"/>
      <style:text-properties style:font-name="Times New Roman" style:font-name-complex="Times New Roman"/>
    </style:style>
    <style:style style:name="P193" style:parent-style-name="Normal" style:family="paragraph">
      <style:paragraph-properties fo:text-align="justify" fo:margin-top="0.1666in" fo:line-height="150%"/>
      <style:text-properties style:font-name="Times New Roman" style:font-name-complex="Times New Roman"/>
    </style:style>
    <style:style style:name="P194" style:parent-style-name="Normal" style:family="paragraph">
      <style:paragraph-properties fo:text-align="justify" fo:margin-top="0.1666in" fo:line-height="150%"/>
      <style:text-properties style:font-name="Times New Roman" style:font-name-complex="Times New Roman"/>
    </style:style>
    <style:style style:name="P195" style:parent-style-name="Normal" style:family="paragraph">
      <style:paragraph-properties fo:text-align="justify" fo:margin-top="0.1666in" fo:line-height="150%"/>
      <style:text-properties style:font-name="Times New Roman" style:font-name-complex="Times New Roman"/>
    </style:style>
    <style:style style:name="P196" style:parent-style-name="Normal" style:family="paragraph">
      <style:paragraph-properties fo:text-align="justify" fo:margin-top="0.1666in" fo:line-height="150%"/>
      <style:text-properties style:font-name="Times New Roman" style:font-name-complex="Times New Roman"/>
    </style:style>
    <style:style style:name="P197"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198" style:parent-style-name="Normal" style:family="paragraph">
      <style:paragraph-properties fo:text-align="justify" fo:margin-top="0.1666in" fo:line-height="150%"/>
      <style:text-properties style:font-name="Times New Roman" style:font-name-complex="Times New Roman"/>
    </style:style>
    <style:style style:name="P199" style:parent-style-name="Normal" style:family="paragraph">
      <style:paragraph-properties fo:text-align="justify" fo:margin-top="0.1666in" fo:line-height="150%"/>
      <style:text-properties style:font-name="Times New Roman" style:font-name-complex="Times New Roman"/>
    </style:style>
    <style:style style:name="P200" style:parent-style-name="Normal" style:family="paragraph">
      <style:paragraph-properties fo:text-align="justify" fo:margin-top="0.1666in" fo:line-height="150%"/>
      <style:text-properties style:font-name="Times New Roman" style:font-name-complex="Times New Roman"/>
    </style:style>
    <style:style style:name="P201" style:parent-style-name="Normal" style:family="paragraph">
      <style:paragraph-properties fo:text-align="justify" fo:margin-top="0.1666in" fo:line-height="150%"/>
      <style:text-properties style:font-name="Times New Roman" style:font-name-complex="Times New Roman"/>
    </style:style>
    <style:style style:name="P202" style:parent-style-name="Normal" style:family="paragraph">
      <style:paragraph-properties fo:text-align="justify" fo:margin-top="0.1666in" fo:line-height="150%"/>
      <style:text-properties style:font-name="Times New Roman" style:font-name-complex="Times New Roman"/>
    </style:style>
    <style:style style:name="P203" style:parent-style-name="Normal" style:family="paragraph">
      <style:paragraph-properties fo:text-align="justify" fo:margin-top="0.1666in" fo:line-height="150%"/>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fo:font-style="italic" style:font-style-asian="italic" style:font-style-complex="italic"/>
    </style:style>
    <style:style style:name="T206" style:parent-style-name="DefaultParagraphFont" style:family="text">
      <style:text-properties style:font-name="Times New Roman" style:font-name-complex="Times New Roman"/>
    </style:style>
    <style:style style:name="P207" style:parent-style-name="Normal" style:family="paragraph">
      <style:paragraph-properties fo:text-align="justify" fo:margin-top="0.1666in" fo:line-height="150%"/>
      <style:text-properties style:font-name="Times New Roman" style:font-name-complex="Times New Roman"/>
    </style:style>
    <style:style style:name="P208" style:parent-style-name="Normal" style:family="paragraph">
      <style:paragraph-properties fo:text-align="justify" fo:margin-top="0.1666in" fo:line-height="150%"/>
      <style:text-properties style:font-name="Times New Roman" style:font-name-complex="Times New Roman"/>
    </style:style>
    <style:style style:name="P209" style:parent-style-name="Normal" style:family="paragraph">
      <style:paragraph-properties fo:text-align="justify" fo:margin-top="0.1666in" fo:line-height="150%"/>
      <style:text-properties style:font-name="Times New Roman" style:font-name-complex="Times New Roman"/>
    </style:style>
    <style:style style:name="P210" style:parent-style-name="Normal" style:family="paragraph">
      <style:paragraph-properties fo:text-align="justify" fo:margin-top="0.1666in" fo:line-height="150%"/>
      <style:text-properties style:font-name="Times New Roman" style:font-name-complex="Times New Roman"/>
    </style:style>
    <style:style style:name="P211" style:parent-style-name="Normal" style:family="paragraph">
      <style:paragraph-properties fo:text-align="justify" fo:margin-top="0.1666in" fo:line-height="150%"/>
      <style:text-properties style:font-name="Times New Roman" style:font-name-complex="Times New Roman"/>
    </style:style>
    <style:style style:name="P212" style:parent-style-name="Normal" style:family="paragraph">
      <style:paragraph-properties fo:text-align="justify" fo:margin-top="0.1666in" fo:line-height="150%"/>
      <style:text-properties style:font-name="Times New Roman" style:font-name-complex="Times New Roman"/>
    </style:style>
    <style:style style:name="P213" style:parent-style-name="Normal" style:family="paragraph">
      <style:paragraph-properties fo:text-align="justify" fo:margin-top="0.1666in" fo:line-height="150%"/>
      <style:text-properties style:font-name="Times New Roman" style:font-name-complex="Times New Roman"/>
    </style:style>
    <style:style style:name="P214" style:parent-style-name="Normal" style:family="paragraph">
      <style:paragraph-properties fo:text-align="justify" fo:margin-top="0.1666in" fo:line-height="150%"/>
      <style:text-properties style:font-name="Times New Roman" style:font-name-complex="Times New Roman"/>
    </style:style>
    <style:style style:name="P215" style:parent-style-name="Normal" style:family="paragraph">
      <style:paragraph-properties fo:text-align="justify" fo:margin-top="0.1666in" fo:line-height="150%"/>
      <style:text-properties style:font-name="Times New Roman" style:font-name-complex="Times New Roman"/>
    </style:style>
    <style:style style:name="P216" style:parent-style-name="Normal" style:family="paragraph">
      <style:paragraph-properties fo:text-align="justify" fo:margin-top="0.1666in" fo:line-height="150%"/>
      <style:text-properties style:font-name="Times New Roman" style:font-name-complex="Times New Roman"/>
    </style:style>
    <style:style style:name="P217" style:parent-style-name="Normal" style:family="paragraph">
      <style:paragraph-properties fo:text-align="justify" fo:margin-top="0.1666in" fo:line-height="150%"/>
      <style:text-properties style:font-name="Times New Roman" style:font-name-complex="Times New Roman"/>
    </style:style>
    <style:style style:name="P218" style:parent-style-name="Normal" style:family="paragraph">
      <style:paragraph-properties fo:text-align="justify" fo:margin-top="0.1666in" fo:line-height="150%"/>
      <style:text-properties style:font-name="Times New Roman" style:font-name-complex="Times New Roman"/>
    </style:style>
    <style:style style:name="P219" style:parent-style-name="Normal" style:family="paragraph">
      <style:paragraph-properties fo:text-align="justify" fo:margin-top="0.1666in" fo:line-height="150%"/>
      <style:text-properties style:font-name="Times New Roman" style:font-name-complex="Times New Roman"/>
    </style:style>
    <style:style style:name="P220" style:parent-style-name="Normal" style:family="paragraph">
      <style:paragraph-properties fo:text-align="justify" fo:margin-top="0.1666in" fo:line-height="150%"/>
      <style:text-properties style:font-name="Times New Roman" style:font-name-complex="Times New Roman"/>
    </style:style>
    <style:style style:name="P221" style:parent-style-name="Normal" style:family="paragraph">
      <style:paragraph-properties fo:text-align="justify" fo:margin-top="0.1666in" fo:line-height="150%"/>
      <style:text-properties style:font-name="Times New Roman" style:font-name-complex="Times New Roman"/>
    </style:style>
    <style:style style:name="P222" style:parent-style-name="Normal" style:family="paragraph">
      <style:paragraph-properties fo:text-align="justify" fo:margin-top="0.1666in" fo:line-height="150%"/>
      <style:text-properties style:font-name="Times New Roman" style:font-name-complex="Times New Roman"/>
    </style:style>
    <style:style style:name="P223" style:parent-style-name="Normal" style:family="paragraph">
      <style:paragraph-properties fo:text-align="justify" fo:margin-top="0.1666in" fo:line-height="150%"/>
      <style:text-properties style:font-name="Times New Roman" style:font-name-complex="Times New Roman"/>
    </style:style>
    <style:style style:name="P224" style:parent-style-name="Normal" style:family="paragraph">
      <style:paragraph-properties fo:text-align="justify" fo:margin-top="0.1666in" fo:line-height="150%"/>
      <style:text-properties style:font-name="Times New Roman" style:font-name-complex="Times New Roman"/>
    </style:style>
    <style:style style:name="P225" style:parent-style-name="Normal" style:family="paragraph">
      <style:paragraph-properties fo:text-align="justify" fo:margin-top="0.1666in" fo:line-height="150%"/>
      <style:text-properties style:font-name="Times New Roman" style:font-name-complex="Times New Roman"/>
    </style:style>
    <style:style style:name="P226" style:parent-style-name="Normal" style:family="paragraph">
      <style:paragraph-properties fo:text-align="justify" fo:margin-top="0.1666in" fo:line-height="150%"/>
      <style:text-properties style:font-name="Times New Roman" style:font-name-complex="Times New Roman"/>
    </style:style>
    <style:style style:name="P227"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228" style:parent-style-name="Normal" style:family="paragraph">
      <style:paragraph-properties fo:text-align="justify" fo:margin-top="0.1666in" fo:line-height="150%"/>
      <style:text-properties style:font-name="Times New Roman" style:font-name-complex="Times New Roman"/>
    </style:style>
    <style:style style:name="P229" style:parent-style-name="Normal" style:family="paragraph">
      <style:paragraph-properties fo:text-align="justify" fo:margin-top="0.1666in" fo:line-height="150%"/>
      <style:text-properties style:font-name="Times New Roman" style:font-name-complex="Times New Roman"/>
    </style:style>
    <style:style style:name="P230" style:parent-style-name="Normal" style:family="paragraph">
      <style:paragraph-properties fo:text-align="justify" fo:margin-top="0.1666in" fo:line-height="150%"/>
      <style:text-properties style:font-name="Times New Roman" style:font-name-complex="Times New Roman"/>
    </style:style>
    <style:style style:name="P231" style:parent-style-name="Normal" style:family="paragraph">
      <style:paragraph-properties fo:text-align="justify" fo:margin-top="0.1666in" fo:line-height="150%"/>
      <style:text-properties style:font-name="Times New Roman" style:font-name-complex="Times New Roman"/>
    </style:style>
    <style:style style:name="P232" style:parent-style-name="Normal" style:family="paragraph">
      <style:paragraph-properties fo:text-align="justify" fo:margin-top="0.1666in" fo:line-height="150%"/>
      <style:text-properties style:font-name="Times New Roman" style:font-name-complex="Times New Roman"/>
    </style:style>
    <style:style style:name="P233" style:parent-style-name="Normal" style:family="paragraph">
      <style:paragraph-properties fo:text-align="justify" fo:margin-top="0.1666in" fo:line-height="150%"/>
      <style:text-properties style:font-name="Times New Roman" style:font-name-complex="Times New Roman"/>
    </style:style>
    <style:style style:name="P234" style:parent-style-name="Normal" style:family="paragraph">
      <style:paragraph-properties fo:text-align="justify" fo:margin-top="0.1666in" fo:line-height="150%"/>
      <style:text-properties style:font-name="Times New Roman" style:font-name-complex="Times New Roman"/>
    </style:style>
    <style:style style:name="P235" style:parent-style-name="Normal" style:family="paragraph">
      <style:paragraph-properties fo:text-align="justify" fo:margin-top="0.1666in" fo:line-height="150%"/>
      <style:text-properties style:font-name="Times New Roman" style:font-name-complex="Times New Roman"/>
    </style:style>
    <style:style style:name="P236" style:parent-style-name="Normal" style:family="paragraph">
      <style:paragraph-properties fo:text-align="justify" fo:margin-top="0.1666in" fo:line-height="150%"/>
      <style:text-properties style:font-name="Times New Roman" style:font-name-complex="Times New Roman"/>
    </style:style>
    <style:style style:name="P237" style:parent-style-name="Normal" style:family="paragraph">
      <style:paragraph-properties fo:text-align="justify" fo:margin-top="0.1666in" fo:line-height="150%"/>
      <style:text-properties style:font-name="Times New Roman" style:font-name-complex="Times New Roman"/>
    </style:style>
    <style:style style:name="P238" style:parent-style-name="Normal" style:family="paragraph">
      <style:paragraph-properties fo:text-align="justify" fo:margin-top="0.1666in" fo:line-height="150%"/>
      <style:text-properties style:font-name="Times New Roman" style:font-name-complex="Times New Roman"/>
    </style:style>
    <style:style style:name="P239" style:parent-style-name="Normal" style:family="paragraph">
      <style:paragraph-properties fo:text-align="justify" fo:margin-top="0.1666in" fo:line-height="150%"/>
      <style:text-properties style:font-name="Times New Roman" style:font-name-complex="Times New Roman"/>
    </style:style>
    <style:style style:name="P240" style:parent-style-name="Normal" style:family="paragraph">
      <style:paragraph-properties fo:text-align="justify" fo:margin-top="0.1666in" fo:line-height="150%"/>
      <style:text-properties style:font-name="Times New Roman" style:font-name-complex="Times New Roman"/>
    </style:style>
    <style:style style:name="P241" style:parent-style-name="Normal" style:family="paragraph">
      <style:paragraph-properties fo:text-align="justify" fo:margin-top="0.1666in" fo:line-height="150%"/>
      <style:text-properties style:font-name="Times New Roman" style:font-name-complex="Times New Roman"/>
    </style:style>
    <style:style style:name="P242" style:parent-style-name="Normal" style:family="paragraph">
      <style:paragraph-properties fo:text-align="justify" fo:margin-top="0.1666in" fo:line-height="150%"/>
      <style:text-properties style:font-name="Times New Roman" style:font-name-complex="Times New Roman"/>
    </style:style>
    <style:style style:name="P243" style:parent-style-name="Normal" style:family="paragraph">
      <style:paragraph-properties fo:text-align="justify" fo:margin-top="0.1666in" fo:line-height="150%"/>
      <style:text-properties style:font-name="Times New Roman" style:font-name-complex="Times New Roman"/>
    </style:style>
    <style:style style:name="P244" style:parent-style-name="Normal" style:family="paragraph">
      <style:paragraph-properties fo:text-align="justify" fo:margin-top="0.1666in" fo:line-height="150%"/>
      <style:text-properties style:font-name="Times New Roman" style:font-name-complex="Times New Roman"/>
    </style:style>
    <style:style style:name="P245" style:parent-style-name="Normal" style:family="paragraph">
      <style:paragraph-properties fo:text-align="justify" fo:margin-top="0.1666in" fo:line-height="150%"/>
      <style:text-properties style:font-name="Times New Roman" style:font-name-complex="Times New Roman"/>
    </style:style>
    <style:style style:name="P246" style:parent-style-name="Normal" style:family="paragraph">
      <style:paragraph-properties fo:text-align="justify" fo:margin-top="0.1666in" fo:line-height="150%"/>
      <style:text-properties style:font-name="Times New Roman" style:font-name-complex="Times New Roman"/>
    </style:style>
    <style:style style:name="P247" style:parent-style-name="Normal" style:family="paragraph">
      <style:paragraph-properties fo:text-align="justify" fo:margin-top="0.1666in" fo:line-height="150%"/>
      <style:text-properties style:font-name="Times New Roman" style:font-name-complex="Times New Roman"/>
    </style:style>
    <style:style style:name="P248" style:parent-style-name="Normal" style:family="paragraph">
      <style:paragraph-properties fo:text-align="justify" fo:margin-top="0.1666in" fo:line-height="150%"/>
      <style:text-properties style:font-name="Times New Roman" style:font-name-complex="Times New Roman"/>
    </style:style>
    <style:style style:name="P249" style:parent-style-name="Normal" style:family="paragraph">
      <style:paragraph-properties fo:text-align="justify" fo:margin-top="0.1666in" fo:line-height="150%"/>
      <style:text-properties style:font-name="Times New Roman" style:font-name-complex="Times New Roman"/>
    </style:style>
    <style:style style:name="P250" style:parent-style-name="Normal" style:family="paragraph">
      <style:paragraph-properties fo:text-align="justify" fo:margin-top="0.1666in" fo:line-height="150%"/>
      <style:text-properties style:font-name="Times New Roman" style:font-name-complex="Times New Roman"/>
    </style:style>
    <style:style style:name="P251" style:parent-style-name="Normal" style:family="paragraph">
      <style:paragraph-properties fo:text-align="justify" fo:margin-top="0.1666in" fo:line-height="150%"/>
      <style:text-properties style:font-name="Times New Roman" style:font-name-complex="Times New Roman"/>
    </style:style>
    <style:style style:name="P252" style:parent-style-name="Normal" style:family="paragraph">
      <style:paragraph-properties fo:text-align="justify" fo:margin-top="0.1666in" fo:line-height="150%"/>
      <style:text-properties style:font-name="Times New Roman" style:font-name-complex="Times New Roman"/>
    </style:style>
    <style:style style:name="P253" style:parent-style-name="Normal" style:family="paragraph">
      <style:paragraph-properties fo:text-align="justify" fo:margin-top="0.1666in" fo:line-height="150%"/>
      <style:text-properties style:font-name="Times New Roman" style:font-name-complex="Times New Roman"/>
    </style:style>
    <style:style style:name="P254" style:parent-style-name="Normal" style:family="paragraph">
      <style:paragraph-properties fo:text-align="justify" fo:margin-top="0.1666in" fo:line-height="150%"/>
      <style:text-properties style:font-name="Times New Roman" style:font-name-complex="Times New Roman"/>
    </style:style>
    <style:style style:name="P255" style:parent-style-name="Normal" style:family="paragraph">
      <style:paragraph-properties fo:text-align="justify" fo:margin-top="0.1666in" fo:line-height="150%"/>
      <style:text-properties style:font-name="Times New Roman" style:font-name-complex="Times New Roman"/>
    </style:style>
    <style:style style:name="P256" style:parent-style-name="Normal" style:family="paragraph">
      <style:paragraph-properties fo:text-align="justify" fo:margin-top="0.1666in" fo:line-height="150%"/>
      <style:text-properties style:font-name="Times New Roman" style:font-name-complex="Times New Roman"/>
    </style:style>
    <style:style style:name="P257" style:parent-style-name="Normal" style:family="paragraph">
      <style:paragraph-properties fo:text-align="justify" fo:margin-top="0.1666in" fo:line-height="150%"/>
      <style:text-properties style:font-name="Times New Roman" style:font-name-complex="Times New Roman"/>
    </style:style>
    <style:style style:name="P258" style:parent-style-name="Normal" style:family="paragraph">
      <style:paragraph-properties fo:text-align="justify" fo:margin-top="0.1666in" fo:line-height="150%"/>
      <style:text-properties style:font-name="Times New Roman" style:font-name-complex="Times New Roman"/>
    </style:style>
    <style:style style:name="P259" style:parent-style-name="Normal" style:family="paragraph">
      <style:paragraph-properties fo:text-align="justify" fo:margin-top="0.1666in" fo:line-height="150%"/>
      <style:text-properties style:font-name="Times New Roman" style:font-name-complex="Times New Roman"/>
    </style:style>
    <style:style style:name="P260" style:parent-style-name="Normal" style:family="paragraph">
      <style:paragraph-properties fo:text-align="justify" fo:margin-top="0.1666in" fo:line-height="150%"/>
      <style:text-properties style:font-name="Times New Roman" style:font-name-complex="Times New Roman"/>
    </style:style>
    <style:style style:name="P261" style:parent-style-name="Normal" style:family="paragraph">
      <style:paragraph-properties fo:text-align="justify" fo:margin-top="0.1666in" fo:line-height="150%"/>
    </style:style>
    <style:style style:name="T262" style:parent-style-name="DefaultParagraphFont" style:family="text">
      <style:text-properties style:font-name="Times New Roman" style:font-name-complex="Times New Roman" fo:font-style="italic" style:font-style-asian="italic" style:font-style-complex="italic"/>
    </style:style>
    <style:style style:name="T263" style:parent-style-name="DefaultParagraphFont" style:family="text">
      <style:text-properties style:font-name="Times New Roman" style:font-name-complex="Times New Roman"/>
    </style:style>
    <style:style style:name="P264" style:parent-style-name="Normal" style:family="paragraph">
      <style:paragraph-properties fo:text-align="justify" fo:margin-top="0.1666in" fo:line-height="150%"/>
      <style:text-properties style:font-name="Times New Roman" style:font-name-complex="Times New Roman"/>
    </style:style>
    <style:style style:name="P265" style:parent-style-name="Normal" style:family="paragraph">
      <style:paragraph-properties fo:text-align="justify" fo:margin-top="0.1666in" fo:line-height="150%"/>
      <style:text-properties style:font-name="Times New Roman" style:font-name-complex="Times New Roman"/>
    </style:style>
    <style:style style:name="P266" style:parent-style-name="Normal" style:family="paragraph">
      <style:paragraph-properties fo:text-align="justify" fo:margin-top="0.1666in" fo:line-height="150%"/>
    </style:style>
    <style:style style:name="T267" style:parent-style-name="DefaultParagraphFont" style:family="text">
      <style:text-properties style:font-name="Times New Roman" style:font-name-complex="Times New Roman" fo:font-style="italic" style:font-style-asian="italic" style:font-style-complex="italic"/>
    </style:style>
    <style:style style:name="T268" style:parent-style-name="DefaultParagraphFont" style:family="text">
      <style:text-properties style:font-name="Times New Roman" style:font-name-complex="Times New Roman"/>
    </style:style>
    <style:style style:name="P269" style:parent-style-name="Normal" style:family="paragraph">
      <style:paragraph-properties fo:text-align="justify" fo:margin-top="0.1666in" fo:line-height="150%"/>
      <style:text-properties style:font-name="Times New Roman" style:font-name-complex="Times New Roman"/>
    </style:style>
    <style:style style:name="P270" style:parent-style-name="Normal" style:family="paragraph">
      <style:paragraph-properties fo:text-align="justify" fo:margin-top="0.1666in" fo:line-height="150%"/>
      <style:text-properties style:font-name="Times New Roman" style:font-name-complex="Times New Roman"/>
    </style:style>
    <style:style style:name="P271" style:parent-style-name="Normal" style:family="paragraph">
      <style:paragraph-properties fo:text-align="justify" fo:margin-top="0.1666in" fo:line-height="150%"/>
      <style:text-properties style:font-name="Times New Roman" style:font-name-complex="Times New Roman"/>
    </style:style>
    <style:style style:name="P272" style:parent-style-name="Normal" style:family="paragraph">
      <style:paragraph-properties fo:text-align="justify" fo:margin-top="0.1666in" fo:line-height="150%"/>
      <style:text-properties style:font-name="Times New Roman" style:font-name-complex="Times New Roman"/>
    </style:style>
    <style:style style:name="P273" style:parent-style-name="Normal" style:family="paragraph">
      <style:paragraph-properties fo:text-align="justify" fo:margin-top="0.1666in" fo:line-height="150%"/>
      <style:text-properties style:font-name="Times New Roman" style:font-name-complex="Times New Roman"/>
    </style:style>
    <style:style style:name="P274" style:parent-style-name="Normal" style:family="paragraph">
      <style:paragraph-properties fo:text-align="justify" fo:margin-top="0.1666in" fo:line-height="150%"/>
      <style:text-properties style:font-name="Times New Roman" style:font-name-complex="Times New Roman"/>
    </style:style>
    <style:style style:name="P275" style:parent-style-name="Normal" style:family="paragraph">
      <style:paragraph-properties fo:text-align="justify" fo:margin-top="0.1666in" fo:line-height="150%"/>
      <style:text-properties style:font-name="Times New Roman" style:font-name-complex="Times New Roman"/>
    </style:style>
    <style:style style:name="P276"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77"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78"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79"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80"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81"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style:text-position="super 66.6%"/>
    </style:style>
    <style:style style:name="T284" style:parent-style-name="DefaultParagraphFont" style:family="text">
      <style:text-properties style:font-name="Times New Roman" style:font-name-complex="Times New Roman"/>
    </style:style>
    <style:style style:name="P285" style:parent-style-name="Normal" style:family="paragraph">
      <style:paragraph-properties fo:border-top="none" fo:border-left="none" fo:border-bottom="0.0104in solid #000000" fo:border-right="none" fo:padding-top="0in" fo:padding-left="0in" fo:padding-bottom="0.0138in" fo:padding-right="0in" style:shadow="none" fo:text-align="justify" fo:margin-top="0.1666in" fo:line-height="150%"/>
      <style:text-properties style:font-name="Times New Roman" style:font-name-complex="Times New Roman"/>
    </style:style>
    <style:style style:name="P286" style:parent-style-name="Normal" style:family="paragraph">
      <style:paragraph-properties fo:text-align="justify" fo:margin-top="0.1666in" fo:line-height="150%"/>
      <style:text-properties style:font-name="Times New Roman" style:font-name-complex="Times New Roman"/>
    </style:style>
    <style:style style:name="P287" style:parent-style-name="Normal" style:family="paragraph">
      <style:paragraph-properties fo:text-align="justify" fo:margin-top="0.1666in" fo:line-height="150%"/>
      <style:text-properties style:font-name="Times New Roman" style:font-name-complex="Times New Roman"/>
    </style:style>
    <style:style style:name="P288"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289" style:parent-style-name="Normal" style:family="paragraph">
      <style:paragraph-properties fo:text-align="justify" fo:margin-top="0.1666in" fo:line-height="150%"/>
      <style:text-properties style:font-name="Times New Roman" style:font-name-complex="Times New Roman"/>
    </style:style>
    <style:style style:name="P290" style:parent-style-name="Normal" style:family="paragraph">
      <style:paragraph-properties fo:text-align="justify" fo:margin-top="0.1666in" fo:line-height="150%"/>
      <style:text-properties style:font-name="Times New Roman" style:font-name-complex="Times New Roman"/>
    </style:style>
    <style:style style:name="P291" style:parent-style-name="Normal" style:family="paragraph">
      <style:paragraph-properties fo:text-align="justify" fo:margin-top="0.1666in" fo:line-height="150%"/>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fo:font-style="italic" style:font-style-asian="italic" style:font-style-complex="italic"/>
    </style:style>
    <style:style style:name="T294" style:parent-style-name="DefaultParagraphFont" style:family="text">
      <style:text-properties style:font-name="Times New Roman" style:font-name-complex="Times New Roman"/>
    </style:style>
    <style:style style:name="P295" style:parent-style-name="Normal" style:family="paragraph">
      <style:paragraph-properties fo:text-align="justify" fo:margin-top="0.1666in" fo:line-height="150%"/>
      <style:text-properties style:font-name="Times New Roman" style:font-name-complex="Times New Roman"/>
    </style:style>
    <style:style style:name="P296" style:parent-style-name="Normal" style:family="paragraph">
      <style:paragraph-properties fo:text-align="justify" fo:margin-top="0.1666in" fo:line-height="150%"/>
      <style:text-properties style:font-name="Times New Roman" style:font-name-complex="Times New Roman"/>
    </style:style>
    <style:style style:name="P297" style:parent-style-name="Normal" style:family="paragraph">
      <style:paragraph-properties fo:text-align="justify" fo:margin-top="0.1666in" fo:line-height="150%"/>
      <style:text-properties style:font-name="Times New Roman" style:font-name-complex="Times New Roman"/>
    </style:style>
    <style:style style:name="P298" style:parent-style-name="Normal" style:family="paragraph">
      <style:paragraph-properties fo:text-align="justify" fo:margin-top="0.1666in" fo:line-height="150%"/>
      <style:text-properties style:font-name="Times New Roman" style:font-name-complex="Times New Roman"/>
    </style:style>
    <style:style style:name="P299" style:parent-style-name="Normal" style:family="paragraph">
      <style:paragraph-properties fo:text-align="justify" fo:margin-top="0.1666in" fo:line-height="150%"/>
      <style:text-properties style:font-name="Times New Roman" style:font-name-complex="Times New Roman"/>
    </style:style>
    <style:style style:name="P300"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301" style:parent-style-name="Normal" style:family="paragraph">
      <style:paragraph-properties fo:text-align="justify" fo:margin-top="0.1666in" fo:line-height="150%"/>
      <style:text-properties style:font-name="Times New Roman" style:font-name-complex="Times New Roman"/>
    </style:style>
    <style:style style:name="P302" style:parent-style-name="Normal" style:family="paragraph">
      <style:paragraph-properties fo:text-align="justify" fo:margin-top="0.1666in" fo:line-height="150%"/>
      <style:text-properties style:font-name="Times New Roman" style:font-name-complex="Times New Roman"/>
    </style:style>
    <style:style style:name="P303" style:parent-style-name="Normal" style:family="paragraph">
      <style:paragraph-properties fo:text-align="justify" fo:margin-top="0.1666in" fo:line-height="150%"/>
      <style:text-properties style:font-name="Times New Roman" style:font-name-complex="Times New Roman"/>
    </style:style>
    <style:style style:name="P304" style:parent-style-name="Normal" style:family="paragraph">
      <style:paragraph-properties fo:text-align="justify" fo:margin-top="0.1666in" fo:line-height="150%"/>
      <style:text-properties style:font-name="Times New Roman" style:font-name-complex="Times New Roman"/>
    </style:style>
    <style:style style:name="P305" style:parent-style-name="Normal" style:family="paragraph">
      <style:paragraph-properties fo:text-align="justify" fo:margin-top="0.1666in" fo:line-height="150%"/>
      <style:text-properties style:font-name="Times New Roman" style:font-name-complex="Times New Roman"/>
    </style:style>
    <style:style style:name="P306" style:parent-style-name="Normal" style:family="paragraph">
      <style:paragraph-properties fo:text-align="justify" fo:margin-top="0.1666in" fo:line-height="150%"/>
      <style:text-properties style:font-name="Times New Roman" style:font-name-complex="Times New Roman"/>
    </style:style>
    <style:style style:name="P307" style:parent-style-name="Normal" style:family="paragraph">
      <style:paragraph-properties fo:text-align="justify" fo:margin-top="0.1666in" fo:line-height="150%"/>
      <style:text-properties style:font-name="Times New Roman" style:font-name-complex="Times New Roman"/>
    </style:style>
    <style:style style:name="P308" style:parent-style-name="Normal" style:family="paragraph">
      <style:paragraph-properties fo:text-align="justify" fo:margin-top="0.1666in" fo:line-height="150%"/>
      <style:text-properties style:font-name="Times New Roman" style:font-name-complex="Times New Roman"/>
    </style:style>
    <style:style style:name="P309" style:parent-style-name="Normal" style:family="paragraph">
      <style:paragraph-properties fo:text-align="justify" fo:margin-top="0.1666in" fo:line-height="150%"/>
      <style:text-properties style:font-name="Times New Roman" style:font-name-complex="Times New Roman"/>
    </style:style>
    <style:style style:name="P310" style:parent-style-name="Normal" style:family="paragraph">
      <style:paragraph-properties fo:text-align="justify" fo:margin-top="0.1666in" fo:line-height="150%"/>
      <style:text-properties style:font-name="Times New Roman" style:font-name-complex="Times New Roman"/>
    </style:style>
    <style:style style:name="P311" style:parent-style-name="Normal" style:family="paragraph">
      <style:paragraph-properties fo:text-align="justify" fo:margin-top="0.1666in" fo:line-height="150%"/>
      <style:text-properties style:font-name="Times New Roman" style:font-name-complex="Times New Roman"/>
    </style:style>
    <style:style style:name="P312" style:parent-style-name="Normal" style:family="paragraph">
      <style:paragraph-properties fo:text-align="justify" fo:margin-top="0.1666in" fo:line-height="150%"/>
      <style:text-properties style:font-name="Times New Roman" style:font-name-complex="Times New Roman"/>
    </style:style>
    <style:style style:name="P313" style:parent-style-name="Normal" style:family="paragraph">
      <style:paragraph-properties fo:text-align="justify" fo:margin-top="0.1666in" fo:line-height="150%"/>
      <style:text-properties style:font-name="Times New Roman" style:font-name-complex="Times New Roman"/>
    </style:style>
    <style:style style:name="P314" style:parent-style-name="Normal" style:family="paragraph">
      <style:paragraph-properties fo:text-align="justify" fo:margin-top="0.1666in" fo:line-height="150%"/>
      <style:text-properties style:font-name="Times New Roman" style:font-name-complex="Times New Roman"/>
    </style:style>
    <style:style style:name="P315" style:parent-style-name="Normal" style:family="paragraph">
      <style:paragraph-properties fo:text-align="justify" fo:margin-top="0.1666in" fo:line-height="150%"/>
      <style:text-properties style:font-name="Times New Roman" style:font-name-complex="Times New Roman"/>
    </style:style>
    <style:style style:name="P316" style:parent-style-name="Normal" style:family="paragraph">
      <style:paragraph-properties fo:text-align="justify" fo:margin-top="0.1666in" fo:line-height="150%"/>
      <style:text-properties style:font-name="Times New Roman" style:font-name-complex="Times New Roman"/>
    </style:style>
    <style:style style:name="P317" style:parent-style-name="Normal" style:family="paragraph">
      <style:paragraph-properties fo:text-align="justify" fo:margin-top="0.1666in" fo:line-height="150%"/>
      <style:text-properties style:font-name="Times New Roman" style:font-name-complex="Times New Roman"/>
    </style:style>
    <style:style style:name="P318" style:parent-style-name="Normal" style:family="paragraph">
      <style:paragraph-properties fo:text-align="justify" fo:margin-top="0.1666in" fo:line-height="150%"/>
      <style:text-properties style:font-name="Times New Roman" style:font-name-complex="Times New Roman"/>
    </style:style>
    <style:style style:name="P319" style:parent-style-name="Normal" style:family="paragraph">
      <style:paragraph-properties fo:text-align="justify" fo:margin-top="0.1666in" fo:line-height="150%"/>
      <style:text-properties style:font-name="Times New Roman" style:font-name-complex="Times New Roman"/>
    </style:style>
    <style:style style:name="P320" style:parent-style-name="Normal" style:family="paragraph">
      <style:paragraph-properties fo:text-align="justify" fo:margin-top="0.1666in" fo:line-height="150%"/>
      <style:text-properties style:font-name="Times New Roman" style:font-name-complex="Times New Roman"/>
    </style:style>
    <style:style style:name="P321" style:parent-style-name="Normal" style:family="paragraph">
      <style:paragraph-properties fo:text-align="justify" fo:margin-top="0.1666in" fo:line-height="150%"/>
      <style:text-properties style:font-name="Times New Roman" style:font-name-complex="Times New Roman"/>
    </style:style>
    <style:style style:name="P322"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323" style:parent-style-name="Normal" style:family="paragraph">
      <style:paragraph-properties fo:text-align="justify" fo:margin-top="0.1666in" fo:line-height="150%"/>
      <style:text-properties style:font-name="Times New Roman" style:font-name-complex="Times New Roman"/>
    </style:style>
    <style:style style:name="P324" style:parent-style-name="Normal" style:family="paragraph">
      <style:paragraph-properties fo:text-align="justify" fo:margin-top="0.1666in" fo:line-height="150%"/>
      <style:text-properties style:font-name="Times New Roman" style:font-name-complex="Times New Roman"/>
    </style:style>
    <style:style style:name="P325" style:parent-style-name="Normal" style:family="paragraph">
      <style:paragraph-properties fo:text-align="justify" fo:margin-top="0.1666in" fo:line-height="150%"/>
      <style:text-properties style:font-name="Times New Roman" style:font-name-complex="Times New Roman"/>
    </style:style>
    <style:style style:name="P326" style:parent-style-name="Normal" style:family="paragraph">
      <style:paragraph-properties fo:text-align="justify" fo:margin-top="0.1666in" fo:line-height="150%"/>
      <style:text-properties style:font-name="Times New Roman" style:font-name-complex="Times New Roman"/>
    </style:style>
    <style:style style:name="P327" style:parent-style-name="Normal" style:family="paragraph">
      <style:paragraph-properties fo:text-align="justify" fo:margin-top="0.1666in" fo:line-height="150%"/>
      <style:text-properties style:font-name="Times New Roman" style:font-name-complex="Times New Roman"/>
    </style:style>
    <style:style style:name="P328" style:parent-style-name="Normal" style:family="paragraph">
      <style:paragraph-properties fo:text-align="justify" fo:margin-top="0.1666in" fo:line-height="150%"/>
      <style:text-properties style:font-name="Times New Roman" style:font-name-complex="Times New Roman"/>
    </style:style>
    <style:style style:name="P329" style:parent-style-name="Normal" style:family="paragraph">
      <style:paragraph-properties fo:text-align="justify" fo:margin-top="0.1666in" fo:line-height="150%"/>
    </style:style>
    <style:style style:name="T330" style:parent-style-name="DefaultParagraphFont" style:family="text">
      <style:text-properties style:font-name="Times New Roman" style:font-name-complex="Times New Roman"/>
    </style:style>
    <style:style style:name="T331" style:parent-style-name="DefaultParagraphFont" style:family="text">
      <style:text-properties style:font-name="Times New Roman" style:font-name-complex="Times New Roman" fo:font-style="italic" style:font-style-asian="italic" style:font-style-complex="italic"/>
    </style:style>
    <style:style style:name="T332" style:parent-style-name="DefaultParagraphFont" style:family="text">
      <style:text-properties style:font-name="Times New Roman" style:font-name-complex="Times New Roman"/>
    </style:style>
    <style:style style:name="P333" style:parent-style-name="Normal" style:family="paragraph">
      <style:paragraph-properties fo:text-align="justify" fo:margin-top="0.1666in" fo:line-height="150%"/>
      <style:text-properties style:font-name="Times New Roman" style:font-name-complex="Times New Roman"/>
    </style:style>
    <style:style style:name="P334" style:parent-style-name="Normal" style:family="paragraph">
      <style:paragraph-properties fo:text-align="justify" fo:margin-top="0.1666in" fo:line-height="150%"/>
      <style:text-properties style:font-name="Times New Roman" style:font-name-complex="Times New Roman"/>
    </style:style>
    <style:style style:name="P335" style:parent-style-name="Normal" style:family="paragraph">
      <style:paragraph-properties fo:text-align="justify" fo:margin-top="0.1666in" fo:line-height="150%"/>
      <style:text-properties style:font-name="Times New Roman" style:font-name-complex="Times New Roman"/>
    </style:style>
    <style:style style:name="P336" style:parent-style-name="Normal" style:family="paragraph">
      <style:paragraph-properties fo:text-align="justify" fo:margin-top="0.1666in" fo:line-height="150%"/>
      <style:text-properties style:font-name="Times New Roman" style:font-name-complex="Times New Roman"/>
    </style:style>
    <style:style style:name="P337" style:parent-style-name="Normal" style:family="paragraph">
      <style:paragraph-properties fo:text-align="justify" fo:margin-top="0.1666in" fo:line-height="150%"/>
      <style:text-properties style:font-name="Times New Roman" style:font-name-complex="Times New Roman"/>
    </style:style>
    <style:style style:name="P338" style:parent-style-name="Normal" style:family="paragraph">
      <style:paragraph-properties fo:text-align="justify" fo:margin-top="0.1666in" fo:line-height="150%"/>
      <style:text-properties style:font-name="Times New Roman" style:font-name-complex="Times New Roman"/>
    </style:style>
    <style:style style:name="P339" style:parent-style-name="Normal" style:family="paragraph">
      <style:paragraph-properties fo:text-align="justify" fo:margin-top="0.1666in" fo:line-height="150%"/>
      <style:text-properties style:font-name="Times New Roman" style:font-name-complex="Times New Roman"/>
    </style:style>
    <style:style style:name="P340" style:parent-style-name="Normal" style:family="paragraph">
      <style:paragraph-properties fo:text-align="justify" fo:margin-top="0.1666in" fo:line-height="150%"/>
      <style:text-properties style:font-name="Times New Roman" style:font-name-complex="Times New Roman"/>
    </style:style>
    <style:style style:name="P341" style:parent-style-name="Normal" style:family="paragraph">
      <style:paragraph-properties fo:text-align="justify" fo:margin-top="0.1666in" fo:line-height="150%"/>
      <style:text-properties style:font-name="Times New Roman" style:font-name-complex="Times New Roman"/>
    </style:style>
    <style:style style:name="P342" style:parent-style-name="Normal" style:family="paragraph">
      <style:paragraph-properties fo:text-align="justify" fo:margin-top="0.1666in" fo:line-height="150%"/>
      <style:text-properties style:font-name="Times New Roman" style:font-name-complex="Times New Roman"/>
    </style:style>
    <style:style style:name="P343" style:parent-style-name="Normal" style:family="paragraph">
      <style:paragraph-properties fo:text-align="justify" fo:margin-top="0.1666in" fo:line-height="150%"/>
      <style:text-properties style:font-name="Times New Roman" style:font-name-complex="Times New Roman"/>
    </style:style>
    <style:style style:name="P344" style:parent-style-name="Normal" style:family="paragraph">
      <style:paragraph-properties fo:text-align="justify" fo:margin-top="0.1666in" fo:line-height="150%"/>
      <style:text-properties style:font-name="Times New Roman" style:font-name-complex="Times New Roman"/>
    </style:style>
    <style:style style:name="P345" style:parent-style-name="Normal" style:family="paragraph">
      <style:paragraph-properties fo:text-align="justify" fo:margin-top="0.1666in" fo:line-height="150%"/>
      <style:text-properties style:font-name="Times New Roman" style:font-name-complex="Times New Roman"/>
    </style:style>
    <style:style style:name="P346" style:parent-style-name="Normal" style:family="paragraph">
      <style:paragraph-properties fo:text-align="justify" fo:margin-top="0.1666in" fo:line-height="150%"/>
      <style:text-properties style:font-name="Times New Roman" style:font-name-complex="Times New Roman"/>
    </style:style>
    <style:style style:name="P347" style:parent-style-name="Normal" style:family="paragraph">
      <style:paragraph-properties fo:text-align="justify" fo:margin-top="0.1666in" fo:line-height="150%"/>
      <style:text-properties style:font-name="Times New Roman" style:font-name-complex="Times New Roman"/>
    </style:style>
    <style:style style:name="P348" style:parent-style-name="Normal" style:family="paragraph">
      <style:paragraph-properties fo:text-align="justify" fo:margin-top="0.1666in" fo:line-height="150%"/>
      <style:text-properties style:font-name="Times New Roman" style:font-name-complex="Times New Roman"/>
    </style:style>
    <style:style style:name="P349" style:parent-style-name="Normal" style:family="paragraph">
      <style:paragraph-properties fo:text-align="justify" fo:margin-top="0.1666in" fo:line-height="150%"/>
      <style:text-properties style:font-name="Times New Roman" style:font-name-complex="Times New Roman"/>
    </style:style>
    <style:style style:name="P350" style:parent-style-name="Normal" style:family="paragraph">
      <style:paragraph-properties fo:text-align="justify" fo:margin-top="0.1666in" fo:line-height="150%"/>
      <style:text-properties style:font-name="Times New Roman" style:font-name-complex="Times New Roman"/>
    </style:style>
    <style:style style:name="P351" style:parent-style-name="Normal" style:family="paragraph">
      <style:paragraph-properties fo:text-align="justify" fo:margin-top="0.1666in" fo:line-height="150%"/>
      <style:text-properties style:font-name="Times New Roman" style:font-name-complex="Times New Roman"/>
    </style:style>
    <style:style style:name="P352" style:parent-style-name="Normal" style:family="paragraph">
      <style:paragraph-properties fo:text-align="justify" fo:margin-top="0.1666in" fo:line-height="150%"/>
      <style:text-properties style:font-name="Times New Roman" style:font-name-complex="Times New Roman"/>
    </style:style>
    <style:style style:name="P353" style:parent-style-name="Normal" style:family="paragraph">
      <style:paragraph-properties fo:text-align="justify" fo:margin-top="0.1666in" fo:line-height="150%"/>
      <style:text-properties style:font-name="Times New Roman" style:font-name-complex="Times New Roman"/>
    </style:style>
    <style:style style:name="P354" style:parent-style-name="Normal" style:family="paragraph">
      <style:paragraph-properties fo:text-align="justify" fo:margin-top="0.1666in" fo:line-height="150%"/>
      <style:text-properties style:font-name="Times New Roman" style:font-name-complex="Times New Roman"/>
    </style:style>
    <style:style style:name="P355" style:parent-style-name="Normal" style:family="paragraph">
      <style:paragraph-properties fo:text-align="justify" fo:margin-top="0.1666in" fo:line-height="150%"/>
      <style:text-properties style:font-name="Times New Roman" style:font-name-complex="Times New Roman"/>
    </style:style>
    <style:style style:name="P356" style:parent-style-name="Normal" style:family="paragraph">
      <style:paragraph-properties fo:text-align="justify" fo:margin-top="0.1666in" fo:line-height="150%"/>
      <style:text-properties style:font-name="Times New Roman" style:font-name-complex="Times New Roman"/>
    </style:style>
    <style:style style:name="P357" style:parent-style-name="Normal" style:family="paragraph">
      <style:paragraph-properties fo:text-align="justify" fo:margin-top="0.1666in" fo:line-height="150%"/>
      <style:text-properties style:font-name="Times New Roman" style:font-name-complex="Times New Roman"/>
    </style:style>
    <style:style style:name="P358" style:parent-style-name="Normal" style:family="paragraph">
      <style:paragraph-properties fo:text-align="justify" fo:margin-top="0.1666in" fo:line-height="150%"/>
      <style:text-properties style:font-name="Times New Roman" style:font-name-complex="Times New Roman"/>
    </style:style>
    <style:style style:name="P359" style:parent-style-name="Normal" style:family="paragraph">
      <style:paragraph-properties fo:text-align="justify" fo:margin-top="0.1666in" fo:line-height="150%"/>
      <style:text-properties style:font-name="Times New Roman" style:font-name-complex="Times New Roman"/>
    </style:style>
    <style:style style:name="P360" style:parent-style-name="Normal" style:family="paragraph">
      <style:paragraph-properties fo:text-align="justify" fo:margin-top="0.1666in" fo:line-height="150%"/>
      <style:text-properties style:font-name="Times New Roman" style:font-name-complex="Times New Roman"/>
    </style:style>
    <style:style style:name="P361" style:parent-style-name="Normal" style:family="paragraph">
      <style:paragraph-properties fo:text-align="justify" fo:margin-top="0.1666in" fo:line-height="150%"/>
      <style:text-properties style:font-name="Times New Roman" style:font-name-complex="Times New Roman"/>
    </style:style>
    <style:style style:name="P362" style:parent-style-name="Normal" style:family="paragraph">
      <style:paragraph-properties fo:text-align="justify" fo:margin-top="0.1666in" fo:line-height="150%"/>
      <style:text-properties style:font-name="Times New Roman" style:font-name-complex="Times New Roman"/>
    </style:style>
    <style:style style:name="P363" style:parent-style-name="Normal" style:family="paragraph">
      <style:paragraph-properties fo:text-align="justify" fo:margin-top="0.1666in" fo:line-height="150%"/>
      <style:text-properties style:font-name="Times New Roman" style:font-name-complex="Times New Roman"/>
    </style:style>
    <style:style style:name="P364" style:parent-style-name="Normal" style:family="paragraph">
      <style:paragraph-properties fo:text-align="justify" fo:margin-top="0.1666in" fo:line-height="150%"/>
      <style:text-properties style:font-name="Times New Roman" style:font-name-complex="Times New Roman"/>
    </style:style>
    <style:style style:name="P365" style:parent-style-name="Normal" style:family="paragraph">
      <style:paragraph-properties fo:text-align="justify" fo:margin-top="0.1666in" fo:line-height="150%"/>
      <style:text-properties style:font-name="Times New Roman" style:font-name-complex="Times New Roman"/>
    </style:style>
    <style:style style:name="P366" style:parent-style-name="Normal" style:family="paragraph">
      <style:paragraph-properties fo:text-align="justify" fo:margin-top="0.1666in" fo:line-height="150%"/>
      <style:text-properties style:font-name="Times New Roman" style:font-name-complex="Times New Roman"/>
    </style:style>
    <style:style style:name="P367" style:parent-style-name="Normal" style:family="paragraph">
      <style:paragraph-properties fo:text-align="justify" fo:margin-top="0.1666in" fo:line-height="150%"/>
      <style:text-properties style:font-name="Times New Roman" style:font-name-complex="Times New Roman"/>
    </style:style>
    <style:style style:name="P368" style:parent-style-name="Normal" style:family="paragraph">
      <style:paragraph-properties fo:text-align="justify" fo:margin-top="0.1666in" fo:line-height="150%"/>
      <style:text-properties style:font-name="Times New Roman" style:font-name-complex="Times New Roman"/>
    </style:style>
    <style:style style:name="P369" style:parent-style-name="Normal" style:family="paragraph">
      <style:paragraph-properties fo:text-align="justify" fo:margin-top="0.1666in" fo:line-height="150%"/>
      <style:text-properties style:font-name="Times New Roman" style:font-name-complex="Times New Roman"/>
    </style:style>
    <style:style style:name="P370" style:parent-style-name="Normal" style:family="paragraph">
      <style:paragraph-properties fo:text-align="justify" fo:margin-top="0.1666in" fo:line-height="150%"/>
      <style:text-properties style:font-name="Times New Roman" style:font-name-complex="Times New Roman"/>
    </style:style>
    <style:style style:name="P371" style:parent-style-name="Normal" style:family="paragraph">
      <style:paragraph-properties fo:text-align="justify" fo:margin-top="0.1666in" fo:line-height="150%"/>
      <style:text-properties style:font-name="Times New Roman" style:font-name-complex="Times New Roman"/>
    </style:style>
    <style:style style:name="P372" style:parent-style-name="Normal" style:family="paragraph">
      <style:paragraph-properties fo:text-align="justify" fo:margin-top="0.1666in" fo:line-height="150%"/>
      <style:text-properties style:font-name="Times New Roman" style:font-name-complex="Times New Roman"/>
    </style:style>
    <style:style style:name="P373" style:parent-style-name="Normal" style:family="paragraph">
      <style:paragraph-properties fo:text-align="justify" fo:margin-top="0.1666in" fo:line-height="150%"/>
      <style:text-properties style:font-name="Times New Roman" style:font-name-complex="Times New Roman" fo:font-style="italic" style:font-style-asian="italic" style:font-style-complex="italic"/>
    </style:style>
    <style:style style:name="P374" style:parent-style-name="Normal" style:family="paragraph">
      <style:paragraph-properties fo:text-align="justify" fo:margin-top="0.1666in" fo:line-height="150%"/>
      <style:text-properties style:font-name="Times New Roman" style:font-name-complex="Times New Roman"/>
    </style:style>
    <style:style style:name="P375" style:parent-style-name="Normal" style:family="paragraph">
      <style:paragraph-properties fo:text-align="justify" fo:margin-top="0.1666in" fo:line-height="150%"/>
      <style:text-properties style:font-name="Times New Roman" style:font-name-complex="Times New Roman"/>
    </style:style>
    <style:style style:name="P376" style:parent-style-name="Normal" style:family="paragraph">
      <style:paragraph-properties fo:text-align="justify" fo:margin-top="0.1666in" fo:line-height="150%"/>
      <style:text-properties style:font-name="Times New Roman" style:font-name-complex="Times New Roman"/>
    </style:style>
    <style:style style:name="P377" style:parent-style-name="Normal" style:family="paragraph">
      <style:paragraph-properties fo:text-align="justify" fo:margin-top="0.1666in" fo:line-height="150%"/>
      <style:text-properties style:font-name="Times New Roman" style:font-name-complex="Times New Roman"/>
    </style:style>
    <style:style style:name="P378" style:parent-style-name="Normal" style:family="paragraph">
      <style:paragraph-properties fo:text-align="justify" fo:margin-top="0.1666in" fo:line-height="150%"/>
      <style:text-properties style:font-name="Times New Roman" style:font-name-complex="Times New Roman"/>
    </style:style>
    <style:style style:name="P379" style:parent-style-name="Normal" style:family="paragraph">
      <style:paragraph-properties fo:text-align="justify" fo:margin-top="0.1666in" fo:line-height="150%"/>
      <style:text-properties style:font-name="Times New Roman" style:font-name-complex="Times New Roman"/>
    </style:style>
    <style:style style:name="P380" style:parent-style-name="Normal" style:family="paragraph">
      <style:paragraph-properties fo:text-align="justify" fo:margin-top="0.1666in" fo:line-height="150%"/>
      <style:text-properties style:font-name="Times New Roman" style:font-name-complex="Times New Roman"/>
    </style:style>
    <style:style style:name="P381" style:parent-style-name="Normal" style:family="paragraph">
      <style:paragraph-properties fo:text-align="justify" fo:margin-top="0.1666in" fo:line-height="150%"/>
      <style:text-properties style:font-name="Times New Roman" style:font-name-complex="Times New Roman"/>
    </style:style>
    <style:style style:name="P382" style:parent-style-name="Normal" style:family="paragraph">
      <style:paragraph-properties fo:text-align="justify" fo:margin-top="0.1666in" fo:line-height="150%"/>
      <style:text-properties style:font-name="Times New Roman" style:font-name-complex="Times New Roman"/>
    </style:style>
    <style:style style:name="P383" style:parent-style-name="Normal" style:family="paragraph">
      <style:paragraph-properties fo:text-align="justify" fo:margin-top="0.1666in" fo:line-height="150%"/>
      <style:text-properties style:font-name="Times New Roman" style:font-name-complex="Times New Roman"/>
    </style:style>
    <style:style style:name="P384" style:parent-style-name="Normal" style:family="paragraph">
      <style:paragraph-properties fo:text-align="justify" fo:margin-top="0.1666in" fo:line-height="150%"/>
      <style:text-properties style:font-name="Times New Roman" style:font-name-complex="Times New Roman"/>
    </style:style>
    <style:style style:name="P385" style:parent-style-name="Normal" style:family="paragraph">
      <style:paragraph-properties fo:text-align="justify" fo:margin-top="0.1666in" fo:line-height="150%"/>
      <style:text-properties style:font-name="Times New Roman" style:font-name-complex="Times New Roman"/>
    </style:style>
    <style:style style:name="P386" style:parent-style-name="Normal" style:family="paragraph">
      <style:paragraph-properties fo:text-align="justify" fo:margin-top="0.1666in" fo:line-height="150%"/>
      <style:text-properties style:font-name="Times New Roman" style:font-name-complex="Times New Roman"/>
    </style:style>
    <style:style style:name="P387" style:parent-style-name="Normal" style:family="paragraph">
      <style:paragraph-properties fo:text-align="justify" fo:margin-top="0.1666in" fo:line-height="150%"/>
      <style:text-properties style:font-name="Times New Roman" style:font-name-complex="Times New Roman"/>
    </style:style>
    <style:style style:name="P388" style:parent-style-name="Normal" style:family="paragraph">
      <style:paragraph-properties fo:text-align="justify" fo:margin-top="0.1666in" fo:line-height="150%"/>
      <style:text-properties style:font-name="Times New Roman" style:font-name-complex="Times New Roman"/>
    </style:style>
    <style:style style:name="P389" style:parent-style-name="Normal" style:family="paragraph">
      <style:paragraph-properties fo:text-align="justify" fo:margin-top="0.1666in" fo:line-height="150%"/>
      <style:text-properties style:font-name="Times New Roman" style:font-name-complex="Times New Roman"/>
    </style:style>
    <style:style style:name="P390" style:parent-style-name="Normal" style:family="paragraph">
      <style:paragraph-properties fo:text-align="justify" fo:margin-top="0.1666in" fo:line-height="150%"/>
      <style:text-properties style:font-name="Times New Roman" style:font-name-complex="Times New Roman"/>
    </style:style>
    <style:style style:name="P391" style:parent-style-name="Normal" style:family="paragraph">
      <style:paragraph-properties fo:text-align="justify" fo:margin-top="0.1666in" fo:line-height="150%"/>
      <style:text-properties style:font-name="Times New Roman" style:font-name-complex="Times New Roman"/>
    </style:style>
    <style:style style:name="P392" style:parent-style-name="Normal" style:family="paragraph">
      <style:paragraph-properties fo:text-align="justify" fo:margin-top="0.1666in" fo:line-height="150%"/>
      <style:text-properties style:font-name="Times New Roman" style:font-name-complex="Times New Roman"/>
    </style:style>
    <style:style style:name="P393" style:parent-style-name="Normal" style:family="paragraph">
      <style:paragraph-properties fo:text-align="justify" fo:margin-top="0.1666in" fo:line-height="150%"/>
      <style:text-properties style:font-name="Times New Roman" style:font-name-complex="Times New Roman"/>
    </style:style>
    <style:style style:name="P394" style:parent-style-name="Normal" style:family="paragraph">
      <style:paragraph-properties fo:text-align="justify" fo:margin-top="0.1666in" fo:line-height="150%"/>
      <style:text-properties style:font-name="Times New Roman" style:font-name-complex="Times New Roman"/>
    </style:style>
    <style:style style:name="P395" style:parent-style-name="Normal" style:family="paragraph">
      <style:paragraph-properties fo:text-align="justify" fo:margin-top="0.1666in" fo:line-height="150%"/>
      <style:text-properties style:font-name="Times New Roman" style:font-name-complex="Times New Roman"/>
    </style:style>
    <style:style style:name="P396" style:parent-style-name="Normal" style:family="paragraph">
      <style:paragraph-properties fo:text-align="justify" fo:margin-top="0.1666in" fo:line-height="150%"/>
      <style:text-properties style:font-name="Times New Roman" style:font-name-complex="Times New Roman"/>
    </style:style>
    <style:style style:name="P397" style:parent-style-name="Normal" style:family="paragraph">
      <style:paragraph-properties fo:text-align="justify" fo:margin-top="0.1666in" fo:line-height="150%"/>
      <style:text-properties style:font-name="Times New Roman" style:font-name-complex="Times New Roman"/>
    </style:style>
    <style:style style:name="P398" style:parent-style-name="Normal" style:family="paragraph">
      <style:paragraph-properties fo:text-align="justify" fo:margin-top="0.1666in" fo:line-height="150%"/>
      <style:text-properties style:font-name="Times New Roman" style:font-name-complex="Times New Roman"/>
    </style:style>
    <style:style style:name="P399" style:parent-style-name="Normal" style:family="paragraph">
      <style:paragraph-properties fo:text-align="justify" fo:margin-top="0.1666in" fo:line-height="150%"/>
      <style:text-properties style:font-name="Times New Roman" style:font-name-complex="Times New Roman"/>
    </style:style>
    <style:style style:name="P400" style:parent-style-name="Normal" style:family="paragraph">
      <style:paragraph-properties fo:text-align="justify" fo:margin-top="0.1666in" fo:line-height="150%"/>
      <style:text-properties style:font-name="Times New Roman" style:font-name-complex="Times New Roman"/>
    </style:style>
    <style:style style:name="P401" style:parent-style-name="Normal" style:family="paragraph">
      <style:paragraph-properties fo:text-align="justify" fo:margin-top="0.1666in" fo:line-height="150%"/>
      <style:text-properties style:font-name="Times New Roman" style:font-name-complex="Times New Roman"/>
    </style:style>
    <style:style style:name="P402" style:parent-style-name="Normal" style:family="paragraph">
      <style:paragraph-properties fo:text-align="justify" fo:margin-top="0.1666in" fo:line-height="150%"/>
      <style:text-properties style:font-name="Times New Roman" style:font-name-complex="Times New Roman"/>
    </style:style>
    <style:style style:name="P403" style:parent-style-name="Normal" style:family="paragraph">
      <style:paragraph-properties fo:text-align="justify" fo:margin-top="0.1666in" fo:line-height="150%"/>
      <style:text-properties style:font-name="Times New Roman" style:font-name-complex="Times New Roman"/>
    </style:style>
    <style:style style:name="P404" style:parent-style-name="Normal" style:family="paragraph">
      <style:paragraph-properties fo:text-align="justify" fo:margin-top="0.1666in" fo:line-height="150%"/>
      <style:text-properties style:font-name="Times New Roman" style:font-name-complex="Times New Roman"/>
    </style:style>
    <style:style style:name="P405" style:parent-style-name="Normal" style:family="paragraph">
      <style:paragraph-properties fo:text-align="justify" fo:margin-top="0.1666in" fo:line-height="150%"/>
      <style:text-properties style:font-name="Times New Roman" style:font-name-complex="Times New Roman"/>
    </style:style>
    <style:style style:name="P406" style:parent-style-name="Normal" style:family="paragraph">
      <style:paragraph-properties fo:text-align="justify" fo:margin-top="0.1666in" fo:line-height="150%"/>
      <style:text-properties style:font-name="Times New Roman" style:font-name-complex="Times New Roman"/>
    </style:style>
    <style:style style:name="P407" style:parent-style-name="Normal" style:family="paragraph">
      <style:paragraph-properties fo:text-align="justify" fo:margin-top="0.1666in" fo:line-height="150%"/>
      <style:text-properties style:font-name="Times New Roman" style:font-name-complex="Times New Roman"/>
    </style:style>
    <style:style style:name="P408" style:parent-style-name="Normal" style:family="paragraph">
      <style:paragraph-properties fo:text-align="justify" fo:margin-top="0.1666in" fo:line-height="150%"/>
      <style:text-properties style:font-name="Times New Roman" style:font-name-complex="Times New Roman"/>
    </style:style>
    <style:style style:name="P409" style:parent-style-name="Normal" style:family="paragraph">
      <style:paragraph-properties fo:text-align="justify" fo:margin-top="0.1666in" fo:line-height="150%"/>
      <style:text-properties style:font-name="Times New Roman" style:font-name-complex="Times New Roman"/>
    </style:style>
    <style:style style:name="P410" style:parent-style-name="Normal" style:family="paragraph">
      <style:paragraph-properties fo:text-align="justify" fo:margin-top="0.1666in" fo:line-height="150%"/>
      <style:text-properties style:font-name="Times New Roman" style:font-name-complex="Times New Roman"/>
    </style:style>
    <style:style style:name="P411" style:parent-style-name="Normal" style:family="paragraph">
      <style:paragraph-properties fo:text-align="justify" fo:margin-top="0.1666in" fo:line-height="150%"/>
      <style:text-properties style:font-name="Times New Roman" style:font-name-complex="Times New Roman"/>
    </style:style>
    <style:style style:name="P412" style:parent-style-name="Normal" style:family="paragraph">
      <style:paragraph-properties fo:text-align="justify" fo:margin-top="0.1666in" fo:line-height="150%"/>
      <style:text-properties style:font-name="Times New Roman" style:font-name-complex="Times New Roman"/>
    </style:style>
    <style:style style:name="P413" style:parent-style-name="Normal" style:family="paragraph">
      <style:paragraph-properties fo:text-align="justify" fo:margin-top="0.1666in" fo:line-height="150%"/>
      <style:text-properties style:font-name="Times New Roman" style:font-name-complex="Times New Roman"/>
    </style:style>
    <style:style style:name="P414" style:parent-style-name="Normal" style:family="paragraph">
      <style:paragraph-properties fo:text-align="justify" fo:margin-top="0.1666in" fo:line-height="150%"/>
      <style:text-properties style:font-name="Times New Roman" style:font-name-complex="Times New Roman"/>
    </style:style>
    <style:style style:name="P415" style:parent-style-name="Normal" style:family="paragraph">
      <style:paragraph-properties fo:text-align="justify" fo:margin-top="0.1666in" fo:line-height="150%"/>
      <style:text-properties style:font-name="Times New Roman" style:font-name-complex="Times New Roman"/>
    </style:style>
    <style:style style:name="P416" style:parent-style-name="Normal" style:family="paragraph">
      <style:paragraph-properties fo:text-align="justify" fo:margin-top="0.1666in" fo:line-height="150%"/>
      <style:text-properties style:font-name="Times New Roman" style:font-name-complex="Times New Roman"/>
    </style:style>
    <style:style style:name="P417" style:parent-style-name="Normal" style:family="paragraph">
      <style:paragraph-properties fo:text-align="justify" fo:margin-top="0.1666in" fo:line-height="150%"/>
      <style:text-properties style:font-name="Times New Roman" style:font-name-complex="Times New Roman"/>
    </style:style>
    <style:style style:name="P418" style:parent-style-name="Normal" style:family="paragraph">
      <style:paragraph-properties fo:text-align="justify" fo:margin-top="0.1666in" fo:line-height="150%"/>
      <style:text-properties style:font-name="Times New Roman" style:font-name-complex="Times New Roman"/>
    </style:style>
    <style:style style:name="P419" style:parent-style-name="Normal" style:family="paragraph">
      <style:paragraph-properties fo:text-align="justify" fo:margin-top="0.1666in" fo:line-height="150%"/>
      <style:text-properties style:font-name="Times New Roman" style:font-name-complex="Times New Roman"/>
    </style:style>
  </office:automatic-styles>
  <office:body>
    <office:text text:use-soft-page-breaks="true">
      <text:p text:style-name="P1">Ignorance should not be a crime, and I hate being imprisoned for it.</text:p>
      <text:p text:style-name="P2">How was I supposed to know it was illegal to enter other people’s dreams?</text:p>
      <text:p text:style-name="P3">“An attempt at the President’s life is a crime, Mr. Avarion,”, Inspector Tess looked up from her book for a second to comment, “from reality or otherwise.”</text:p>
      <text:p text:style-name="P4">She can hear me. These guys have someone who can Deep Dive. I guess the ban does not apply to the government.</text:p>
      <text:p text:style-name="P5">“Must you monitor me from within while I sleep, ma’am? At this rate I am going to wake up with terrible eyebags and a headache that outlives my head.”</text:p>
      <text:p text:style-name="P6">“What is privacy to a man who’s seen his last sunset?” She quoted,</text:p>
      <text:p text:style-name="P7">probably assuming I wouldn’t catch on.</text:p>
      <text:p text:style-name="P8">“If I say I too read Holker, would you let me go?”</text:p>
      <text:p text:style-name="P9">A smile went flat the moment it curved. I could’ve imagined it, but I’ll take my chances.</text:p>
      <text:p text:style-name="P10">It wouldn’t hurt to try and live another day.</text:p>
      <text:p text:style-name="P11">“Your wit is wasted on me. Do us both a favour and end this Dream. And go to sleep—proper, normal sleep,” she paused, “Let your last one be peaceful for once.” She said, shifting her attention back to the book.</text:p>
      <text:p text:style-name="P12">That last line was softer any that came before, almost compassionate.<text:s/><text:soft-page-break/>Maybe she would listen to reason.</text:p>
      <text:p text:style-name="P13">“I did not kill him, Inspector.” I looked into her eyes and asserted.</text:p>
      <text:p text:style-name="P14">“I know. You failed. That is why we are here now, aren’t we?”</text:p>
      <text:p text:style-name="P15">“No, no, what I meant is—It wasn’t me. I did not kill the body double either. And I was not going after the President’s life. You have the wrong guy. I’m innocent.”</text:p>
      <text:p text:style-name="P16">I could feel the air getting warmer. We were getting closer to morning; I was going to wake up soon. With the riots and the protests going on there would be no due process. I would not have a chance to plead my case back in reality.</text:p>
      <text:p text:style-name="P17">“So, you just waltzed into the President’s dream for sightseeing? Is that it?” She snapped her book shut and stared; eyebrows raised.</text:p>
      <text:p text:style-name="P18">Why does she have a book? I don’t know her enough for my subconscious to give her a custom attire or accessories.</text:p>
      <text:p text:style-name="P19">“I didn’t even know it was the President’s room. It was booked under that sugar factory owner’s name, Kaverson or something.”</text:p>
      <text:p text:style-name="P20">“Luke Kaverton. So, he was your mark?” She asked accusingly.</text:p>
      <text:p text:style-name="P21">“Yes—no—yes, I mean, not for murder. For information. It was not my intent to kill him. Heck, he was not even in the room, only the President was—”</text:p>
      <text:p text:style-name="P22">“You claim that you had no idea the President was in that room and yet,<text:s/><text:soft-page-break/>you were the only Dreamdiver in the hotel last night. A sloppy one it seems, given how easily we caught you.”<text:s/></text:p>
      <text:p text:style-name="P23">“A sugar factory owner can neither arrange for nor afford a Diveblocker. It was not a variable I bothered considering.” I rebutted.</text:p>
      <text:p text:style-name="P24">As far as I know, there were only thirty-nine Diveblockers in the entire world, and it took several generational fortunes to build one. Most were held by world leaders.</text:p>
      <text:p text:style-name="P25">Of course, I had no reason to expect said leaders to swap places with small time businessmen.</text:p>
      <text:p text:style-name="P26">“I’ll catch him for you.”</text:p>
      <text:p text:style-name="P27">“What?”</text:p>
      <text:p text:style-name="P28">“The real assassin. The one who killed Kaverton. If they’re a Dreamdiver, I should be able to track them down.”</text:p>
      <text:p text:style-name="P29">I could feel a cold breeze on my feet. The sheets these guys provided was not enough to cover my height.<text:s/></text:p>
      <text:p text:style-name="P30">Sensations of reality were starting to bleed in. I didn’t have much time.</text:p>
      <text:p text:style-name="P31">She stood up from her stool and placed her book into a holster on her waist. For a second she looked up and clasped her hands. Her head moved sidewards a couple of times and a moment later, she let out a sigh.</text:p>
      <text:p text:style-name="P32">I really wished I had full control of this Dream now.</text:p>
      <text:p text:style-name="P33">“Okay.” She stepped closer towards me and placed her thumb on my chin,<text:s/><text:soft-page-break/>slightly lifting it up, “Tomorrow, we’ll have a chat. I want to hear your plan for this, no funny business.”</text:p>
      <text:p text:style-name="P34">“Today, you mean. I will wake up momentarily. It’s best you leave now.” I suggested.</text:p>
      <text:p text:style-name="P35">“What!? It has not been—”</text:p>
      <text:p text:style-name="P36">“The eight-hour rule does not work for Sleeping Gas, ma’am” I smirked.</text:p>
      <text:p text:style-name="P37">“You were planning to—”</text:p>
      <text:p text:style-name="P38">And I woke up.<text:s/></text:p>
      <text:p text:style-name="P39">I expected this morning to be one filled with high adrenaline chases and a lot of subterfuge. If I exit the hotel somehow blending into the riots will render me virtually invisible.</text:p>
      <text:p text:style-name="P40">Regardless, now I had a much safer path. So long as I convinced the Inspector.</text:p>
      <text:p text:style-name="P41">I rolled out the bed and walked towards the window, yawning and squeezing my eyes. I pulled the curtains, wiped my eyes and blinked for a couple of seconds before taking in the view outside. The sun was well above the horizon.</text:p>
      <text:p text:style-name="P42">The city of Arkcorade was burning.</text:p>
      <text:p text:style-name="P43">Witnessing the riots from all the way out here felt very different from seeing it up close. Just yesterday I was down there on the streets, shoulder-to-shoulder with these people whose faces I cannot discern now. <text:s/><text:soft-page-break/>Back there, even amongst all that chaos there was a sense of individuality to every face I came across. There was passion and drive and most importantly pride.<text:tab/></text:p>
      <text:p text:style-name="P44">Our language! Our legacy! Our choice!</text:p>
      <text:p text:style-name="P45">I can still hear the chants ringing through my ears. It was around 9PM when I snuck in. Thirty-Six hours later the crowd has not moved an inch. I gazed upon the skyline, deeper into city. I could no longer see flames from here, just clouds of smoke—small and scattered. Most of the protests were concentrated outside the hotel now.</text:p>
      <text:p text:style-name="P46">And for the riots, either snuffed or silenced, probably through means I didn’t want to think about.</text:p>
      <text:p text:style-name="P47">But this place, this altitude, it does something. They looked like an army of ants, piling upon spilled confections. I could make out the placards and banners, white stretches of cloths and cardboards from here. Nonreadable though.</text:p>
      <text:p text:style-name="P48">I was only on the seventh floor and already felt disconnected from everything going on down there. The silence offered by the glass windows did not help either.</text:p>
      <text:p text:style-name="P49">The President was thirteen floors above me. No wonder the point never made it across.</text:p>
      <text:p text:style-name="P50"><text:span text:style-name="T51">Gral do foura?<text:s/></text:span><text:span text:style-name="T52"><text:s/>There was a knock on my door.</text:span></text:p>
      <text:p text:style-name="P53">I walked towards the door to open it. I was half-way through when the<text:s/><text:soft-page-break/>twisted and the door flung opened. A short, bearded man entered my room. He wore a black full suite. The badge he held out told me he was a CLAW agent.</text:p>
      <text:p text:style-name="P54">Tess would’ve been far better.</text:p>
      <text:p text:style-name="P55"><text:span text:style-name="T56">Gral do foura!?<text:s/></text:span><text:span text:style-name="T57">He repeated, this time harsher.</text:span></text:p>
      <text:p text:style-name="P58">“I don’t speak Radint.” I spoke. He let out a sigh and mumbled something under his breath, the tail end of which I was able to catch.</text:p>
      <text:p text:style-name="P59">Radint curses, as always, were uncreative.</text:p>
      <text:p text:style-name="P60">“I was supposed to take you to the basement this morning,” he said, stepping further into the room and making himself comfortable on the couch, “But for some reason, you’ve been summoned by Inspector Tess. Follow me.”</text:p>
      <text:p text:style-name="P61">“I just woke up. At least give me some time to—”</text:p>
      <text:p text:style-name="P62">“Ten Minutes for the restroom, I will wait here. Any longer and I’ll barge in.”</text:p>
      <text:p text:style-name="P63">As if you bothered waiting the first time.</text:p>
      <text:p text:style-name="P64">Fifteen minutes later we both were on the hotel corridors. He escorted me to the lift lobby and ensured I entered the lift first, all the while staring at me. He shifted his gaze away as the lift doors closed.</text:p>
      <text:p text:style-name="P65">I wondered what annoyed him more. The fact that I was a Dreamdiver or that I didn’t speak Radint.</text:p>
      <text:soft-page-break/>
      <text:p text:style-name="P66">Probably a combination of both.</text:p>
      <text:p text:style-name="P67">Even though it was just one floor above, the eighth floor had a completely different feel to it. The air felt heavier, and every other door had private security personnel guarding it.</text:p>
      <text:p text:style-name="P68">I chose the seventh floor exactly for this reason. That is where you found the safe kind of high-profile targets. The kind of people who haven’t yet made it into high society but almost there. They often have information that sells well, and the risk to reward ratio was quite balanced.</text:p>
      <text:p text:style-name="P69">You also were at a lesser risk of being pursued. The medium rich often refused to act just to preserve their dignity.</text:p>
      <text:p text:style-name="P70">Internally, Hotel Wingben was a labyrinth. Every floor had two wings, both identical, and the theme was the same everywhere, from flowerpots to wall murals—turquoise with gold accents. After a while I gave up trying to keep track of all the lefts and rights we took and just trusted the agent to lead.</text:p>
      <text:p text:style-name="P71">Soon we were at the backside of the hotel. It opened with an extended view of the cityscape across the corridor through a glass window. As we walked, I touched the glass and started tracing my finger along, shifting my view down.</text:p>
      <text:p text:style-name="P72">There were no protests on this side. The police had already set up barricades and patrol cars out back to ensure no one entered the premises. I could still catch small camps of people scattered across the several rooftops visible from here. Simple inaction or waiting perhaps. I wasn’t sure.</text:p>
      <text:soft-page-break/>
      <text:p text:style-name="P73">“Jobless people.” The agent broke the silence.</text:p>
      <text:p text:style-name="P74">“Excuse me?”</text:p>
      <text:p text:style-name="P75">“These protests,” he started, “Why do you people always have to go against the country’s interests? What is the problem in having one common language? It will make communication easy for all of us. Whenever the Central comes up with such developmental plans you State folks always—”</text:p>
      <text:p text:style-name="P76">“You and I don’t share a mother-tongue I’d reckon. Yet here we are conversing.”</text:p>
      <text:p text:style-name="P77">“So, you’d rather learn a language from a different dimension rather than one from our one?”</text:p>
      <text:p text:style-name="P78">“What I would rather do should be in my control, is what I am saying. It is what all these people are trying to say. If that rather opens access to interdimensional opportunities, then yes, I would rather that.”</text:p>
      <text:p text:style-name="P79">His brows twitched and raised at the same time. He opened his mouth to say something, but I quickly pointed straight ahead.</text:p>
      <text:p text:style-name="P80">Inspector Tess was waiting outside, a couple of doors away from us.</text:p>
      <text:p text:style-name="P81">They exchanged greetings quickly and soullessly, neither acknowledging each other’s presence more than necessary.</text:p>
      <text:p text:style-name="P82">“809”, the door card read. With a Do not Disturb card hanging on the handle.</text:p>
      <text:soft-page-break/>
      <text:p text:style-name="P83">The room was unusually small for Wingben’s standards. More cozy than fancy. And since it was internal facing there were no windows either, much to my dismay.</text:p>
      <text:p text:style-name="P84">Inside the room there were two other people.<text:s/></text:p>
      <text:p text:style-name="P85">One was a tall, skinny man with shoulder length hair slicked back. He donned round glasses, a thick moustache and wore a traditional Arkcoradian cloak, the collared version. The embroidery alone would’ve costed a small fortune. His gaze was continually fixed on me from the moment I entered.</text:p>
      <text:p text:style-name="P86">There was another woman enjoying her coffee sitting across the man. She wore a classic black business suite. A pair of sunglasses rested on her blonde hair, which was neatly tied into a bun.</text:p>
      <text:p text:style-name="P87">I wished I hadn’t recognized them. Strangers with familiar faces is one thing I actively avoid in my line of work.</text:p>
      <text:p text:style-name="P88">“Welcome, Inspector!” the man started, “I see we have our guest. Please, all of you, take a seat.” He gestured towards the single couches placed around the teapoy.<text:s/></text:p>
      <text:p text:style-name="P89">I moved to take the one closest to the door and Inspector Tess took the one across me. The agent rejected with a nod and chose to stand.</text:p>
      <text:p text:style-name="P90">“I suppose you are aware of the company you are with at the moment, Mr. Avarion?” The Inspector asked.</text:p>
      <text:p text:style-name="P91">“I’ve seen them on TV, I think?” I bit hard on my inner lip.</text:p>
      <text:soft-page-break/>
      <text:p text:style-name="P92">“That is Minister Colewind,” the man raised waved with a smile as Tess introduced him, “”<text:s/></text:p>
      <text:p text:style-name="P93">“And I am Farza. Pleasure.” The woman said gently, “Acting Director, CLAW.”</text:p>
      <text:p text:style-name="P94">A minister of the opposition and the Director of CLAW. I fished for my keys in my pocket and gave the fidget in my keychain a spin.</text:p>
      <text:p text:style-name="P95">Nope, not a dream.</text:p>
      <text:p text:style-name="P96">Whenever the State and the Central tried collaborating from the shadows, whatever that could’ve gone wrong, always went wrong.</text:p>
      <text:p text:style-name="P97">Except this time, seems like I am caught up in the mix.</text:p>
      <text:p text:style-name="P98">“Cyrus Avarion,” I paused, “Entrepreneur.”</text:p>
      <text:p text:style-name="P99">Inspector Tess shot me a glance with a raised eyebrow. She mouthed something that I couldn’t really make out.<text:s/></text:p>
      <text:p text:style-name="P100">Don’t? Don’t what?</text:p>
      <text:p text:style-name="P101">Technically though, I fit the definition.</text:p>
      <text:p text:style-name="P102">“Ahh, yes, I’ve heard that you like to jest often, marvellous.” Colewind leaned back giggling and slowly took his left hand into his cloak.</text:p>
      <text:p text:style-name="P103">“But you see, the thing about jesters is that you folks take nothing seriously,” he paused—hands still fishing inside his cloak, “until consequences become visible.”</text:p>
      <text:soft-page-break/>
      <text:p text:style-name="P104">His hands moved fast, I couldn’t really see what was pulled out until it was right in front of my face. All I could catch was a quick glimpse of the black metal, and the smell of sulphur reached my nose even before the barrel was visible. He had recently fired it. Slowly, he moved his arm down, aiming down between my legs.</text:p>
      <text:p text:style-name="P105">Don’t mess with this guy, affirmative.</text:p>
      <text:p text:style-name="P106">“Mr. Colewind,” Farza straightened and alternated her crossed legs, “No firearms within my chambers please. And I would appreciate if you refrained from toying with my lamb.”</text:p>
      <text:p text:style-name="P107">“He’s neither of your lamb. He is my suspect.” Tess interrupted, “Now how about we do away with the theatrics and get to business.”<text:s/></text:p>
      <text:p text:style-name="P108"><text:span text:style-name="T109">Business. So, they want something<text:s/></text:span><text:span text:style-name="T110">from me.</text:span></text:p>
      <text:p text:style-name="P111">But given the present company I don’t think the alternative is going to be any better.</text:p>
      <text:p text:style-name="P112">“What am I here for?” I broke my silence, “It doesn’t look like I’m in line to be executed.”</text:p>
      <text:p text:style-name="P113">“You say execution as if it was to be some kind of a formal punishment.” Farza looked me in the eye, “Given everything that is going on in this city now, what made you think so?”</text:p>
      <text:p text:style-name="P114">“It’s not like the State Government fell,” I turned my gaze towards Colewind, “I’ll repeat what I told to the Inspector. I can find you guys the assassin. I don’t want anything to do with your politics; all I ask is<text:s/><text:soft-page-break/>that you let me go.”</text:p>
      <text:p text:style-name="P115">But what if there is no assassin? Or worse what if it was someone from this room?</text:p>
      <text:p text:style-name="P116">“And how will you do that? Perform the Devil’s Dive? The President would never agree to it.” Farza responded, “It goes everything against what All of Hearts stands for.”</text:p>
      <text:p text:style-name="P117">“He doesn’t have to know.” Inspector Tess said.</text:p>
      <text:p text:style-name="P118">“Bold of you to insinuate treason in my presence, Inspector.”</text:p>
      <text:p text:style-name="P119">“It was but a suggestion, director. We will temporarily withhold the information, at least until the real culprit is caught. Nothing treacherous about that.”</text:p>
      <text:p text:style-name="P120">Wow, finally they’re admitting I am not the one.</text:p>
      <text:p text:style-name="P121">“And if he fails to catch him?” Colewind asked.</text:p>
      <text:p text:style-name="P122">“Then we let the lamb serve its purpose. Right, Inspector?”<text:s/></text:p>
      <text:p text:style-name="P123">Tess smiled.</text:p>
      <text:p text:style-name="P124">Perhaps I should just shut up and stop jinxing my luck.</text:p>
      <text:p text:style-name="P125">“We cannot let him dive alone.” Colewind said, “This is the President’s head we’re talking about. Too much sensitive information to trust with a common conman.”</text:p>
      <text:p text:style-name="P126">“Dreamdiving is not mindreading,” I started explaining, “Tell me, when<text:s/><text:soft-page-break/>was the last time you remembered a dream of yours?”</text:p>
      <text:p text:style-name="P127">Colewind thought hard for a few seconds. His eyes did a quick roll and lodged into the corner, before settling down. It was always hard to recall a dream, harder still for someone who hardly dreams.</text:p>
      <text:p text:style-name="P128">Such people often will comeback with something from their childhood.</text:p>
      <text:p text:style-name="P129">“When I was a boy, there was this dream once,” he started. “I was being chased by this flying rabbit.”</text:p>
      <text:p text:style-name="P130">Tess and Farza both laughed. Given my dreams though this would still be considered the most mundane of the least interesting ones. However, considering his occupation this was far more creative that anything I could’ve anticipated.</text:p>
      <text:p text:style-name="P131">“See, you had to think so hard to get one. Dreams are fragile and volatile. Think of a simple calculator for example. It doesn’t allow you to store much. Same goes with dreams.”</text:p>
      <text:p text:style-name="P132">“So, you cannot see his memories?” Tess questioned.</text:p>
      <text:p text:style-name="P133">Why is she asking me? Wasn’t she a Dreamdiver herself?</text:p>
      <text:p text:style-name="P134">The less they knew the better, and I do not want to make anything I say sound like common knowledge.<text:s/></text:p>
      <text:p text:style-name="P135">“Of the immediate past, maybe, depending on how long it had been and how much an impact a given event left on the tar—ahem—host. But you cannot get much more than that.”</text:p>
      <text:soft-page-break/>
      <text:p text:style-name="P136">At this point all three of them had their gazes fixed on me. Farza had forgotten her coffee and Colewind had leaned forward, dropping a tiny bit of his aloofness. Tess, for the first time, looked puzzled.</text:p>
      <text:p text:style-name="P137"><text:span text:style-name="T138">Never fix obliviousness.<text:s/></text:span><text:span text:style-name="T139">Dad always used to say.</text:span></text:p>
      <text:p text:style-name="P140">My odds of survival depended on me balancing their curiosity and desperation in the right ratio.</text:p>
      <text:p text:style-name="P141">“What makes you think you’ll catch the assassin then?” Farza questioned.</text:p>
      <text:p text:style-name="P142">“You better not be scheming something boy.” Colewind added, “You might not even have a city to hide in, soon.”</text:p>
      <text:p text:style-name="P143">Tess shot a glare at Colewind. He was about to say something but stopped.</text:p>
      <text:p text:style-name="P144">“Because it has not been too long since the attempt. His memory of it is recent enough, and such an event is persistent by nature. Best case, he relives the moment in his sleep, and worst, the killer will show up as an NPC.”</text:p>
      <text:p text:style-name="P145">“A what?” Farza asked.</text:p>
      <text:p text:style-name="P146">“A background character, he means.” Tess answered on my behalf.</text:p>
      <text:p text:style-name="P147">I wasn’t sure if that was from her knowledge of Video Games or Dreamdiving.</text:p>
      <text:p text:style-name="P148">“But how will we know which NPC is the culprit? The president meets a lot of people one a regular basis.” Colewind asked.</text:p>
      <text:p text:style-name="P149">“I cannot answer that without entering the President’s Dream at least<text:s/><text:soft-page-break/>once.”</text:p>
      <text:p text:style-name="P150">“Once? It will take multiple visits?” Farza face twitched into a frown. The other two were uninformed about Dreamdiving, perhaps a bit skeptical. But Farza, she seemed to loathe it.</text:p>
      <text:p text:style-name="P151">“Yes,” I continued, “I would need one night just to map out his Dream City, get a lay of the land. It will take another whole night to find what we need and at least one more attempt as buffer if anything goes wrong.”</text:p>
      <text:p text:style-name="P152">“So, three nights?” Tess asked.</text:p>
      <text:p text:style-name="P153">“Minimum.”</text:p>
      <text:p text:style-name="P154">“That is the maximum you will get. The President will leave Friday?” Farza responded.</text:p>
      <text:p text:style-name="P155">“Wait what!?” Colewind got up from his sofa, “He was supposed to meet on Saturday.”</text:p>
      <text:p text:style-name="P156">“The riots, Mr. Colewind. And now this assassination. It is not safe for him to be here any longer.”</text:p>
      <text:p text:style-name="P157">Colewind went quiet for a second, “Then we start tonight. The boy will have three days.” He turned to me, “What would you need?”</text:p>
      <text:p text:style-name="P158">“A place for me to sleep, fifteen meters away from the president.”</text:p>
      <text:p text:style-name="P159">“Too close.”</text:p>
      <text:p text:style-name="P160">“No way.”</text:p>
      <text:soft-page-break/>
      <text:p text:style-name="P161">“Impossible.”</text:p>
      <text:p text:style-name="P162">All three of them uttered in sync. There was a sense of familiarity in their refusal, as if they’ve asked for such proximity and failed. I dared not say it out loud though.</text:p>
      <text:p text:style-name="P163">“There is something called a Dreamradius. I need to be at a close enough range. Need not be strictly horizontal. A different floor will also work.”</text:p>
      <text:p text:style-name="P164">They trust my expertise although blind to the process, I need to capitalize on it as much as I can. Tess doesn’t seem to be all that experienced as a Dreamdiver. Based on her responses I am actually questioning if she is even one.</text:p>
      <text:p text:style-name="P165">But how else could she have entered my dream last night?</text:p>
      <text:p text:style-name="P166">At the very least she had the potential to dive.</text:p>
      <text:p text:style-name="P167">“Tess,” Farza started, “Your room is on the same wing as the President, right?”</text:p>
      <text:p text:style-name="P168">“Correct. Two floors down.”</text:p>
      <text:p text:style-name="P169">“Works?”</text:p>
      <text:p text:style-name="P170">“Perhaps” I replied.</text:p>
      <text:p text:style-name="P171">One look at their faces and I could tell. They did not care for my efficiency or convenience. It was about surveillance.</text:p>
      <text:p text:style-name="P172">Ideally, I would want to be above the President, altitude always made it easier to enter dreams. Given the circumstances, however, I was willing<text:s/><text:soft-page-break/>to enter a dream anyway possible. That was the only guaranteed way for me to get out of this unscathed.</text:p>
      <text:p text:style-name="P173"><text:span text:style-name="T174">The total amount of trust I had in these people summed up and squared was zero. The city is burning, the President is out of it, and there is no one here to hold them accountable. Sure, they will have to be a little considerate about the aftermath, but that<text:s/></text:span><text:span text:style-name="T175">little</text:span><text:span text:style-name="T176"><text:s/>can comfortably accommodate one more dead body, I’m sure.</text:span></text:p>
      <text:p text:style-name="P177">“Then let’s get to work, shall we?” Colewind stood up and pulled his cloak, tightening it, concealing his gun somewhere during the manoeuvre.</text:p>
      <text:p text:style-name="P178"><text:span text:style-name="T179">“</text:span><text:span text:style-name="T180">Shoufa da seie cray lima. Rike ban seie Tess.</text:span><text:span text:style-name="T181">” He instructed the agent.</text:span></text:p>
      <text:p text:style-name="P182">Even if I wanted to, sir, I can’t control the minds of people. And I expected him to have a bit more trust on the Inspector.</text:p>
      <text:p text:style-name="P183">“The wingless horse always flaunts its horns.” Tess quoted, upon hearing her name in Radint.</text:p>
      <text:p text:style-name="P184">Neither caught it, I’m sure.</text:p>
      <text:p text:style-name="P185">“Agent Kole will be accompanying you. I have other matters to attend to. This is a delicate time for the President to be absent, and I have to ensure my party capitalizes on this.”</text:p>
      <text:p text:style-name="P186">Farza shot a glare at him.</text:p>
      <text:p text:style-name="P187">“C’mon, we might have a common goal here, but we all must go back to our jobs soon. I do not expect us to be friends, but let’s be honest about our vendettas at least.”</text:p>
      <text:soft-page-break/>
      <text:p text:style-name="P188"><text:span text:style-name="T189">“</text:span><text:span text:style-name="T190">Sretiyalas.</text:span><text:span text:style-name="T191">”</text:span></text:p>
      <text:p text:style-name="P192">I don’t think any other language uses fingernail as a curse word. Something to do with its fate never growing behind a certain part is what my Radintian friends told me.</text:p>
      <text:p text:style-name="P193">“Ahem,” Tess stood up next, “Then I will take the suspect to my room. Agent Cole, would you please clean up Mr. Avarion’s room? I intend to take it while he occupies mine.”</text:p>
      <text:p text:style-name="P194">“Excuse me?” Cole replied.</text:p>
      <text:p text:style-name="P195">“Not by yourself of course, I had to ask you because CLAW moved all the staff to the bunker.”</text:p>
      <text:p text:style-name="P196">Cole mumbled something inaudible under his breath. It was not in Radint though, perhaps he hoped that Tess caught a part of that at least.<text:s/></text:p>
      <text:p text:style-name="P197">Why are this group misfits who clearly hate each other together here in the first place? If Tess wanted to investigate, she could’ve used her local force. If Colewind wanted a Dreamdiver, his Party could’ve easily found one. If Farza wanted the assassin tracked down, she could summon all of CLAW on a whim.</text:p>
      <text:p text:style-name="P198">Tess’s room was on the tenth floor. It followed the same template as the eighth, except for the colour scheme. The floor was a lot more modern, with the greys and silvers and browns, with the occasional hint of a black accents. Somehow it lacked the elegance of the other floors, reduced only to a canvas of optimization with no life of its own. From what little I could eavesdrop from the Staff left in the building I learnt that floor ten<text:s/><text:soft-page-break/>was called the Cushion Floor. This is where all the bodyguards, assistants and chaperones of powerful and influential people stayed. A literal buffer barrier of power and class, separating the elite from the common rabble.</text:p>
      <text:p text:style-name="P199">The words of a Bellboy, not mine.</text:p>
      <text:p text:style-name="P200">“Where do you think the people on this floor stand?” I asked out of curiosity.</text:p>
      <text:p text:style-name="P201">“Stand? As in?” Tess questioned back.</text:p>
      <text:p text:style-name="P202">“The riots. These are mostly government folks right, and that too Central ones. However, most are citizens of Arkcorade still. How it feels to be caught between the State and Central, I wonder.”</text:p>
      <text:p text:style-name="P203"><text:span text:style-name="T204">I knew the feeling all too well, but I was more interested in learning what Tess thought of the scenario. Even after talking to my three<text:s/></text:span><text:span text:style-name="T205">benefactors,<text:s/></text:span><text:span text:style-name="T206">I still was unclear on their stance on the current scenario.<text:s/></text:span></text:p>
      <text:p text:style-name="P207">Farza was the easiest to discern perhaps. She clearly is not from Arkcorade and not once did she show any sort of sentimentality towards the riots. She didn’t seem to care for Arkcoradian sentiments, let alone speak Akcoril. And as the director of CLAW, she’s probably the only one who needs no motive to be a part of this.</text:p>
      <text:p text:style-name="P208">Colewind is dangerous, that much was obvious. A local politician from the opposition and someone with ties to the Central is not to be trifled with. Something tells me that Farza tolerates him, or perhaps even considers him an acquaintance. And vice-versa.</text:p>
      <text:soft-page-break/>
      <text:p text:style-name="P209">But he had killed someone. Or at least shot. And his demeanour doesn’t really scream rebellion.</text:p>
      <text:p text:style-name="P210">“They are here on a job,” Tess replied, “And this job demands that you be impartial. To uphold justice, law and order. To keep the citizens of this country safe.”</text:p>
      <text:p text:style-name="P211">I quickly let out a burst out laughter at that last part, and immediately sealed my mouth shut with my fist.</text:p>
      <text:p text:style-name="P212">Tess shot me a glare, “It might sound funny to you. But there are those of us who are truly patriotic. Not that a conman would understand.”</text:p>
      <text:p text:style-name="P213">“I do not practice a heartless profession.” I responded, ensuring I don’t say anything incriminating. It didn’t really matter at this point, but I couldn’t shake off the reflex.</text:p>
      <text:p text:style-name="P214">“Well, let’s see you prove it then.” Tess said, as we arrived at her door.</text:p>
      <text:p text:style-name="P215">A very strong smell punched me right on the nose as I entered. There is very popular ritual flower that gets weaved into a garland in the shrines of Arkcorade, I couldn’t mistake the smell.</text:p>
      <text:p text:style-name="P216">I didn’t know flowers all that well, but most didn’t carry a spicy odour. And most didn’t remind of my family outings either.</text:p>
      <text:p text:style-name="P217">Otherwise, it was a typical room, similar in layout as the room where we were in, a while back, except this one had a window. It faced the riots, however from this height I don’t think anyone could notice anything.</text:p>
      <text:p text:style-name="P218">I looked around and found a pile of books and an incense stand on the<text:s/><text:soft-page-break/>bedside table. There were probably three to four books in that pile, but I could only recognize the one at the top. It was a book of Holker’s.</text:p>
      <text:p text:style-name="P219">“This will be your room for the next three days. I know the Dream incense can be strong; I’ll remove it. The room is already tidied up, so you can focus on your work.”</text:p>
      <text:p text:style-name="P220">Tidied up was an overstatement. I could see the haphazardness around me. The sheets were just spread out, not folded and tucked in, hotel style. The floor was still wet from the mopping. There was a beanbag on the left corner facing the window that was clearly dented, probably from a pile of laundry or books, I suppose.</text:p>
      <text:p text:style-name="P221">“It’s almost twelve,” I looked at the clock on her nightstand, “Will the President be asleep?”</text:p>
      <text:p text:style-name="P222">“Yes, just got a text from Farza. Apparently, he had a headache and wanted to go to bed early.”</text:p>
      <text:p text:style-name="P223">“And when does he wake up usually?”, I asked.</text:p>
      <text:p text:style-name="P224">“Around 7-7.30ish. Does the length of his sleep matter?”</text:p>
      <text:p text:style-name="P225">“Determines how long we can stay there,” I answered. Once again it seemed like she missed something so basic about Dreamdiving. How did she pull me into her dream if she lacks such common knowledge?</text:p>
      <text:p text:style-name="P226">“Let’s Dive?” Farza signalled towards the couch.</text:p>
      <text:p text:style-name="P227">Of course. Why would I get the bed?</text:p>
      <text:soft-page-break/>
      <text:p text:style-name="P228">It took me fifteen more minutes to fall asleep. Soon, after an indiscernible amount of time I found myself in a vast meadow. Lush green grass as far as the eye could see and I could smell Tess’s incense around me.</text:p>
      <text:p text:style-name="P229">When two people dived together the waiting lobby usually resembles some common theme between them both. This did not scream Tess to me, and I know for sure this is not my lobby.</text:p>
      <text:p text:style-name="P230">Not a single dragon in sight after all.</text:p>
      <text:p text:style-name="P231">“Finally, you are here.”, a voice called me out from behind, “I was beginning to think you trapped me here. I’ve been waiting for an hour now.”</text:p>
      <text:p text:style-name="P232">She didn’t seem to know that she can exit any lobby at will.</text:p>
      <text:p text:style-name="P233">“Is this your lobby?” I asked, looking around.</text:p>
      <text:p text:style-name="P234">“I don’t know.”</text:p>
      <text:p text:style-name="P235">“You really aren’t a Dreamdiver, correct?” I asked after a pause.</text:p>
      <text:p text:style-name="P236">She ignored my question.</text:p>
      <text:p text:style-name="P237">“Listen, Dreamdiving is serious, and we are going in deep, not shallow. You have no idea what we might have to face inside the President’s dream. If you are not a Dreamdiver, you are a liability. In the name of monitoring me there is a fat chance you might bring harm to the President. So, I will ask again, are you a Dreamdiver?”</text:p>
      <text:p text:style-name="P238">I saw her lowering her gaze for the first time, but it didn’t last more than<text:s/><text:soft-page-break/>a split second. She quickly folded her hands and turned towards a tree to her right.</text:p>
      <text:p text:style-name="P239">“I know the basics.” She said, calmly.</text:p>
      <text:p text:style-name="P240">“Like?”</text:p>
      <text:p text:style-name="P241">She did not say anything. We stood there in the middle of the meadow in utter silence.<text:s/></text:p>
      <text:p text:style-name="P242">“The more we delay the less time we have.” I spoke.</text:p>
      <text:p text:style-name="P243">“I was trained as a Watcher. Someone who can enter other people’s dreams with their consent. It was to be used on suspects to confirm if they can Dreamdive or not.”</text:p>
      <text:p text:style-name="P244">“And that’s why I was interrogated in my own dream?”</text:p>
      <text:p text:style-name="P245">She nodded.</text:p>
      <text:p text:style-name="P246">It didn’t really matter to me though. Going in with an inexperienced Diver meant I’ll have a lot freer rein.<text:s/></text:p>
      <text:p text:style-name="P247">“Alright, let’s pinpoint the President’s dream. He should be right above us, correct?” I asked, as a I waved my hand to pull up the Lobby Console.</text:p>
      <text:p text:style-name="P248">“About that,” Tess started, “We are not diving into the President’s Dream. We will be heading into Dolewind’s instead.”</text:p>
      <text:p text:style-name="P249">“Wait, what?”</text:p>
      <text:p text:style-name="P250">I did not sign up to be a part of these subplots.</text:p>
      <text:soft-page-break/>
      <text:p text:style-name="P251">“Politics. What do you think is the best way to earn the support of the people?” She asked.</text:p>
      <text:p text:style-name="P252">“Pay more per vote?”<text:s/></text:p>
      <text:p text:style-name="P253">Her stare daggered right into my eyes, and I quickly muffled my oncoming laughter.</text:p>
      <text:p text:style-name="P254">“It’s empathy. Mass, revolutionary levels of empathy. Money can only take you so far. And it’s mostly for maintenance. But change, now that demands a cause. And someone who will stand with and for the cause till the very end, bloody and beaten in need be.”</text:p>
      <text:p text:style-name="P255">“The Language Rebellion. You think Colewind wants to ride the wave?”</text:p>
      <text:p text:style-name="P256">“Exactly. Stand for the living masses and even the dead will raise for you.”</text:p>
      <text:p text:style-name="P257">Now that was a quote I didn’t recognize, but I am pretty sure the tone was Holker again.</text:p>
      <text:p text:style-name="P258">“What does that have to do with use entering Colewind’s dream instead of the President?”</text:p>
      <text:p text:style-name="P259">I knew what she was trying to insinuate, but I wanted to hear it from her. I am already dealing with far too many unknowns here to take anything at face value.</text:p>
      <text:p text:style-name="P260">“I am positive he is behind the attempt. He himself is no Dreamdiver but he would have no harm in getting in touch with one. My initial assumption was that you worked for him.”</text:p>
      <text:soft-page-break/>
      <text:p text:style-name="P261"><text:span text:style-name="T262">Never work for politicians, ever.<text:s/></text:span><text:span text:style-name="T263">I remembered dad’s words.<text:s/></text:span></text:p>
      <text:p text:style-name="P264">“He’ll be a terrible employer”, I countered, “He most certainly can afford me, but I wouldn’t have accepted.”</text:p>
      <text:p text:style-name="P265">“Doesn’t mean you are off the hook, even if you had infiltrated Kaverton’s mind that wouldn’t have been exactly legal. Given the circumstances all I need is intent to lock you up.”</text:p>
      <text:p text:style-name="P266"><text:span text:style-name="T267">So do whatever I say.<text:s/></text:span><text:span text:style-name="T268">Is what she wanted to end that sentence with, I’m sure.</text:span></text:p>
      <text:p text:style-name="P269">“So, you want us to get into Dolewind’s mind and what? Gather evidence?”</text:p>
      <text:p text:style-name="P270">“You said recent and influential events might stay, so there should something we can find inside his head.”</text:p>
      <text:p text:style-name="P271">The soup couldn’t get any hotter. Dolewind was dangerous, but the Inspector posed a more immediate threat. Still, it’s not like she had any evidence to back her claim.</text:p>
      <text:p text:style-name="P272">However, I was a little curious about the prep myself. The target was the President. Whoever this person was he certainly have had to be a skilled Dreamdiver, and most certainly a Crefan sympathetic to the protests. I had a higher chance of getting out of this alive if I at least tried to get to know this person.<text:s/></text:p>
      <text:p text:style-name="P273">Historically most rebellions failed because of niceties and gullibility of the rebels involved. I hoped this one would not deviate.</text:p>
      <text:soft-page-break/>
      <text:p text:style-name="P274">Tess snapped her fingers in front of me, “You there still? Are you dreaming inside a dream?”</text:p>
      <text:p text:style-name="P275">“No, just calculating my odds of survival.” I said bluntly.</text:p>
      <text:p text:style-name="P276">“My station is loyal to me. And this is my jurisdiction. I can guarantee your safety if—” she paused for a second, “—you help me.”</text:p>
      <text:p text:style-name="P277">I sighed and brought up the console with a wave again.</text:p>
      <text:p text:style-name="P278">“See that red dot there? That is supposed to be the President.” I pointed at the console, “Now with that tell me, where should Dolewind be?”</text:p>
      <text:p text:style-name="P279">“Somewhere down,” Tess started, “And somewhere south for sure. The guy hates windows for some reason.”</text:p>
      <text:p text:style-name="P280">That tells me why I met him in such a crappy room.</text:p>
      <text:p text:style-name="P281"><text:span text:style-name="T282">“There,” she pointed to a blip somewhere in what I assumed to be the 19</text:span><text:span text:style-name="T283">th</text:span><text:span text:style-name="T284"><text:s/>floor. It was a bit faint. He had just fallen asleep.</text:span></text:p>
      <text:p text:style-name="P285">I hovered over the blip and gave it a gentle press with my index finger. There was a quiet pop, following which the blip expanded into concentric circles. I dragged the circles downwards and soon red concentric blinking circles surrounded the two of us. As they raised above scaling our heights, I turned towards Tess and gave her a smile, before my eyes were blinded.</text:p>
      <text:p text:style-name="P286">Colewind’s tower was unsurprisingly tall. I put my hands on the railing before me and leaned forward to take in the City. I took a deep breath as my hair danced in the wind.</text:p>
      <text:soft-page-break/>
      <text:p text:style-name="P287">“WH-WHERE ARE WE!?” Tess scrambled. Her hands clutched the railing tight enough to crush them, and she refused to move her torso any closer, keeping it locked at a weirdly obtuse angle away from the edge.</text:p>
      <text:p text:style-name="P288">Like every first diver, ever.</text:p>
      <text:p text:style-name="P289">“Where? You mean the Tower? Or the City?”</text:p>
      <text:p text:style-name="P290">“I MEAN—WHATEVER THIS IS IS—”, she was visibly panting, her eyes spread to their widest till now. She slowly crouched down, letting go of the railing. As she sat, she kicked against the wall and pushed herself back, slowly getting up she walked away from the railing.</text:p>
      <text:p text:style-name="P291"><text:span text:style-name="T292">“This place, this is a dream? It is so<text:s/></text:span><text:span text:style-name="T293">high</text:span><text:span text:style-name="T294">.” The last word alone trembled.</text:span></text:p>
      <text:p text:style-name="P295">“This is the tower. Where all dives begin. The height varies from person to person, and it usually tells us how dangerous the dive is going to be. The taller the tower, the more careful we would need to be.”</text:p>
      <text:p text:style-name="P296">“And that?” she pointed towards the empty air in front of her. I discerned she was talking about the City down below, which she didn’t want to peer at.</text:p>
      <text:p text:style-name="P297">“That is the Dream City. Of Dolewind to be precise. That is where we are headed.” I pointed to a bright building in the south-east corner of the city.</text:p>
      <text:p text:style-name="P298">Tess was a good few meters away from the railing. As I pointed outwards she took half-a-step forward, looked at me for a second and stopped. She them proceeded to peer out into the horizon to see where I was pointing to without moving.</text:p>
      <text:soft-page-break/>
      <text:p text:style-name="P299">“It’s okay, you won’t fall. And I will not push you if that’s what you are worried about.”</text:p>
      <text:p text:style-name="P300">There are much better ways to get rid of someone inside a dream after all.</text:p>
      <text:p text:style-name="P301">Her face flushed red. Quietly she walked towards the railing, now her spine straightened and composed.</text:p>
      <text:p text:style-name="P302">“Where?” She asked as she got closer to the railing, still keeping a distance from it.</text:p>
      <text:p text:style-name="P303">I waved my hand across the skyline.</text:p>
      <text:p text:style-name="P304">“So this City, this is Dolewind’s dreamworld looks?” She asked.</text:p>
      <text:p text:style-name="P305">“No, this is how everyone’s dreamworld looks.” I replied.</text:p>
      <text:p text:style-name="P306">“But I don’t dream of a large neon lit city every night,” she tried peeking down slightly.</text:p>
      <text:p text:style-name="P307">“Let alone being somewhere so high.” She mumbled.</text:p>
      <text:p text:style-name="P308">“No, this not his dream. This is the Dream City. Think of it like a common template. Like how books are different based on the content inside but still they are a bunch of pages sandwiched between bound covers at the end of the day. The template remains the same.</text:p>
      <text:p text:style-name="P309">You see that bright beacon of light there?” I pointed towards the south-east building again, “That, is the Theatre. That is where the Dreams take place.”</text:p>
      <text:soft-page-break/>
      <text:p text:style-name="P310">“A Theatre?”</text:p>
      <text:p text:style-name="P311">“Yes. Every Dream city is different depending on the Dreamer’s psyche. However, consistently all will have what we call the Four Landmarks—The Theatre, The Market, The Bank and The Residence. The Theatre is where the Dreams take place.”</text:p>
      <text:p text:style-name="P312">Tess pointed out to three different bright beacons across the city, one in the far west, one towards north and one in the centre. “So, those three are the others?” she asked.</text:p>
      <text:p text:style-name="P313">I nodded.</text:p>
      <text:p text:style-name="P314">“Okay so how do we get to Theatre?” She took a quick look at the abyss below.</text:p>
      <text:p text:style-name="P315">“We don’t. I want to head down to the streets first. Need to get a feel for the City first.”</text:p>
      <text:p text:style-name="P316">She raised her eyebrows a bit but lowered them immediately. “And how do we get—down?”</text:p>
      <text:p text:style-name="P317">I grabbed hold of the railings and turned towards her and smiled, “We jump.”</text:p>
      <text:p text:style-name="P318">“NO, no, no, no, no…” she trailed, “We can’t—jump, there should be an elevator in the building. We will take that.”</text:p>
      <text:p text:style-name="P319">“We are not in a resort ma’am.” I leapt over the railing and sat on it, my hands gripping the metal.</text:p>
      <text:soft-page-break/>
      <text:p text:style-name="P320">I could feel the breeze on my face as my slicked back hair danced. I took in the sights of the City.</text:p>
      <text:p text:style-name="P321">It looked like a typical Crefan city, a lot like the urban belt in outskirts of Crefa. From the tower the tallest buildings looked pretty far away, perhaps 6 or 7 floors max. Oddly enough there was not a single skyscraper in sight.</text:p>
      <text:p text:style-name="P322">Even mine has a few. Interesting.</text:p>
      <text:p text:style-name="P323">The design of a City, for a non-diver, usually reflects what place they hold close to their heart and what someone considers home. I turned towards the Residence beacon.</text:p>
      <text:p text:style-name="P324">The tall crimson beacon shone from a wide estate in the north. Given what I have seen of Dolewind I would’ve expected a penthouse.</text:p>
      <text:p text:style-name="P325">“C’mon, cross over.” I pointed to the railing, “We’ll leap from here.”</text:p>
      <text:p text:style-name="P326">She didn’t say a word.</text:p>
      <text:p text:style-name="P327">“We don’t have a lot of time,” I pointed to the sky, “Daylight here is our timer. When night falls here he will wake up.”</text:p>
      <text:p text:style-name="P328">“Is there no other way?”</text:p>
      <text:p text:style-name="P329"><text:span text:style-name="T330">Technically speaking,<text:s/></text:span><text:span text:style-name="T331">I<text:s/></text:span><text:span text:style-name="T332">can fly. She is not experienced enough to do it though and I certainly was not going to suggest carrying her.</text:span></text:p>
      <text:p text:style-name="P333">“Nope. There is no fall damage. Tower exit is a regular process for Dreamdivers. Nothing will happen to you for this jump.”</text:p>
      <text:soft-page-break/>
      <text:p text:style-name="P334">“What do you mean this jump?” she asked.</text:p>
      <text:p text:style-name="P335">“Once you enter the City real world physics apply. See there is a lot of things you won’t know, and I won’t have time to teach them all. If we stall for every single thing like this, we won’t be able to catch the killer.”</text:p>
      <text:p text:style-name="P336">I offered my hand.</text:p>
      <text:p text:style-name="P337">She closed her eyes or more accurately clutched them shut. Slowly she put her left leg over the rail and lifted her right leg back making to the other side facing the terrace of the Tower. Then she fished for my hand with her eyes closed shut.</text:p>
      <text:p text:style-name="P338">You sure you wanna jump with your eyes closed?” I asked, taking her hand.</text:p>
      <text:p text:style-name="P339">She nodded several times, swiftly.</text:p>
      <text:p text:style-name="P340">“Okay, on the count of five, four, three…”</text:p>
      <text:p text:style-name="P341">And I leapt, taking her with me.</text:p>
      <text:p text:style-name="P342">Whenever I leap, I always had a habit spreading my hands and legs out, waving all my limbs and humming a tune. Dive Angel, I called it.</text:p>
      <text:p text:style-name="P343">(Tried landing on the ceiling first. Add+)</text:p>
      <text:p text:style-name="P344">It was a bit difficult with my hands gripped tight by someone else’s.</text:p>
      <text:p text:style-name="P345">The nails tearing into my flesh didn’t help.</text:p>
      <text:p text:style-name="P346">And there was also the deafening scream that accompanied.</text:p>
      <text:soft-page-break/>
      <text:p text:style-name="P347">As the ground grew nearer, I put arm forth towards it and spread my fingers out.</text:p>
      <text:p text:style-name="P348">Manifesting is one of the most incredible feelings in either world. From the origin point it starts like a sting of goosebumps, but all concentrated in one place. And from there the threads spawn outwards and travel towards your target. Throughout the process your entire arm feels non-existentially light, and through the threads a cool breeze flows all the way into your nerves.</text:p>
      <text:p text:style-name="P349">In a few seconds the threads that came out from my hands were woven into a large, red cuboid for us to crash into.</text:p>
      <text:p text:style-name="P350">The moment we made contact the soft rubber took me in deep and shot us into the air. We bounced a couple more times before landing on the surface.</text:p>
      <text:p text:style-name="P351">“Where did this airbag come from?” Tess asked, panting. She had collected herself and stopped screaming after the second bounce. Opting to bite into her hands instead.</text:p>
      <text:p text:style-name="P352">“I manifested it.” I said rolling out of the bag. She quickly followed me out and dusted herself.</text:p>
      <text:p text:style-name="P353">I looked around. We were in the middle of a broad two laned road, with a string of buildings on either side. Benches and streetlights alternated on the pavement every five metres or so. The buildings all looked the same. Crimson brick walls with olive doors with a small step leading up to the entrance, a few bushes and shrubs on either side of the doorway. The height of the buildings would’ve varied between three and seven storeys<text:s/><text:soft-page-break/>at most, not more than that.</text:p>
      <text:p text:style-name="P354">“Looks like a residential street,” she twirled around, “But it is so empty, and…lifeless.”</text:p>
      <text:p text:style-name="P355">“It’s meant to be. The City is but a metaphor for the Dreamer’s mind. Each building you see here will be filled people and memories aplenty. As outsiders we are not privy to the details. The doors will never open for us.”</text:p>
      <text:p text:style-name="P356">“So, what is the point of coming all this way then?” she asked.</text:p>
      <text:p text:style-name="P357">“Like I said before, Dreamdiving is not mind-reading. The constituents of a Dream are made of fragments from actual memories, and that is why the City exists. In order to make a movie, you need actors, set pieces and the like. That is what the City provides. If we are lucky, today’s Dream might have what we need.”</text:p>
      <text:p text:style-name="P358">“Uhh..okay. So the Theatre is where those movies play, that is the dreams themselves?”</text:p>
      <text:p text:style-name="P359">“Yes.”</text:p>
      <text:p text:style-name="P360">“Okay,” she looked up at the sky, “That’s northwards then,” she pointed and quickly paused, “Wait, where is that Tower?”</text:p>
      <text:p text:style-name="P361">“The Tower is not a part of the City. It’s a part of the Diver’s Lobby. It will appear only when we need it.”</text:p>
      <text:p text:style-name="P362">Her face drew a visible blank.</text:p>
      <text:soft-page-break/>
      <text:p text:style-name="P363">“It’s okay, anyone would be confused on their first dive. We didn’t have time for a theory class. It’s one of the reasons we jumped here. I could go over the basics with you before we head deeper.”</text:p>
      <text:p text:style-name="P364">“Basics? Of what.” She asked.</text:p>
      <text:p text:style-name="P365">“Manifestation. To put it simply, the art of manipulating the simulated reality within a given dream world.”</text:p>
      <text:p text:style-name="P366">“That airbag. You said ‘Manifested’ it?” she inquired.</text:p>
      <text:p text:style-name="P367">“Yes. Manifestation allows you to create, modify, manipulate or move anything inside a dream. It allows you to bend laws of physics as you will,<text:s/>making Dives a bit easier.”</text:p>
      <text:p text:style-name="P368">I snapped my fingers. A quick spark shot out from the tip of my thumb the moment it met my pointer finger at the end of the snap, and a second later, a small yellow flame was dancing on it.</text:p>
      <text:p text:style-name="P369">Tess slowly brought her finger close to the flame and quickly ran it through.</text:p>
      <text:p text:style-name="P370">“It is hot. Real flame.”</text:p>
      <text:p text:style-name="P371">“In here, yes, because you know how flame feels like. But it is not real fire per se.”</text:p>
      <text:p text:style-name="P372">“So, anything is possible? Why don’t we just Manifest the information we need? Or open one of these building doors and start searching. Or perhaps we just fly and scan the whole place and…okay wait maybe not fly, but there should be some<text:s/>way,<text:s/>right?”<text:s/>Her<text:s/>eyes glimmered with a<text:s/><text:soft-page-break/>new kind of shine I hadn’t witnessed till now.</text:p>
      <text:p text:style-name="P373">She’s excited. For real.</text:p>
      <text:p text:style-name="P374">“You cannot manifest and use something that either the Dreamer or the target isn’t aware of.”</text:p>
      <text:p text:style-name="P375">“So, if Dolewind had never seen fire before…”</text:p>
      <text:p text:style-name="P376">“I will not be able to create fire here. The reason being we borrow the computational ability of his subconscious to Manifest. Any unsupported entities will break the Dive.”</text:p>
      <text:p text:style-name="P377">“Break? As in?”</text:p>
      <text:p text:style-name="P378">“As in we’ll be kicked out.”</text:p>
      <text:p text:style-name="P379">That is why Dreamdive targets are researched a lot. Before entering a mind, it is paramount that we know about the person’s psyche and personality.</text:p>
      <text:p text:style-name="P380">“I once got kicked out of a Dream trying to manifest a Dragon. It was too foreign for that Dreamer.”</text:p>
      <text:p text:style-name="P381">She snapped her fingers. Nothing.</text:p>
      <text:p text:style-name="P382">She snapped again.</text:p>
      <text:p text:style-name="P383">And again.</text:p>
      <text:p text:style-name="P384">“Is there some kind of spell or incantation I need to invoke?” she asked.</text:p>
      <text:soft-page-break/>
      <text:p text:style-name="P385">“What did you try with that snap?”</text:p>
      <text:p text:style-name="P386">“Same as you did, a small flame.”</text:p>
      <text:p text:style-name="P387">“Lemme guess, you visualized a small flame on the tip of your thumb and snapped it expecting it to show up?”</text:p>
      <text:p text:style-name="P388">“Isn’t that what you did?”</text:p>
      <text:p text:style-name="P389">“You have to manifest the entire process, connect analogies, pipeline possibilities together. Imagine a lighter, including the smells and the sounds. Try thinking what it would feel like for heat or fuel to pass through your thumb and exit out from its tips. The flow, both internal and external. It need not be accurate; it just needs to make sense to you.”</text:p>
      <text:p text:style-name="P390">She closed her eyes. Contrary to popular belief its not actually a required step, you can imagine well without having your eyes closed. In fact, it is considered better to avoid practicing with the eyes closed, since when you need to manifest you would ideally want to keep them open.</text:p>
      <text:p text:style-name="P391">But her being oblivious to that fact is better here for me.</text:p>
      <text:p text:style-name="P392">After a few seconds, she did a quick snap. A quick particulate burst of cyan light later, there was a small piece of red metal inside her half closed fist.</text:p>
      <text:p text:style-name="P393">“This…It’s a lighter?” She asked.</text:p>
      <text:p text:style-name="P394">“Sometimes we take things too literally. It’s okay you are on the right track at least.”</text:p>
      <text:soft-page-break/>
      <text:p text:style-name="P395">She clicked the lighter and a flame popped out. Albeit in an unexpected hue.</text:p>
      <text:p text:style-name="P396">“Why is the flame pink?” I asked.</text:p>
      <text:p text:style-name="P397">Her face flushed red.<text:s/></text:p>
      <text:p text:style-name="P398">“I will not be able to help you get better if you are hesitant like that.”</text:p>
      <text:p text:style-name="P399">“Erh, Princess Dandelion. I had<text:s/>one of those<text:s/>campfire lighters<text:s/>as a kid.”</text:p>
      <text:p text:style-name="P400">“Seems like a very important lighter.”</text:p>
      <text:p text:style-name="P401">“Shut up.”</text:p>
      <text:p text:style-name="P402">Cartoons leave a lasting impression on you, that is understandable. In my case it was Mr. Majestic’s magic watch.</text:p>
      <text:p text:style-name="P403">That’s where the Dragon came from.</text:p>
      <text:p text:style-name="P404">“You’ve got the feel for it, that’s good enough for now. Let’s proceed.”</text:p>
      <text:p text:style-name="P405">“What is that?” Tess asked.</text:p>
      <text:p text:style-name="P406">“What is—” Something rumbled under my feet before I could complete. I slowly took a couple of steps back, signalling Tess to do the same.</text:p>
      <text:p text:style-name="P407">The weak rumbling intensified into stronger tremors.<text:s/>The road in front of us started to crack, swiftly expanding into larger gashes in the concrete.</text:p>
      <text:p text:style-name="P408">I quickly looked above. It was a bit faint, like a crimson air-crack in the sky. Present but barely visible.</text:p>
      <text:soft-page-break/>
      <text:p text:style-name="P409">The crimson glow in the crack pulsed for a few seconds and then stopped, simultaneously putting an end to the tremors.</text:p>
      <text:p text:style-name="P410">“What was that?” Tess asked.</text:p>
      <text:p text:style-name="P411">“Nothing serious. Just a quirk of the City. Things happen every now and then.”</text:p>
      <text:p text:style-name="P412"/>
      <text:p text:style-name="P413"/>
      <text:p text:style-name="P414"/>
      <text:p text:style-name="P415"/>
      <text:p text:style-name="P416"/>
      <text:p text:style-name="P417"/>
      <text:p text:style-name="P418"/>
      <text:p text:style-name="P4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fo:text-indent="0.5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6in" fo:page-height="9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Sanjay Bharath</dc:creator>
    <meta:creation-date>2023-01-10T02:11:00Z</meta:creation-date>
    <dc:date>2026-06-06T04:42:00Z</dc:date>
    <meta:template xlink:href="Normal" xlink:type="simple"/>
    <meta:editing-cycles>1211</meta:editing-cycles>
    <meta:editing-duration>PT305100S</meta:editing-duration>
    <meta:user-defined meta:name="GrammarlyDocumentId">c4eab01fde9e05a777f22aafbaf1619795cdf32f63721c7a841bdbd40054a4d7</meta:user-defined>
    <meta:document-statistic meta:page-count="38" meta:paragraph-count="86" meta:word-count="6482" meta:character-count="43346" meta:row-count="307" meta:non-whitespace-character-count="36950"/>
  </office:meta>
</office:document-meta>
</file>