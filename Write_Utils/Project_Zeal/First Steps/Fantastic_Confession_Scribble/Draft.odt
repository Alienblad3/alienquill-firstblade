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margin-top="0.1666in" fo:margin-bottom="0.0666in" fo:line-height="150%"/>
      <style:text-properties style:font-name="Times New Roman" style:font-name-complex="Times New Roman" fo:language="en" fo:country="GB"/>
    </style:style>
    <style:style style:name="P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4"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5"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0" style:parent-style-name="ListParagraph" style:list-style-name="LFO1"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1" style:parent-style-name="ListParagraph" style:list-style-name="LFO1"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2" style:parent-style-name="ListParagraph" style:list-style-name="LFO1"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3" style:parent-style-name="ListParagraph" style:list-style-name="LFO1"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4" style:parent-style-name="ListParagraph" style:list-style-name="LFO1"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7"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8"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3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31"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32"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3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34" style:parent-style-name="Normal" style:family="paragraph">
      <style:paragraph-properties fo:text-align="justify" fo:margin-top="0.1666in" fo:margin-bottom="0.0666in" fo:line-height="150%"/>
    </style:style>
    <style:style style:name="T35" style:parent-style-name="DefaultParagraphFont" style:family="text">
      <style:text-properties style:font-name="Times New Roman" style:font-name-complex="Times New Roman" fo:font-style="italic" style:font-style-asian="italic" style:font-style-complex="italic" fo:language="en" fo:country="GB"/>
    </style:style>
    <style:style style:name="T36" style:parent-style-name="DefaultParagraphFont" style:family="text">
      <style:text-properties style:font-name="Times New Roman" style:font-name-complex="Times New Roman" fo:language="en" fo:country="GB"/>
    </style:style>
    <style:style style:name="P37"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38"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39"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40"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margin-bottom="0.0666in" fo:line-height="150%"/>
      <style:text-properties style:font-name="Times New Roman" style:font-name-complex="Times New Roman" fo:language="en" fo:country="GB"/>
    </style:style>
    <style:style style:name="P4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4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43" style:parent-style-name="Normal" style:family="paragraph">
      <style:paragraph-properties fo:text-align="justify" fo:margin-top="0.1666in" fo:margin-bottom="0.0666in" fo:line-height="150%"/>
    </style:style>
    <style:style style:name="T44" style:parent-style-name="DefaultParagraphFont" style:family="text">
      <style:text-properties style:font-name="Times New Roman" style:font-name-complex="Times New Roman" fo:font-style="italic" style:font-style-asian="italic" style:font-style-complex="italic" fo:language="en" fo:country="GB"/>
    </style:style>
    <style:style style:name="P45" style:parent-style-name="Normal" style:family="paragraph">
      <style:paragraph-properties fo:text-align="justify" fo:margin-top="0.1666in" fo:margin-bottom="0.0666in" fo:line-height="150%"/>
    </style:style>
    <style:style style:name="T46" style:parent-style-name="DefaultParagraphFont" style:family="text">
      <style:text-properties style:font-name="Times New Roman" style:font-name-complex="Times New Roman" fo:font-style="italic" style:font-style-asian="italic" style:font-style-complex="italic" fo:language="en" fo:country="GB"/>
    </style:style>
    <style:style style:name="T47" style:parent-style-name="DefaultParagraphFont" style:family="text">
      <style:text-properties style:font-name="Times New Roman" style:font-name-complex="Times New Roman" fo:language="en" fo:country="GB"/>
    </style:style>
    <style:style style:name="P48" style:parent-style-name="Normal" style:family="paragraph">
      <style:paragraph-properties fo:text-align="justify" fo:margin-top="0.1666in" fo:margin-bottom="0.0666in" fo:line-height="150%"/>
    </style:style>
    <style:style style:name="T49" style:parent-style-name="DefaultParagraphFont" style:family="text">
      <style:text-properties style:font-name="Times New Roman" style:font-name-complex="Times New Roman" fo:language="en" fo:country="GB"/>
    </style:style>
    <style:style style:name="P50" style:parent-style-name="Normal" style:family="paragraph">
      <style:paragraph-properties fo:text-align="justify" fo:margin-top="0.1666in" fo:margin-bottom="0.0666in" fo:line-height="150%"/>
    </style:style>
    <style:style style:name="T51" style:parent-style-name="DefaultParagraphFont" style:family="text">
      <style:text-properties style:font-name="Times New Roman" style:font-name-complex="Times New Roman" fo:language="en" fo:country="GB"/>
    </style:style>
    <style:style style:name="P5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59"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60"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6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3"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6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68" style:parent-style-name="Normal" style:family="paragraph">
      <style:paragraph-properties fo:text-align="justify" fo:margin-top="0.1666in" fo:margin-bottom="0.0666in" fo:line-height="150%"/>
    </style:style>
    <style:style style:name="T69" style:parent-style-name="DefaultParagraphFont" style:family="text">
      <style:text-properties style:font-name="Times New Roman" style:font-name-complex="Times New Roman" fo:font-style="italic" style:font-style-asian="italic" style:font-style-complex="italic" fo:language="en" fo:country="GB"/>
    </style:style>
    <style:style style:name="T70" style:parent-style-name="DefaultParagraphFont" style:family="text">
      <style:text-properties style:font-name="Times New Roman" style:font-name-complex="Times New Roman" fo:language="en" fo:country="GB"/>
    </style:style>
    <style:style style:name="P71" style:parent-style-name="Normal" style:family="paragraph">
      <style:paragraph-properties fo:text-align="justify" fo:margin-top="0.1666in" fo:margin-bottom="0.0666in" fo:line-height="150%"/>
    </style:style>
    <style:style style:name="T72" style:parent-style-name="DefaultParagraphFont" style:family="text">
      <style:text-properties style:font-name="Times New Roman" style:font-name-complex="Times New Roman" fo:font-style="italic" style:font-style-asian="italic" style:font-style-complex="italic" fo:language="en" fo:country="GB"/>
    </style:style>
    <style:style style:name="T73" style:parent-style-name="DefaultParagraphFont" style:family="text">
      <style:text-properties style:font-name="Times New Roman" style:font-name-complex="Times New Roman" fo:language="en" fo:country="GB"/>
    </style:style>
    <style:style style:name="P7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75"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76"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77"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78" style:parent-style-name="Normal" style:family="paragraph">
      <style:paragraph-properties fo:text-align="justify" fo:margin-top="0.1666in" fo:margin-bottom="0.0666in" fo:line-height="150%"/>
    </style:style>
    <style:style style:name="T79" style:parent-style-name="DefaultParagraphFont" style:family="text">
      <style:text-properties style:font-name="Times New Roman" style:font-name-complex="Times New Roman" fo:language="en" fo:country="GB"/>
    </style:style>
    <style:style style:name="P80" style:parent-style-name="Normal" style:family="paragraph">
      <style:paragraph-properties fo:text-align="justify" fo:margin-top="0.1666in" fo:margin-bottom="0.0666in" fo:line-height="150%"/>
    </style:style>
    <style:style style:name="T81" style:parent-style-name="DefaultParagraphFont" style:family="text">
      <style:text-properties style:font-name="Times New Roman" style:font-name-complex="Times New Roman" fo:language="en" fo:country="GB"/>
    </style:style>
    <style:style style:name="P82" style:parent-style-name="Normal" style:family="paragraph">
      <style:paragraph-properties fo:text-align="justify" fo:margin-top="0.1666in" fo:margin-bottom="0.0666in" fo:line-height="150%"/>
    </style:style>
    <style:style style:name="T83" style:parent-style-name="DefaultParagraphFont" style:family="text">
      <style:text-properties style:font-name="Times New Roman" style:font-name-complex="Times New Roman" fo:language="en" fo:country="GB"/>
    </style:style>
    <style:style style:name="P84" style:parent-style-name="Normal" style:family="paragraph">
      <style:paragraph-properties fo:text-align="justify" fo:margin-top="0.1666in" fo:margin-bottom="0.0666in" fo:line-height="150%"/>
    </style:style>
    <style:style style:name="T85" style:parent-style-name="DefaultParagraphFont" style:family="text">
      <style:text-properties style:font-name="Times New Roman" style:font-name-complex="Times New Roman" fo:language="en" fo:country="GB"/>
    </style:style>
    <style:style style:name="P86" style:parent-style-name="Normal" style:family="paragraph">
      <style:paragraph-properties fo:text-align="justify" fo:margin-top="0.1666in" fo:margin-bottom="0.0666in" fo:line-height="150%"/>
    </style:style>
    <style:style style:name="T87" style:parent-style-name="DefaultParagraphFont" style:family="text">
      <style:text-properties style:font-name="Times New Roman" style:font-name-complex="Times New Roman" fo:language="en" fo:country="GB"/>
    </style:style>
    <style:style style:name="T88" style:parent-style-name="DefaultParagraphFont" style:family="text">
      <style:text-properties style:font-name="Times New Roman" style:font-name-complex="Times New Roman" fo:font-style="italic" style:font-style-asian="italic" style:font-style-complex="italic" fo:language="en" fo:country="GB"/>
    </style:style>
    <style:style style:name="T89" style:parent-style-name="DefaultParagraphFont" style:family="text">
      <style:text-properties style:font-name="Times New Roman" style:font-name-complex="Times New Roman" fo:language="en" fo:country="GB"/>
    </style:style>
    <style:style style:name="P90" style:parent-style-name="Normal" style:family="paragraph">
      <style:paragraph-properties fo:text-align="justify" fo:margin-top="0.1666in" fo:margin-bottom="0.0666in" fo:line-height="150%"/>
    </style:style>
    <style:style style:name="T91" style:parent-style-name="DefaultParagraphFont" style:family="text">
      <style:text-properties style:font-name="Times New Roman" style:font-name-complex="Times New Roman" fo:language="en" fo:country="GB"/>
    </style:style>
    <style:style style:name="P92"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93" style:parent-style-name="Normal" style:family="paragraph">
      <style:paragraph-properties fo:text-align="justify" fo:margin-top="0.1666in" fo:margin-bottom="0.0666in" fo:line-height="150%"/>
    </style:style>
    <style:style style:name="T94" style:parent-style-name="DefaultParagraphFont" style:family="text">
      <style:text-properties style:font-name="Times New Roman" style:font-name-complex="Times New Roman" fo:language="en" fo:country="GB"/>
    </style:style>
    <style:style style:name="T95" style:parent-style-name="DefaultParagraphFont" style:family="text">
      <style:text-properties style:font-name="Times New Roman" style:font-name-complex="Times New Roman" fo:language="en" fo:country="GB"/>
    </style:style>
    <style:style style:name="P96" style:parent-style-name="Normal" style:family="paragraph">
      <style:paragraph-properties fo:text-align="justify" fo:margin-top="0.1666in" fo:margin-bottom="0.0666in" fo:line-height="150%"/>
    </style:style>
    <style:style style:name="T97" style:parent-style-name="DefaultParagraphFont" style:family="text">
      <style:text-properties style:font-name="Times New Roman" style:font-name-complex="Times New Roman" fo:language="en" fo:country="GB"/>
    </style:style>
    <style:style style:name="P98"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99" style:parent-style-name="Normal" style:family="paragraph">
      <style:paragraph-properties fo:text-align="justify" fo:margin-top="0.1666in" fo:margin-bottom="0.0666in" fo:line-height="150%"/>
    </style:style>
    <style:style style:name="T100" style:parent-style-name="DefaultParagraphFont" style:family="text">
      <style:text-properties style:font-name="Times New Roman" style:font-name-complex="Times New Roman" fo:language="en" fo:country="GB"/>
    </style:style>
    <style:style style:name="P101" style:parent-style-name="Normal" style:family="paragraph">
      <style:paragraph-properties fo:text-align="justify" fo:margin-top="0.1666in" fo:margin-bottom="0.0666in" fo:line-height="150%"/>
    </style:style>
    <style:style style:name="T102" style:parent-style-name="DefaultParagraphFont" style:family="text">
      <style:text-properties style:font-name="Times New Roman" style:font-name-complex="Times New Roman" fo:language="en" fo:country="GB"/>
    </style:style>
    <style:style style:name="P10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04"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05" style:parent-style-name="Normal" style:family="paragraph">
      <style:paragraph-properties fo:text-align="justify" fo:margin-top="0.1666in" fo:margin-bottom="0.0666in" fo:line-height="150%"/>
    </style:style>
    <style:style style:name="T106" style:parent-style-name="DefaultParagraphFont" style:family="text">
      <style:text-properties style:font-name="Times New Roman" style:font-name-complex="Times New Roman" fo:language="en" fo:country="GB"/>
    </style:style>
    <style:style style:name="P107" style:parent-style-name="Normal" style:family="paragraph">
      <style:paragraph-properties fo:text-align="justify" fo:margin-top="0.1666in" fo:margin-bottom="0.0666in" fo:line-height="150%"/>
    </style:style>
    <style:style style:name="T108" style:parent-style-name="DefaultParagraphFont" style:family="text">
      <style:text-properties style:font-name="Times New Roman" style:font-name-complex="Times New Roman" fo:language="en" fo:country="GB"/>
    </style:style>
    <style:style style:name="P109" style:parent-style-name="Normal" style:family="paragraph">
      <style:paragraph-properties fo:text-align="justify" fo:margin-top="0.1666in" fo:margin-bottom="0.0666in" fo:line-height="150%"/>
    </style:style>
    <style:style style:name="T110" style:parent-style-name="DefaultParagraphFont" style:family="text">
      <style:text-properties style:font-name="Times New Roman" style:font-name-complex="Times New Roman" fo:language="en" fo:country="GB"/>
    </style:style>
    <style:style style:name="P11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12"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13"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14" style:parent-style-name="Normal" style:family="paragraph">
      <style:paragraph-properties fo:text-align="justify" fo:margin-top="0.1666in" fo:margin-bottom="0.0666in" fo:line-height="150%"/>
    </style:style>
    <style:style style:name="T115" style:parent-style-name="DefaultParagraphFont" style:family="text">
      <style:text-properties style:font-name="Times New Roman" style:font-name-complex="Times New Roman" fo:language="en" fo:country="GB"/>
    </style:style>
    <style:style style:name="P116" style:parent-style-name="Normal" style:family="paragraph">
      <style:paragraph-properties fo:text-align="justify" fo:margin-top="0.1666in" fo:margin-bottom="0.0666in" fo:line-height="150%"/>
    </style:style>
    <style:style style:name="T117" style:parent-style-name="DefaultParagraphFont" style:family="text">
      <style:text-properties style:font-name="Times New Roman" style:font-name-complex="Times New Roman" fo:language="en" fo:country="GB"/>
    </style:style>
    <style:style style:name="P118" style:parent-style-name="Normal" style:family="paragraph">
      <style:paragraph-properties fo:text-align="justify" fo:margin-top="0.1666in" fo:margin-bottom="0.0666in" fo:line-height="150%"/>
    </style:style>
    <style:style style:name="T119" style:parent-style-name="DefaultParagraphFont" style:family="text">
      <style:text-properties style:font-name="Times New Roman" style:font-name-complex="Times New Roman" fo:language="en" fo:country="GB"/>
    </style:style>
    <style:style style:name="P120" style:parent-style-name="Normal" style:family="paragraph">
      <style:paragraph-properties fo:text-align="justify" fo:margin-top="0.1666in" fo:margin-bottom="0.0666in" fo:line-height="150%"/>
    </style:style>
    <style:style style:name="T121" style:parent-style-name="DefaultParagraphFont" style:family="text">
      <style:text-properties style:font-name="Times New Roman" style:font-name-complex="Times New Roman" fo:language="en" fo:country="GB"/>
    </style:style>
    <style:style style:name="P122" style:parent-style-name="Normal" style:family="paragraph">
      <style:paragraph-properties fo:text-align="justify" fo:margin-top="0.1666in" fo:margin-bottom="0.0666in" fo:line-height="150%"/>
    </style:style>
    <style:style style:name="T123" style:parent-style-name="DefaultParagraphFont" style:family="text">
      <style:text-properties style:font-name="Times New Roman" style:font-name-complex="Times New Roman" fo:language="en" fo:country="GB"/>
    </style:style>
    <style:style style:name="P124"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25" style:parent-style-name="Normal" style:family="paragraph">
      <style:paragraph-properties fo:text-align="justify" fo:margin-top="0.1666in" fo:margin-bottom="0.0666in" fo:line-height="150%"/>
    </style:style>
    <style:style style:name="T126" style:parent-style-name="DefaultParagraphFont" style:family="text">
      <style:text-properties style:font-name="Times New Roman" style:font-name-complex="Times New Roman" fo:language="en" fo:country="GB"/>
    </style:style>
    <style:style style:name="P127" style:parent-style-name="Normal" style:family="paragraph">
      <style:paragraph-properties fo:text-align="justify" fo:margin-top="0.1666in" fo:margin-bottom="0.0666in" fo:line-height="150%"/>
    </style:style>
    <style:style style:name="T128" style:parent-style-name="DefaultParagraphFont" style:family="text">
      <style:text-properties style:font-name="Times New Roman" style:font-name-complex="Times New Roman" fo:language="en" fo:country="GB"/>
    </style:style>
    <style:style style:name="T129" style:parent-style-name="DefaultParagraphFont" style:family="text">
      <style:text-properties style:font-name="Times New Roman" style:font-name-complex="Times New Roman" fo:language="en" fo:country="GB"/>
    </style:style>
    <style:style style:name="P13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2" style:parent-style-name="Normal" style:family="paragraph">
      <style:paragraph-properties fo:text-align="justify" fo:margin-top="0.1666in" fo:margin-bottom="0.0666in" fo:line-height="150%"/>
    </style:style>
    <style:style style:name="T133" style:parent-style-name="DefaultParagraphFont" style:family="text">
      <style:text-properties style:font-name="Times New Roman" style:font-name-complex="Times New Roman" fo:font-style="italic" style:font-style-asian="italic" style:font-style-complex="italic" fo:language="en" fo:country="GB"/>
    </style:style>
    <style:style style:name="P13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3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4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41" style:parent-style-name="Normal" style:family="paragraph">
      <style:paragraph-properties fo:text-align="justify" fo:margin-top="0.1666in" fo:margin-bottom="0.0666in" fo:line-height="150%"/>
    </style:style>
    <style:style style:name="T142" style:parent-style-name="DefaultParagraphFont" style:family="text">
      <style:text-properties style:font-name="Times New Roman" style:font-name-complex="Times New Roman" fo:language="en" fo:country="GB"/>
    </style:style>
    <style:style style:name="T143" style:parent-style-name="DefaultParagraphFont" style:family="text">
      <style:text-properties style:font-name="Times New Roman" style:font-name-complex="Times New Roman" style:text-position="super 66.6%" fo:language="en" fo:country="GB"/>
    </style:style>
    <style:style style:name="T144" style:parent-style-name="DefaultParagraphFont" style:family="text">
      <style:text-properties style:font-name="Times New Roman" style:font-name-complex="Times New Roman" fo:language="en" fo:country="GB"/>
    </style:style>
    <style:style style:name="P14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46" style:parent-style-name="Normal" style:family="paragraph">
      <style:paragraph-properties fo:text-align="justify" fo:margin-top="0.1666in" fo:margin-bottom="0.0666in" fo:line-height="150%"/>
    </style:style>
    <style:style style:name="T147" style:parent-style-name="DefaultParagraphFont" style:family="text">
      <style:text-properties style:font-name="Times New Roman" style:font-name-complex="Times New Roman" fo:language="en" fo:country="GB"/>
    </style:style>
    <style:style style:name="P14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4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5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5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5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5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5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55" style:parent-style-name="Normal" style:family="paragraph">
      <style:paragraph-properties fo:text-align="justify" fo:margin-top="0.1666in" fo:margin-bottom="0.0666in" fo:line-height="150%"/>
    </style:style>
    <style:style style:name="T156" style:parent-style-name="DefaultParagraphFont" style:family="text">
      <style:text-properties style:font-name="Times New Roman" style:font-name-complex="Times New Roman" fo:language="en" fo:country="GB"/>
    </style:style>
    <style:style style:name="T157" style:parent-style-name="DefaultParagraphFont" style:family="text">
      <style:text-properties style:font-name="Times New Roman" style:font-name-complex="Times New Roman" style:text-position="super 66.6%" fo:language="en" fo:country="GB"/>
    </style:style>
    <style:style style:name="T158" style:parent-style-name="DefaultParagraphFont" style:family="text">
      <style:text-properties style:font-name="Times New Roman" style:font-name-complex="Times New Roman" fo:language="en" fo:country="GB"/>
    </style:style>
    <style:style style:name="P159" style:parent-style-name="Normal" style:family="paragraph">
      <style:paragraph-properties fo:text-align="justify" fo:margin-top="0.1666in" fo:margin-bottom="0.0666in" fo:line-height="150%"/>
    </style:style>
    <style:style style:name="T160" style:parent-style-name="DefaultParagraphFont" style:family="text">
      <style:text-properties style:font-name="Times New Roman" style:font-name-complex="Times New Roman" fo:language="en" fo:country="GB"/>
    </style:style>
    <style:style style:name="T161" style:parent-style-name="DefaultParagraphFont" style:family="text">
      <style:text-properties style:font-name="Times New Roman" style:font-name-complex="Times New Roman" style:text-position="super 66.6%" fo:language="en" fo:country="GB"/>
    </style:style>
    <style:style style:name="T162" style:parent-style-name="DefaultParagraphFont" style:family="text">
      <style:text-properties style:font-name="Times New Roman" style:font-name-complex="Times New Roman" fo:language="en" fo:country="GB"/>
    </style:style>
    <style:style style:name="P16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6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6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6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6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6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69"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17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7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8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19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2" style:parent-style-name="Normal" style:family="paragraph">
      <style:paragraph-properties fo:text-align="justify" fo:margin-top="0.1666in" fo:margin-bottom="0.0666in" fo:line-height="150%"/>
    </style:style>
    <style:style style:name="T203" style:parent-style-name="DefaultParagraphFont" style:family="text">
      <style:text-properties style:font-name="Times New Roman" style:font-name-complex="Times New Roman" fo:language="en" fo:country="GB"/>
    </style:style>
    <style:style style:name="P20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0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4"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1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1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2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0"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2"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3"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4"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5"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6"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7"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8"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39"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40" style:parent-style-name="Normal" style:family="paragraph">
      <style:paragraph-properties fo:text-align="justify" fo:margin-top="0.1666in" fo:margin-bottom="0.0666in" fo:line-height="150%"/>
      <style:text-properties style:font-name="Times New Roman" style:font-name-complex="Times New Roman" fo:font-style="italic" style:font-style-asian="italic" style:font-style-complex="italic" fo:language="en" fo:country="GB"/>
    </style:style>
    <style:style style:name="P241" style:parent-style-name="Normal" style:family="paragraph">
      <style:paragraph-properties fo:text-align="justify" fo:margin-top="0.1666in" fo:margin-bottom="0.0666in" fo:line-height="150%"/>
      <style:text-properties style:font-name="Times New Roman" style:font-name-complex="Times New Roman" fo:language="en" fo:country="GB"/>
    </style:style>
    <style:style style:name="P242" style:parent-style-name="ListParagraph" style:family="paragraph">
      <style:paragraph-properties fo:text-align="justify" fo:margin-top="0.1666in" fo:margin-bottom="0.0666in" fo:line-height="150%"/>
    </style:style>
    <style:style style:name="T243" style:parent-style-name="DefaultParagraphFont" style:family="text">
      <style:text-properties style:font-name="Times New Roman" style:font-name-complex="Times New Roman" fo:font-style="italic" style:font-style-asian="italic" style:font-style-complex="italic" fo:language="en" fo:country="GB"/>
    </style:style>
  </office:automatic-styles>
  <office:body>
    <office:text text:use-soft-page-breaks="true">
      <text:p text:style-name="P1">These four years were supposed to be spent on learning Zealomancy. I was not planning on falling in love. I can say something cheesy like ‘Fate had other plans’, but when I look back at everything that had happened, fate had no hand in it.</text:p>
      <text:p text:style-name="P2">Probably tried its best to stay as far as possible.</text:p>
      <text:p text:style-name="P3">It was I; it was I who made all the deliberate choices to put myself around her whenever possible.</text:p>
      <text:p text:style-name="P4">I chose Psychometry as an elective even though all my friends took Clairvoyance.</text:p>
      <text:p text:style-name="P5">I chose her portal-coaster route even though it took me an extra twenty minutes to reach home.</text:p>
      <text:p text:style-name="P6">I opted for Prof. Craillboon, fully aware that she’s incredibly cranky during lectures and annoyingly stringent with grading.</text:p>
      <text:p text:style-name="P7">But Cassie never worried about her.<text:s/></text:p>
      <text:p text:style-name="P8">And honestly, why would she?</text:p>
      <text:p text:style-name="P9">If I had an aunt who doubled as my Alchemy professor, neither would I.<text:s/></text:p>
      <text:p text:style-name="P10">What surprised me is how I did it without even realizing it. I always had excuses.</text:p>
      <text:p text:style-name="P11"/>
      <text:p text:style-name="P12"/>
      <text:soft-page-break/>
      <text:p text:style-name="P13">The seats are better here.</text:p>
      <text:p text:style-name="P14">It’s just glorified fortune-telling.</text:p>
      <text:p text:style-name="P15">She doesn’t have an attendance policy.</text:p>
      <text:p text:style-name="P16">And now, when I realize that she might permanently leave my vicinity, that’s when it struck.</text:p>
      <text:p text:style-name="P17">Cassandra Grail, what have you done to me?</text:p>
      <text:p text:style-name="P18">Whatever it was, it was too late to undo. I pulled my phone out to look at the cause of this untimely introspection.</text:p>
      <text:p text:style-name="P19">Alpaca Dabra – Tier 1 Internship Selection List</text:p>
      <text:list text:style-name="LFO1" text:continue-numbering="true">
        <text:list-item>
          <text:p text:style-name="P20">Who cares</text:p>
        </text:list-item>
        <text:list-item>
          <text:p text:style-name="P21">Never heard of ‘em.</text:p>
        </text:list-item>
        <text:list-item>
          <text:p text:style-name="P22">Can’t even spell that out.</text:p>
        </text:list-item>
        <text:list-item>
          <text:p text:style-name="P23">Cassasndra Grail – Year IV | School of Sustenance | Lonsture</text:p>
        </text:list-item>
        <text:list-item>
          <text:p text:style-name="P24">Allorex Redallion – Year IV | School of Subterfuge | Crefiya</text:p>
        </text:list-item>
      </text:list>
      <text:p text:style-name="P25">I don’t believe in the Gods, be it the old pantheon or the new. But when life throws such cruel jokes at me, I wish I believed in them for a second so that I could just hunt down the Blasphemous Blade and chop ‘em all down.</text:p>
      <text:p text:style-name="P26">SAME FIRM BUT DIFFERENT CITIES, I MEAN SERIOUSLY!?!?</text:p>
      <text:p text:style-name="P27">Aight, calm down Rex. No use panicking.<text:s/></text:p>
      <text:p text:style-name="P28"/>
      <text:soft-page-break/>
      <text:p text:style-name="P29">I soothed myself, somewhat partially.</text:p>
      <text:p text:style-name="P30">All I had were three days at hand. If I didn’t confess now, then I might as well never. We’d be realms apart to make anything possible.</text:p>
      <text:p text:style-name="P31">If, she says yes.</text:p>
      <text:p text:style-name="P32">Shut up, Star.</text:p>
      <text:p text:style-name="P33">I tossed my phone aside and let my head free-fall onto my pillow.</text:p>
      <text:p text:style-name="P34"><text:span text:style-name="T35">Say bro, let’s say you go ahead and confess. What makes you think she’ll say yes?</text:span><text:span text:style-name="T36"><text:s/></text:span></text:p>
      <text:p text:style-name="P37">When did I say I was counting on a yes?</text:p>
      <text:p text:style-name="P38">Then what’s the point?</text:p>
      <text:p text:style-name="P39">So that come what may, I can sleep without regrets. Go to bed, Star. We’ve got exams tomorrow.</text:p>
      <text:p text:style-name="P40">And then I closed my eyes.</text:p>
      <text:p text:style-name="P41">I woke up before my alarm could wake me up. Most people I know set a bazillion alarms, and I barely respect the one I set.<text:s/></text:p>
      <text:p text:style-name="P42">Still, it took me a while to pull myself out of bed, freshen up, and get ready for college. A whole 45-minutes, half-an-hour of which was spent on deciding what to wear.<text:s/></text:p>
      <text:p text:style-name="P43"><text:span text:style-name="T44">Don’t bother, bro. You’ll pick red again anyway.</text:span></text:p>
      <text:soft-page-break/>
      <text:p text:style-name="P45"><text:span text:style-name="T46">Pack my bags, Star. I gotta check something.<text:s/></text:span><text:span text:style-name="T47">I told her, slithering into a Red Sweatshirt.</text:span></text:p>
      <text:p text:style-name="P48"><text:span text:style-name="T49">My bag bounced up and swerved around me to the other end of the room and landed on my study table with a thud, knocking my keyholder down.</text:span></text:p>
      <text:p text:style-name="P50"><text:span text:style-name="T51">At least she’s helping.</text:span></text:p>
      <text:p text:style-name="P52">I went on my computer to check the timetable. Our exams usually start at 9:00 AM, but I didn’t know which one it was today.<text:s/></text:p>
      <text:p text:style-name="P53">Which means it wasn’t important enough to bother studying.</text:p>
      <text:p text:style-name="P54">I scrolled through the mail and landed on the table. It was PEAP.</text:p>
      <text:p text:style-name="P55">Professional Ethics in Arcane Practices. Fuck.</text:p>
      <text:p text:style-name="P56">Star had packed my bag by this time and was already tucked into her bottle. I checked to see if she was strapped in all right and then went down for breakfast.</text:p>
      <text:p text:style-name="P57">I reached the Portal-Coaster Station at around 7.45 AM. A single glance around the place could tell you it was a Monday morning.<text:s/></text:p>
      <text:p text:style-name="P58">Schoolkids in uniforms were running here and there, screaming and laughing. People in suits fast-walked frantically towards the various terminals. Peddlers with all kinds of pseudo-magical items roamed the corridors as usual. Yet I couldn’t find the one I was searching for.</text:p>
      <text:p text:style-name="P59">She’s not here, bro. You are late.</text:p>
      <text:p text:style-name="P60"/>
      <text:soft-page-break/>
      <text:p text:style-name="P61">We don’t always take the same coaster on the way to college. There is a station that is closer to her place, which she often prefers.</text:p>
      <text:p text:style-name="P62">But on exam days, she takes my terminal after spending some time studying in the morning.</text:p>
      <text:p text:style-name="P63">Perhaps she thought PEAP was not worth investing extra time revising.</text:p>
      <text:p text:style-name="P64">I hated PEAP. Not because it was hard, but it was genuinely a slog to finish. As Zealomancers, we had very few theoretical subjects that required us to use a pen and paper, and this was the worst of them all.</text:p>
      <text:p text:style-name="P65">PEAP was not about how well you understood ethics and morality; it was about how fast and how much of the paper you could fill in three hours.</text:p>
      <text:p text:style-name="P66">By the time I reached campus, it was 8.15 AM. The crowd was minimal this day, since most courses didn’t have written exams in all semesters, and everyone who was here was not too enthusiastic about them either. I couldn’t feel the usual rush in the air that comes with exam season.</text:p>
      <text:p text:style-name="P67">I did a quick sweep around the Shuttle stop to see if I could find Cassie there.</text:p>
      <text:p text:style-name="P68"><text:span text:style-name="T69">“You reached?”<text:s/></text:span><text:span text:style-name="T70">I pulled out my phone and texted.</text:span></text:p>
      <text:p text:style-name="P71"><text:span text:style-name="T72">“I need someone to quiz me on PEAP lol.”<text:s/></text:span><text:span text:style-name="T73">I double-texted.</text:span></text:p>
      <text:p text:style-name="P74">Ever since the confession plan hit my plate, I haven’t talked to her yet. I called her on the night we got the placement mail to congratulate her, but she didn’t pick up. Never called back either.</text:p>
      <text:soft-page-break/>
      <text:p text:style-name="P75">Perhaps you are being too annoying, bro.</text:p>
      <text:p text:style-name="P76">Quiet Star, there are RBs here. I’ll be questioned for carrying you around.</text:p>
      <text:p text:style-name="P77">Technically, I am your homework.</text:p>
      <text:p text:style-name="P78"><text:span text:style-name="T79">She was not wrong, but it would take a whole lot of explaining for that to make sense, and the Prefects were not the patient kind.</text:span></text:p>
      <text:p text:style-name="P80"><text:span text:style-name="T81">Most will jump at any chance to flex the powers that come with that stupid Red Badge. A student smuggling in a forbidden Huskenshade will be the catch of a lifetime.</text:span></text:p>
      <text:p text:style-name="P82"><text:span text:style-name="T83">Still, I needed to talk to her. My school and hers didn’t have a lot of subjects in common. After today, all we had left were thesis presentations and live combat practicals. Neither of which we’d be sharing a hall for.</text:span></text:p>
      <text:p text:style-name="P84"><text:span text:style-name="T85">While both of us had Combat Zeals, they weren’t exactly identical.</text:span></text:p>
      <text:p text:style-name="P86"><text:span text:style-name="T87">Her’s sticks closer to the definition of the term. Useful when you want to fight.</text:span><text:span text:style-name="T88"><text:s/></text:span><text:span text:style-name="T89">Mine is more useful when you want to stir up a fight.</text:span></text:p>
      <text:p text:style-name="P90"><text:span text:style-name="T91">I once took a romantic compatibility quiz for Zealomantic Classes. Apparently, it never works out between a Scholar and an Artist.</text:span></text:p>
      <text:p text:style-name="P92">Today might be my last shot.</text:p>
      <text:p text:style-name="P93"><text:span text:style-name="T94">I started walking towards my exam hall. It was a couple of buildings away from the Coaster Stop, and the route leading to the written exam block cut straight through the middle of the campus. On either side, I could see students restless, many with their phones out. Some were<text:s/></text:span><text:soft-page-break/><text:span text:style-name="T95">waving it around, some holding it high, and some were even tapping it on their palms. I took mine out just to check.</text:span></text:p>
      <text:p text:style-name="P96"><text:span text:style-name="T97">Cassie did not ignore my texts; they were never delivered.</text:span></text:p>
      <text:p text:style-name="P98">Is there no signal anywhere around campus? What is going on?</text:p>
      <text:p text:style-name="P99"><text:span text:style-name="T100">I wondered. I called my friend Arky just to verify—not reachable. I decided to just ask him in person and made my way to the exam hall.</text:span></text:p>
      <text:p text:style-name="P101"><text:span text:style-name="T102">I started spotting more and more RBs the closer I got to the hall. Quite an unusual sight to see them at every turn like this, given that their role demands them to be scattered across the campus.</text:span></text:p>
      <text:p text:style-name="P103">Shortly, I was in front of my designated building – AB3. The sign that was meant to read “Academic Block 3” right outside the building was covered by a huge crowd of students, with a handful of Prefects flanking them.</text:p>
      <text:p text:style-name="P104">Is there some kind of an announcement posted?</text:p>
      <text:p text:style-name="P105"><text:span text:style-name="T106">Normally no one bothered using the bulletin. Every once in a while, you might learn of a faculty’s retirement or a Grimmizen escaping from the Hunter’s Club for the bazillionth time.</text:span></text:p>
      <text:p text:style-name="P107"><text:span text:style-name="T108">Something told me it was neither of those today.</text:span></text:p>
      <text:p text:style-name="P109"><text:span text:style-name="T110">I tried to push myself through the crowd to see what was happening. After a minute or two of trying to find a crevice to move through I gave up. My height would never allow me.</text:span></text:p>
      <text:soft-page-break/>
      <text:p text:style-name="P111">A pair of hands emerged from a small gap, pushing the curtain of students aside and skipped out, slamming headfirst into Star’s bottle on the right side of my bag.</text:p>
      <text:p text:style-name="P112">Hey! Careful, dumbass!</text:p>
      <text:p text:style-name="P113">Shh! You want me to get into trouble here Star?</text:p>
      <text:p text:style-name="P114"><text:span text:style-name="T115">The figure blitzed away as quickly as it emerged, but not before earning us the attention of a few RBs. I tried stealing a glance at their name, but I could only catch the Octopus on their ID for a split-second.</text:span></text:p>
      <text:p text:style-name="P116"><text:span text:style-name="T117">“What is going on?”, I asked a nearby Prefect who looked obviously tired of that question already.</text:span></text:p>
      <text:p text:style-name="P118"><text:span text:style-name="T119">He didn’t even bother turning, “Today’s exams stand cancelled. A professor was attacked this morning.”</text:span></text:p>
      <text:p text:style-name="P120"><text:span text:style-name="T121">Well, that explains the RB presence. The incentive for such a case would be at least an S grade in a non-core subject, for free. And Prefects were probably the only group who’d care for those.</text:span></text:p>
      <text:p text:style-name="P122"><text:span text:style-name="T123">“Is that a Husky I smell?” The Prefect sniffled.</text:span></text:p>
      <text:p text:style-name="P124">Don’t call me a—</text:p>
      <text:p text:style-name="P125"><text:span text:style-name="T126">I pulled out of the crowd before she could finish the sentence. These guys are clearly out for a good catch, and I am not in the mood to be their prey.</text:span></text:p>
      <text:p text:style-name="P127"><text:span text:style-name="T128">I moved away from the bulletin board and started walking towards the entrance of the building. It was huge eight-storey building with a large,<text:s/></text:span><text:soft-page-break/><text:span text:style-name="T129">canopied lobby with open walls. One of my favourite buildings in the entire campus due to how quiet it is on normal days.<text:s/></text:span></text:p>
      <text:p text:style-name="P130">Theoretical exams are the only reason why this, or any other AB would ever attract crowds.</text:p>
      <text:p text:style-name="P131">I looked around to check for familiar faces. A group of girls from my class often revise out here before exams.</text:p>
      <text:p text:style-name="P132"><text:span text:style-name="T133">Maybe they would’ve seen Cassie.</text:span></text:p>
      <text:p text:style-name="P134">“Allorex!” A voice called out.</text:p>
      <text:p text:style-name="P135">Few people used my full first name on campus, fewer still of those had a neutral opinion of me or better.</text:p>
      <text:p text:style-name="P136">And none of them had a reason to be here today.</text:p>
      <text:p text:style-name="P137">I turned towards the direction of the voice and saw a familiar figure walk up to me. Just like always, his uniform gleamed before I could make his face out. The Head Prefect’s coat was flamboyant for no apparent reason.</text:p>
      <text:p text:style-name="P138">It had Snowflower’s University’s Coat of Arms embroidered on the left and a string of undeserving medals hanging on the right. And those golden laced shoulder pads usually worn by Government Zealomancers droopily dangled on either side. Each button on the coat was inscribed with the symbol of the wearer’s Zealomantic Class, in this case, the Shark of Tycoons.</text:p>
      <text:p text:style-name="P139">“You’re being summoned.” He interrupted my inspection of his clothes.</text:p>
      <text:soft-page-break/>
      <text:p text:style-name="P140">“No hey, hi nothing? Must you always be so stuck up, Zafe?”</text:p>
      <text:p text:style-name="P141"><text:span text:style-name="T142">“Yes. Unlike you I have a duty to perform here. You are expected on the 6</text:span><text:span text:style-name="T143">th</text:span><text:span text:style-name="T144"><text:s/>floor, and I am to escort you.”</text:span></text:p>
      <text:p text:style-name="P145">Yeah, as if I would just nod and follow you man. “Why?” I questioned.</text:p>
      <text:p text:style-name="P146"><text:span text:style-name="T147">“You must have noticed the restlessness and the commotion around, right? A professor was attacked this morning, inside the faculty lounge. The Prefects have prepared a list of suspects, and you happen to be on that.”</text:span></text:p>
      <text:p text:style-name="P148">An invite to the faculty lounge was never a good thing. Especially not for me, especially not if this guy was sent to fetch me. His way of talking might make people think that he hates me, and that’s where most people are wrong.</text:p>
      <text:p text:style-name="P149">He just hates everybody. Out of the sixty-six students in my course, not one would dare call him a friend. I have tried and unusually failed in cracking his shell, something that I aim to fix before graduation somehow.</text:p>
      <text:p text:style-name="P150">Although it still didn’t make sense why I would be on the list, and I questioned the same to him.<text:s/></text:p>
      <text:p text:style-name="P151">“Because of your Zealoware, and—,” he paused for a second, “—history.”</text:p>
      <text:p text:style-name="P152">He said Zealoware, not Zealomancy. Which means they suspect me because of my specific kit. Regardless I wasn’t going to get more info out of this guy.</text:p>
      <text:p text:style-name="P153">“Give me a smile and I will be right behind you.”</text:p>
      <text:soft-page-break/>
      <text:p text:style-name="P154">He tried hard not to flinch or react. It’s obvious when people do that, there’s this subtlest of flinch on their face, a bit too visible on the lip if you catch it at the right time. He wasn’t going to loosen up anymore.</text:p>
      <text:p text:style-name="P155"><text:span text:style-name="T156">“No time for jokes, Redallion!” He snapped. “I suggest you teleport to the 6</text:span><text:span text:style-name="T157">th</text:span><text:span text:style-name="T158"><text:s/>floor; the lifts are down for today. Meet me outside the lounge.”</text:span></text:p>
      <text:p text:style-name="P159"><text:span text:style-name="T160">“Uhh, I can’t TP to the 6</text:span><text:span text:style-name="T161">th</text:span><text:span text:style-name="T162"><text:s/>floor.” I replied.<text:s/></text:span></text:p>
      <text:p text:style-name="P163">“Your Mobility Zeal, I know it’s a teleport.”</text:p>
      <text:p text:style-name="P164">While true, he had no idea how my Z3 worked.</text:p>
      <text:p text:style-name="P165">“Yeah, but I can’t just zap to whatever place I want, that’s not how it works.” I tried explaining.</text:p>
      <text:p text:style-name="P166">“Useless.” I caught him breathing and shot a glare, brow raised.</text:p>
      <text:p text:style-name="P167">He sighed and grabbed me by the shoulder. “You owe me 250 Kreds for this.” He said, closing his eyes and turning his head up to face where the Faculty Lounge would be on the sixth floor.</text:p>
      <text:p text:style-name="P168">250 Kreds was rather cheap for a Tycoon’s ability. I am not privy to the full details, but I do know he spends money to trigger the port and spatial awareness to pinpoint a location.<text:s/></text:p>
      <text:p text:style-name="P169">However, it was also way too unusually cheap for a two-person teleport. The third Zeal, Mobility, was meant to transport the user alone. What other constraints he has, I wonder.</text:p>
      <text:p text:style-name="P170">A golden circle illuminated on the ground around us and streaks of gold<text:s/><text:soft-page-break/>lines shot out from the ground below. It felt pleasantly warm and simultaneously caused goosebumps all over my body. Soon the streaks covered my entire view, and I couldn’t see the campus around me. A second later there was a blinding flash, and I quickly closed my eyes shut and turned away.</text:p>
      <text:p text:style-name="P171">As I felt Zafe’s grip on my shoulders loosen, I slowly opened my eyes and found myself in front of a familiar yet dreaded door—the Faculty Lounge.</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text:line-break/></text:p>
      <text:p text:style-name="P185"/>
      <text:p text:style-name="P186"/>
      <text:p text:style-name="P187"/>
      <text:p text:style-name="P188"><text:line-break/><text:line-break/></text:p>
      <text:p text:style-name="P189"/>
      <text:p text:style-name="P190"><text:s/></text:p>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text:span text:style-name="T203"><text:s/></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text:line-break/><text:line-break/></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text:span text:style-name="T24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fo:text-indent="0.5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6in" fo:page-height="9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Sanjay Bharath</dc:creator>
    <meta:creation-date>2023-01-10T02:11:00Z</meta:creation-date>
    <dc:date>2026-04-24T06:40:00Z</dc:date>
    <meta:template xlink:href="Normal" xlink:type="simple"/>
    <meta:editing-cycles>649</meta:editing-cycles>
    <meta:editing-duration>PT230760S</meta:editing-duration>
    <meta:user-defined meta:name="GrammarlyDocumentId">c4eab01fde9e05a777f22aafbaf1619795cdf32f63721c7a841bdbd40054a4d7</meta:user-defined>
    <meta:document-statistic meta:page-count="16" meta:paragraph-count="26" meta:word-count="1970" meta:character-count="13174" meta:row-count="93" meta:non-whitespace-character-count="11230"/>
  </office:meta>
</office:document-meta>
</file>