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Access Control</text:p>
          </table:table-cell>
          <table:table-cell office:value-type="string" table:style-name="ce1">
            <text:p>Gatekeeper</text:p>
          </table:table-cell>
          <table:table-cell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1">
            <text:p>Object Movement</text:p>
          </table:table-cell>
          <table:table-cell office:value-type="string" table:style-name="ce1">
            <text:p>Custodian</text:p>
          </table:table-cell>
          <table:table-cell table:style-name="ce1"/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Entity State Management<text:s/></text:p>
          </table:table-cell>
          <table:table-cell office:value-type="string" table:style-name="ce1">
            <text:p>Regulator</text:p>
          </table:table-cell>
          <table:table-cell table:style-name="ce1"/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Information Handling</text:p>
          </table:table-cell>
          <table:table-cell office:value-type="string" table:style-name="ce2">
            <text:p>Monitor</text:p>
          </table:table-cell>
          <table:table-cell table:style-name="ce1"/>
          <table:table-cell table:number-columns-repeated="4"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Sanjay Bharath</dc:creator>
    <meta:creation-date>2025-03-22T10:42:41Z</meta:creation-date>
    <dc:date>2025-07-20T05:58:58Z</dc:date>
    <meta:editing-cycles>21</meta:editing-cycles>
    <meta:editing-duration>PT5100S</meta:editing-duration>
  </office:meta>
</office:document-meta>
</file>