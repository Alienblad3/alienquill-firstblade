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fo:font-style="italic" style:font-style-asian="italic" style:font-style-complex="italic"/>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office:automatic-styles>
  <office:body>
    <office:text text:use-soft-page-breaks="true">
      <text:p text:style-name="P1">Neither dead nor alive, Fourteen strangers wake up in an unfamiliar world. Everyone seem to remember being hospitalised in a critical condition for various reasons, with a 50-50 chance of survival. A weird figure introduces itself as the ‘Harbinger’ claiming that all of them are indeed dying in the real world, perhaps more like hanging between life and death. One of them will be given the chance to defy fate and live. The catch? They’d have to beat thirteen others in ‘Hang-Balance’, a set of games, trials and tribulations meant to select the one who will get a second chance at life. Among this crew of individuals filled with a spectrum of personalities,<text:s/><text:span text:style-name="T2">who</text:span><text:s/>will be that one person? And what are these “games” that they’re expected to win?</text:p>
      <text:p text:style-name="P3"/>
      <text:p text:style-name="P4">________________________________________________________________________________</text:p>
      <text:p text:style-name="P5"/>
      <text:p text:style-name="P6">"What do you mean you<text:s/><text:span text:style-name="T7">looked</text:span><text:s/>at the murder but didn’t<text:s/><text:span text:style-name="T8">see</text:span><text:s/>it!?"</text:p>
      <text:p text:style-name="P9">Seventeen-year-old Zeke Ravensil finds out that his eyes each look at a different world when opened individually. Even before he could fully grasp this ability to exist simultaneously in three different worlds, He is summoned as the sole witness to a high-profile murder that happened right in front of him. Except, He never ‘Witnessed’ this murder, for he was looking at a different world at the time of the murder. Hunted by the murderer who wants to silence the only witness and the Police who would never believe his bizarre story, Zeke is trapped in this weird twist of fate, with no hope of escape. Pushed into to a realm beyond his own to seek answers to questions he could barely comprehend, he<text:s/>soon realises that the scope of this issue is larger than just one murder or one world.”</text:p>
      <text:p text:style-name="P10"/>
      <text:p text:style-name="P11">------------------------------------------------------------------------------------------------------------------------</text:p>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e Shadow Protagonist</dc:creator>
    <meta:creation-date>2023-04-22T04:31:00Z</meta:creation-date>
    <dc:date>2023-07-13T10:25:00Z</dc:date>
    <meta:template xlink:href="Normal.dotm" xlink:type="simple"/>
    <meta:editing-cycles>15</meta:editing-cycles>
    <meta:editing-duration>PT2520S</meta:editing-duration>
    <meta:document-statistic meta:page-count="1" meta:paragraph-count="3" meta:word-count="270" meta:character-count="1807" meta:row-count="12" meta:non-whitespace-character-count="1540"/>
  </office:meta>
</office:document-meta>
</file>