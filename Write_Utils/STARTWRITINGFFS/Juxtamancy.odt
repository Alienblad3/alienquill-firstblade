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roman"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Normal" style:family="paragraph">
      <style:paragraph-properties fo:text-align="justify"/>
    </style:style>
    <style:style style:name="T7" style:parent-style-name="DefaultParagraphFont" style:family="text">
      <style:text-properties style:font-name="Times New Roman" style:font-name-complex="Times New Roman" fo:language="en" fo:country="GB"/>
    </style:style>
    <style:style style:name="P8" style:parent-style-name="Normal" style:family="paragraph">
      <style:paragraph-properties fo:text-align="justify"/>
      <style:text-properties style:font-name="Times New Roman" style:font-name-complex="Times New Roman" fo:language="en" fo:country="GB"/>
    </style:style>
    <style:style style:name="P9" style:parent-style-name="Normal" style:family="paragraph">
      <style:paragraph-properties fo:text-align="justify"/>
      <style:text-properties style:font-name="Times New Roman" style:font-name-complex="Times New Roman" fo:language="en" fo:country="GB"/>
    </style:style>
  </office:automatic-styles>
  <office:body>
    <office:text text:use-soft-page-breaks="true">
      <text:p text:style-name="P1">Name of the Magic System:<text:s/><text:span text:style-name="T2">Juxtamancy</text:span></text:p>
      <text:p text:style-name="P3"/>
      <text:p text:style-name="P4">Description:</text:p>
      <text:p text:style-name="P5"/>
      <text:p text:style-name="Standard">Juxtamancy allows the user to use one of three pairs of abilities.</text:p>
      <text:p text:style-name="Standard"/>
      <text:p text:style-name="Standard">Each pair has one ability from the Crown Track, and one from the Shackle Track.</text:p>
      <text:p text:style-name="Standard"/>
      <text:p text:style-name="Standard">The Health Pair:</text:p>
      <text:p text:style-name="Standard"><text:tab/></text:p>
      <text:p text:style-name="Standard"><text:tab/>Bless – Healing, Rejuvenating, Recuperate</text:p>
      <text:p text:style-name="Standard"><text:tab/></text:p>
      <text:p text:style-name="Standard"><text:tab/>Curse – Ail, Inhibit and Weaken</text:p>
      <text:p text:style-name="Standard"/>
      <text:p text:style-name="Standard">The Knowledge Pair:</text:p>
      <text:p text:style-name="Standard"><text:tab/></text:p>
      <text:p text:style-name="Standard"><text:tab/>Infer – Enhanced Perception, Mind Reading, Psychometry</text:p>
      <text:p text:style-name="Standard"/>
      <text:p text:style-name="Standard"><text:tab/>Wander – Astral Projection (Only to known/Previously physically visited areas)</text:p>
      <text:p text:style-name="Standard"/>
      <text:p text:style-name="Standard">The Asset Pair:</text:p>
      <text:p text:style-name="Standard"/>
      <text:p text:style-name="Standard"><text:tab/>Yield – Negate Ownership. Force Control Relinquish, Disarm, Open Locks etc.</text:p>
      <text:p text:style-name="Standard"/>
      <text:p text:style-name="Standard"><text:tab/>Haunt – Telekinesis, Ragdoll, Possession</text:p>
      <text:p text:style-name="Standard"/>
      <text:p text:style-name="Standard"/>
      <text:p text:style-name="Standard">Practice:</text:p>
      <text:p text:style-name="Standard"/>
      <text:p text:style-name="Standard">A Juxtamancer is born with affinity to a Pair and that would be the only pair they can use.</text:p>
      <text:p text:style-name="Standard"/>
      <text:p text:style-name="Standard">Their affinity allows them to use both Tracks in a Pair.</text:p>
      <text:p text:style-name="Standard"/>
      <text:p text:style-name="Standard">However, proficiency, growth and expertise all depend on how much they use either track.</text:p>
      <text:p text:style-name="Standard"/>
      <text:p text:style-name="Standard"/>
      <text:p text:style-name="Standard">Proficiency is tracked via a score format.</text:p>
      <text:p text:style-name="Standard"/>
      <text:p text:style-name="Standard">A 50/50 Juxtamancer is equally proficient in both tracks, whereas a 75/25 is more proficient in the Crown Track rather than the Shackle Track.</text:p>
      <text:p text:style-name="Standard"/>
      <text:p text:style-name="Standard">The number not only show the proficiency but also how much Energy it takes to use the ability and how their defences will hold up when on the receiving end of the said Track.</text:p>
      <text:p text:style-name="Standard"/>
      <text:p text:style-name="Standard">Someone with a 80/20 can Heal wounds that cannot be healed by someone who has say 60/40. Similarly someone with a 10/90 with Haunt may be able to briefly control a Human, but someone with a 45/55 might only control a bird for a short while at best. Same applies for what kind of objects and how heavy of an object they can move if they lean towards telekinesis rather than possession.</text:p>
      <text:p text:style-name="Standard"/>
      <text:p text:style-name="Standard">Defensively, if the proficiency is better than the user’s enemy’s they’ll be able to resist the abilities of the corresponding type better.</text:p>
      <text:p text:style-name="Standard"/>
      <text:p text:style-name="Standard">Altering Proficiencies:</text:p>
      <text:p text:style-name="Standard"/>
      <text:p text:style-name="Standard">The Proficiency Ratio can be changed in two ways:</text:p>
      <text:p text:style-name="Standard"/>
      <text:p text:style-name="Standard">1. The more you use a track the more that goes up and the other comes down.</text:p>
      <text:p text:style-name="Standard"/>
      <text:p text:style-name="Standard">2. Behaviour that resonates with the Track. (Actions, Choices, and to certain extent thoughts when they end up having consequences)</text:p>
      <text:p text:style-name="Standard"/>
      <text:p text:style-name="Standard">Example: A doctor can easily raise their Crown path to 90, and a Stage Magician can easily raise their Shackle path to 90 similarly. One through repeated service and help, and the other through deception and misdirection.</text:p>
      <text:p text:style-name="Standard"/>
      <text:p text:style-name="Standard">Tracks themselves don’t have any inherent morality (Although society believes otherwise), as evident from the previous example, a stage magician isn’t necessarily evil, its just their job to be deceptive.</text:p>
      <text:p text:style-name="Standard"/>
      <text:p text:style-name="Standard">Offensive Interactions:</text:p>
      <text:p text:style-name="Standard"/>
      <text:p text:style-name="Standard">Either Track of each Pair can be used to neutralize the other. The better the ratio the easier it is to neutralize.</text:p>
      <text:p text:style-name="Standard"/>
      <text:p text:style-name="Standard">Even though the pairs have largely pre-defined functions, individual quirks and eccentricities along with proficiency will lead to some slight variations in abilities.</text:p>
      <text:p text:style-name="Standard"/>
      <text:p text:style-name="Standard">For Security Reasons, no Track can go above 90 or below 10, all Juxtamancers have a universal hard-cap.</text:p>
      <text:p text:style-name="Standard"/>
      <text:p text:style-name="Standard">Switching Tracks and between the two abilities is mostly seamless but depending on the Proficiency it might differ.</text:p>
      <text:p text:style-name="Standard"/>
      <text:p text:style-name="Standard">Impact of proficiency:</text:p>
      <text:p text:style-name="Standard"/>
      <text:p text:style-name="Standard">75/20 or 25/75 – One Track is Dominant, but the other is still decent enough for selective defensive use cases and for general utility.</text:p>
      <text:p text:style-name="Standard"/>
      <text:p text:style-name="Standard">90/10 or 10/90 – One Track greatly overshadows the other, increasing the positive effects of the former and the negative effects to the latter.</text:p>
      <text:p text:style-name="Standard"/>
      <text:p text:style-name="Standard">50/50 -</text:p>
      <text:p text:style-name="Standard"/>
      <text:p text:style-name="Standard"/>
      <text:p text:style-name="Standard"><text:s/></text:p>
      <text:p text:style-name="Standard"/>
      <text:p text:style-name="Standard"/>
      <text:p text:style-name="Standard"/>
      <text:p text:style-name="Standard"/>
      <text:p text:style-name="Standard"/>
      <text:p text:style-name="Standard"/>
      <text:p text:style-name="Standard"><text:tab/></text:p>
      <text:p text:style-name="Standard"/>
      <text:p text:style-name="Standard"/>
      <text:p text:style-name="Standard"/>
      <text:p text:style-name="Standard">Chapter 1 – Arcane Fidelity</text:p>
      <text:p text:style-name="Standard"/>
      <text:p text:style-name="Standard">Seeing a five-year-old floating on a schoolbag is a telltale sign of pathetic parentage. People believe Wi-Fi causes cancer yet collectively choose to connect to a public Ar-Fi, just to avoid carrying stuff around. The price one pays for free Telekinesis is far steeper than Chemotherapy.</text:p>
      <text:p text:style-name="Standard"/>
      <text:p text:style-name="Standard"/>
      <text:p text:style-name="Standard">In the next stage, players are asked to give<text:s/>five<text:s/>rules of life they have for themselves.<text:s/>And five quotes they often use. The more<text:s/>interesting<text:s/>they are (And they have to be true) the more points.<text:line-break/><text:line-break/><text:line-break/>The Speaker Comes up with these:<text:line-break/><text:line-break/>Rules:<text:line-break/><text:line-break/>“Only spend energy on things you enjoy.”</text:p>
      <text:p text:style-name="Standard">“No academics post 8PM, no matter what.”</text:p>
      <text:p text:style-name="Standard">“No Coffee, No Chocolates, No Booze, No Smoke, No Drugs.”</text:p>
      <text:p text:style-name="Standard">“Always weave a tale when you talk to a crowd.”</text:p>
      <text:p text:style-name="Standard">“No Game, No Life.”</text:p>
      <text:p text:style-name="Standard"/>
      <text:p text:style-name="Standard">Quotes:</text:p>
      <text:p text:style-name="Standard">“I’ll take that as a compliment, thank you.”</text:p>
      <text:p text:style-name="Standard">“One can never be too sure.”</text:p>
      <text:p text:style-name="Standard">“Don’t ask questions to which you already know the answer.”</text:p>
      <text:p text:style-name="Standard">“I’m an ensemble of eccentricities, what can I say?”</text:p>
      <text:p text:style-name="Standard">“The actions of a subset don’t always reflect the intent of the masses.”</text:p>
      <text:p text:style-name="Standard"/>
      <text:p text:style-name="Standard">Simulate an extensive conversation between a team after they see his entries.</text:p>
      <text:p text:style-name="Standard"/>
      <text:p text:style-name="Standard"/>
      <text:p text:style-name="Standard"/>
      <text:p text:style-name="Standard">In the next round, the game was a series of sports. Football, Cricket and then Badminton, back to back. Even in rounds where they Speaker’s specialities where not the center of focus, he was never super struggling, he was often comfortable average. But after this round, for the first time, he was in the bottom of the barrel in scores. And he didn’t make a fuzz, said GG to the opponents and walked away smiling claiming that he’s not surprised and was expecting this to happen.</text:p>
      <text:p text:style-name="Standard"/>
      <text:p text:style-name="Standard">Simulate an extensive conversation between a team that witnessed this.</text:p>
      <text:p text:style-name="Standard"/>
      <text:p text:style-name="Standard"/>
      <text:p text:style-name="Standard">The next round was a debate. The topic was one Atheism vs Theism. Immediately after the Speaker’s loss round. Someone passively heard him say “Well, I gotta make amends for the last round now, eh?”.</text:p>
      <text:p text:style-name="Standard"/>
      <text:p text:style-name="Standard">A couple of people saw his teammates talking about how he looked a tad bit serious this time, even though it was only ever so slightly visible since they were his closest friends.</text:p>
      <text:p text:style-name="Standard"/>
      <text:p text:style-name="P6">And after that he started the debate with this:<text:line-break/><text:line-break/><text:soft-page-break/><text:span text:style-name="T7">“God is a concept created by humans to personify hope and gratitude, nothing more, nothing less. Fictional and fantastical elements were then added to the concept to make God more relatable, appealing and influential, giving rise to mythologies. Most Pantheons are plagued by very human flaws and it shows. And somewhere down the line, for reasons that could vary from region to region, people – most probably the very eloquent or very influential ones, added politics to mythology and that gave rise to religion. I don’t need the former, and nobody needs the latter.”</text:span></text:p>
      <text:p text:style-name="P8"/>
      <text:p text:style-name="Standard">Simulate an extensive conversation between the team that were his opponents, after the debate. You can infer and decide who won.</text:p>
      <text:p text:style-name="P9"/>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roman"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Sanjay Bharath</dc:creator>
    <meta:creation-date>2025-05-03T23:43:00Z</meta:creation-date>
    <dc:date>2025-07-21T18:11:00Z</dc:date>
    <meta:template xlink:href="Normal.dotm" xlink:type="simple"/>
    <meta:editing-cycles>34</meta:editing-cycles>
    <meta:editing-duration>PT7620S</meta:editing-duration>
    <meta:document-statistic meta:page-count="4" meta:paragraph-count="12" meta:word-count="913" meta:character-count="6111" meta:row-count="43" meta:non-whitespace-character-count="5210"/>
  </office:meta>
</office:document-meta>
</file>