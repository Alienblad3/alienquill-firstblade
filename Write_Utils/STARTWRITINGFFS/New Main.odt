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roman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 fo:text-indent="0cm" style:auto-text-indent="false"/>
    </style:style>
    <style:style style:name="P2" style:family="paragraph" style:parent-style-name="Standard">
      <style:paragraph-properties fo:text-align="justify" style:justify-single-word="false" fo:text-indent="0cm" style:auto-text-indent="false"/>
      <style:text-properties style:font-name="LiberationSerif"/>
    </style:style>
    <style:style style:name="P3" style:family="paragraph" style:parent-style-name="Standard" style:master-page-name="MP0">
      <style:paragraph-properties fo:text-align="justify" style:justify-single-word="false" fo:text-indent="0cm" style:auto-text-indent="false" style:page-number="auto" fo:break-before="page"/>
      <style:text-properties officeooo:paragraph-rsid="0008ae79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T2" style:family="text">
      <style:text-properties fo:color="#f9f9f9" loext:opacity="100%" style:font-name="Segoe UI" fo:background-color="#171717" loext:char-shading-value="0" style:font-name-complex="Segoe U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Default_20_Paragraph_20_Font"><text:span text:style-name="T1">Chapter 1</text:span></text:span></text:p>
      <text:p text:style-name="P2">Bro’s Coop</text:p>
      <text:p text:style-name="P2">Paperlane</text:p>
      <text:p text:style-name="P2">Reelbarrow</text:p>
      <text:p text:style-name="P2">Frightsyde</text:p>
      <text:p text:style-name="P2"/>
      <text:p text:style-name="P2">Fallacyte</text:p>
      <text:p text:style-name="P2"/>
      <text:p text:style-name="P2"><text:s text:c="4"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roman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fo:hyphenation-ladder-count="no-limit" fo:text-indent="1.27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5.24cm" fo:page-height="22.86cm" style:num-format="1" style:print-orientation="portrait" fo:margin-top="1.501cm" fo:margin-bottom="1.50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title/>
    <meta:creation-date>2023-01-10T02:11:00Z</meta:creation-date>
    <dc:date>2025-01-26T14:43:20.709000000</dc:date>
    <meta:editing-cycles>369</meta:editing-cycles>
    <meta:editing-duration>PT3H25M55S</meta:editing-duration>
    <meta:document-statistic meta:table-count="0" meta:image-count="0" meta:object-count="0" meta:page-count="1" meta:paragraph-count="7" meta:word-count="8" meta:character-count="61" meta:non-whitespace-character-count="55"/>
    <meta:user-defined meta:name="GrammarlyDocumentId">c4eab01fde9e05a777f22aafbaf1619795cdf32f63721c7a841bdbd40054a4d7</meta:user-defined>
    <meta:template xlink:type="simple" xlink:actuate="onRequest" xlink:title="" xlink:href="Normal"/>
  </office:meta>
</office:document-meta>
</file>