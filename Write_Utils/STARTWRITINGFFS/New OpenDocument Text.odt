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77f94" officeooo:paragraph-rsid="00077f94"/>
    </style:style>
    <style:style style:name="P2" style:family="paragraph" style:parent-style-name="Standard">
      <style:text-properties style:font-name="Times New Roman" fo:font-weight="normal" officeooo:rsid="000a904d" officeooo:paragraph-rsid="00077f94" style:font-weight-asian="normal" style:font-weight-complex="normal"/>
    </style:style>
    <style:style style:name="P3" style:family="paragraph" style:parent-style-name="Standard">
      <style:text-properties style:font-name="Times New Roman" fo:font-weight="normal" officeooo:rsid="000a904d" officeooo:paragraph-rsid="000a904d" style:font-weight-asian="normal" style:font-weight-complex="normal"/>
    </style:style>
    <style:style style:name="P4" style:family="paragraph" style:parent-style-name="Standard">
      <style:text-properties style:font-name="Times New Roman" fo:font-weight="normal" officeooo:rsid="000a904d" officeooo:paragraph-rsid="000d0ced" style:font-weight-asian="normal" style:font-weight-complex="normal"/>
    </style:style>
    <style:style style:name="P5" style:family="paragraph" style:parent-style-name="Standard">
      <style:text-properties style:font-name="Times New Roman" fo:font-weight="normal" officeooo:rsid="000a904d" officeooo:paragraph-rsid="000e48ab" style:font-weight-asian="normal" style:font-weight-complex="normal"/>
    </style:style>
    <style:style style:name="P6" style:family="paragraph" style:parent-style-name="Standard">
      <style:text-properties style:font-name="Times New Roman" fo:font-weight="normal" officeooo:rsid="000a904d" officeooo:paragraph-rsid="000faff4" style:font-weight-asian="normal" style:font-weight-complex="normal"/>
    </style:style>
    <style:style style:name="P7" style:family="paragraph" style:parent-style-name="Standard">
      <style:text-properties style:font-name="Times New Roman" fo:font-weight="normal" officeooo:rsid="000a904d" officeooo:paragraph-rsid="00107c3e" style:font-weight-asian="normal" style:font-weight-complex="normal"/>
    </style:style>
    <style:style style:name="P8" style:family="paragraph" style:parent-style-name="Standard">
      <style:text-properties style:font-name="Times New Roman" fo:font-weight="normal" officeooo:rsid="000a904d" officeooo:paragraph-rsid="00119251" style:font-weight-asian="normal" style:font-weight-complex="normal"/>
    </style:style>
    <style:style style:name="P9" style:family="paragraph" style:parent-style-name="Standard">
      <style:text-properties style:font-name="Times New Roman" fo:font-weight="normal" officeooo:rsid="000faff4" officeooo:paragraph-rsid="000faff4" style:font-weight-asian="normal" style:font-weight-complex="normal"/>
    </style:style>
    <style:style style:name="P10" style:family="paragraph" style:parent-style-name="Standard">
      <style:text-properties style:font-name="Times New Roman" fo:font-weight="normal" officeooo:rsid="00107c3e" officeooo:paragraph-rsid="00107c3e" style:font-weight-asian="normal" style:font-weight-complex="normal"/>
    </style:style>
    <style:style style:name="P11" style:family="paragraph" style:parent-style-name="Standard">
      <style:text-properties style:font-name="Times New Roman" fo:font-weight="normal" officeooo:rsid="00119251" officeooo:paragraph-rsid="00119251" style:font-weight-asian="normal" style:font-weight-complex="normal"/>
    </style:style>
    <style:style style:name="P12" style:family="paragraph" style:parent-style-name="Standard">
      <style:text-properties style:font-name="Times New Roman" fo:font-style="italic" fo:font-weight="normal" officeooo:rsid="0012f953" officeooo:paragraph-rsid="0012f953" style:font-style-asian="italic" style:font-weight-asian="normal" style:font-style-complex="italic" style:font-weight-complex="normal"/>
    </style:style>
    <style:style style:name="P13" style:family="paragraph" style:parent-style-name="Standard">
      <style:text-properties style:font-name="Times New Roman" fo:font-style="italic" fo:font-weight="normal" officeooo:rsid="0012f953" officeooo:paragraph-rsid="0014b073" style:font-style-asian="italic" style:font-weight-asian="normal" style:font-style-complex="italic" style:font-weight-complex="normal"/>
    </style:style>
    <style:style style:name="P14" style:family="paragraph" style:parent-style-name="Standard">
      <style:text-properties style:font-name="Times New Roman" fo:font-style="italic" fo:font-weight="normal" officeooo:rsid="0014b073" officeooo:paragraph-rsid="0014b073" style:font-style-asian="italic" style:font-weight-asian="normal" style:font-style-complex="italic" style:font-weight-complex="normal"/>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0bff3e"/>
    </style:style>
    <style:style style:name="T4" style:family="text">
      <style:text-properties officeooo:rsid="000d0ced"/>
    </style:style>
    <style:style style:name="T5" style:family="text">
      <style:text-properties officeooo:rsid="000e48ab"/>
    </style:style>
    <style:style style:name="T6" style:family="text">
      <style:text-properties fo:font-style="italic" officeooo:rsid="000e48ab"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e48ab" style:font-style-asian="normal" style:font-style-complex="normal"/>
    </style:style>
    <style:style style:name="T9" style:family="text">
      <style:text-properties fo:font-style="normal" officeooo:rsid="000e5ea2" style:font-style-asian="normal" style:font-style-complex="normal"/>
    </style:style>
    <style:style style:name="T10" style:family="text">
      <style:text-properties fo:font-style="normal" officeooo:rsid="000faff4" style:font-style-asian="normal" style:font-style-complex="normal"/>
    </style:style>
    <style:style style:name="T11" style:family="text">
      <style:text-properties fo:font-style="normal" officeooo:rsid="00119251" style:font-style-asian="normal" style:font-style-complex="normal"/>
    </style:style>
    <style:style style:name="T12" style:family="text">
      <style:text-properties fo:font-style="normal" officeooo:rsid="0012f953" style:font-style-asian="normal" style:font-style-complex="normal"/>
    </style:style>
    <style:style style:name="T13" style:family="text">
      <style:text-properties fo:font-style="normal" officeooo:rsid="0014b073" style:font-style-asian="normal" style:font-style-complex="normal"/>
    </style:style>
    <style:style style:name="T14" style:family="text">
      <style:text-properties fo:font-style="normal" officeooo:rsid="0014e39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70"/><text:span text:style-name="T1"><text:s/></text:span><text:span text:style-name="T2">Prologue</text:span></text:p>
      <text:p text:style-name="P2"/>
      <text:p text:style-name="P3"/>
      <text:p text:style-name="P3">The pitch-black lighthouse was illuminated by occasional lightning strikes. At the centre of the room sat a middle-aged man, gagged, with his limbs bound to a wooden chair. The roaring storm left no room for silence. Waves crashed onto the base of the lighthouse. Three other men were in the room, <text:span text:style-name="T3">standing </text:span>right in front of the wooden chair. <text:span text:style-name="T3">A fourth man restlessly paced around the room. The middle-aged man struggled, trying to move his body in anyway possible. The chair squeaked for every move he made. Escape was not an option.</text:span></text:p>
      <text:p text:style-name="P3"/>
      <text:p text:style-name="P4">“So, Can you show me now?” <text:span text:style-name="T3">said James, glaring at the man who stood right next to him with a smug look on his face. “</text:span><text:span text:style-name="T4">Well,</text:span><text:span text:style-name="T3">” </text:span><text:span text:style-name="T4">The man smirked. Although it looked more like a devilish grin under the shadow of the brim of his hat cast over his face by the lightning strikes. His round, Purple-tinted spectacles only intensified it. “What exactly do you want me to show you, Boy?”</text:span></text:p>
      <text:p text:style-name="P4"/>
      <text:p text:style-name="P5">“<text:span text:style-name="T4">Proof, Obviously. If you guys aren’t actually from this world, prove it to me then.</text:span>” <text:span text:style-name="T5">said James. The gagged man’s eyes seemed to open wide for a second, upon hearing those words. “Very well,” the man paused and glanced behind James. A young man donning a buzz-cut stood there, wrapping bandages around his forearms. “Rex, please reposition our guest, will you?”</text:span></text:p>
      <text:p text:style-name="P5"/>
      <text:p text:style-name="P6"><text:span text:style-name="T5">“Ye, Ye” Rex tightened his bandages and swiftly got behind the chair. “Ha, You’re about to be taken for quite the ride mate.” He whispered into the </text:span><text:span text:style-name="T6">guest’s </text:span><text:span text:style-name="T8">ears. He dragged the chair around the room, </text:span><text:span text:style-name="T9">as the man in the chair whimpered. “This place should be good enough.” He pressed the chair against an open window. The rain drizzled onto the gagged man’s clothes. “He’s all yours Rokolov” Rex announced, as if he was in a different floor. “Yes, now move.” Rokolov spoke in a commanding tone.</text:span></text:p>
      <text:p text:style-name="P5"><text:span text:style-name="T9"/></text:p>
      <text:p text:style-name="P5"><text:span text:style-name="T9">“Oh come on! Stop this madness already!,” The fourth man finally spoke. “Seriously J, Can’t you see these guys are sketchy as hell!?”</text:span></text:p>
      <text:p text:style-name="P5"><text:span text:style-name="T9"/></text:p>
      <text:p text:style-name="P5"><text:span text:style-name="T9">“Oh relax dad, Let me handle this please.” James looked at his father and gave him a reassuring smile. But of course, He wasn’t reassured, Not even in the slightest.</text:span></text:p>
      <text:p text:style-name="P5"><text:span text:style-name="T9"/></text:p>
      <text:p text:style-name="P5"><text:span text:style-name="T9">“Mr. Woods, Is anything bothering you?” Rokolov said in a rather calm and soothing voice. Rex didn’t even know that he was capable of speaking like that. “</text:span><text:span text:style-name="T10">Bothering?!</text:span><text:span text:style-name="T9">” </text:span><text:span text:style-name="T10">Mr. Woods gasped. “Of course not, Everything is fine.” His blatant sarcasm was obvious to even the ever-airheaded Rex.</text:span></text:p>
      <text:p text:style-name="P5"><text:span text:style-name="T10"/></text:p>
      <text:p text:style-name="P8"><text:span text:style-name="T10">“Yo old guy Daniel, What’s your problem mate?,” Rex Yawned at Mr. Woods. <text:s/></text:span></text:p>
      <text:p text:style-name="P8"><text:span text:style-name="T10"/></text:p>
      <text:p text:style-name="P8"><text:span text:style-name="T10">“My problem is, A bunch of delusional clowns are trying to scam my son with a ridiculous deal and this idiot is falling for it!” Daniel roared. </text:span></text:p>
      <text:p text:style-name="P7"><text:span text:style-name="T10"/></text:p>
      <text:p text:style-name="P7"><text:span text:style-name="T10">“Dad!,” Yelled James. “No one, is scamming anyone. Let’s hear them out.”</text:span></text:p>
      <text:p text:style-name="P5"><text:span text:style-name="T10"/></text:p>
      <text:p text:style-name="P9"><text:span text:style-name="T7">Daniel grumbled. “Whatever, Prove this ‘Other world’ of yours right now, or we’re leaving.” He said, reluctantly.</text:span></text:p>
      <text:p text:style-name="P9"><text:span text:style-name="T7"/></text:p>
      <text:p text:style-name="P10"><text:span text:style-name="T7">Rokolov cleared his throat. He bent down and picked up a small rock. The light house was quite dilapidated. Given how the place was falling apart, rocks and other debris could be found ev</text:span><text:span text:style-name="T11">e</text:span><text:span text:style-name="T7">rywhere.</text:span></text:p>
      <text:p text:style-name="P10"><text:span text:style-name="T7"/></text:p>
      <text:p text:style-name="P10"><text:span text:style-name="T7"/></text:p>
      <text:p text:style-name="P10"><text:soft-page-break/><text:span text:style-name="T7"/></text:p>
      <text:p text:style-name="P10"><text:span text:style-name="T7">“</text:span><text:span text:style-name="T11">I’ll give you your proof. But don’t expect an explanation.</text:span><text:span text:style-name="T7">” </text:span><text:span text:style-name="T11">said Rokolov.</text:span></text:p>
      <text:p text:style-name="P10"><text:span text:style-name="T11"/></text:p>
      <text:p text:style-name="P11"><text:span text:style-name="T7">He grabbed the rock with his middle, index and thumb fingers and stretched his arm out. “Do you people mind if he dies?” asked Rokolov. “Yes” Daniel briskly answered, interrupting whatever James was about to say.</text:span></text:p>
      <text:p text:style-name="P11"><text:span text:style-name="T7"/></text:p>
      <text:p text:style-name="P11"><text:span text:style-name="T7">“Okay then,” Rokolov’s arm was still stretched out. He positioned himself </text:span><text:span text:style-name="T12">in front of the chair.</text:span></text:p>
      <text:p text:style-name="P12">He’s going to throw a rock at that guy? <text:span text:style-name="T7">James wondered. Daniel was getting restless with each passing second.</text:span></text:p>
      <text:p text:style-name="P12"><text:span text:style-name="T7"/></text:p>
      <text:p text:style-name="P12"><text:span text:style-name="T7">“Armament Clause:,” Rokolov whispered. “Peasant’s Projectile.” The rock glowed, gaining a bluish tint. Rokolov brought his arm near his ear. Small sparks appeared around the rock. He quickly flicked the rock at the gagged man with a devilish grin on his face. No one could see the rock leave Rokolov’s hand, but only a blue flash of light accompanied with a shriek. Blood spurted out of the gagged man’s right shoulder. As he began to wriggle in pain, the chair squeaked more than ever </text:span><text:span text:style-name="T13">and eventually</text:span><text:span text:style-name="T7"> toppled. </text:span><text:span text:style-name="T13">Tears poured out of his eye sockets. His screams were silenced by the gag, but his agony was apparent to both James and his father. </text:span><text:span text:style-name="T7">He was shot. Or at least that’s what it looked like.</text:span></text:p>
      <text:p text:style-name="P12"><text:span text:style-name="T7"/></text:p>
      <text:p text:style-name="P12"><text:span text:style-name="T7">“</text:span><text:span text:style-name="T13">Ah, Seriously Rok? a low-ember level clausal art?</text:span><text:span text:style-name="T7">” </text:span><text:span text:style-name="T13">Rex sighed. “You could’ve shown them something flashier, more intimidating even, Perhaps your Secret Factor. Bet that would stop that old man from asking questions.” He quickly glanced at Daniel, who stood expressionless in disbelief.</text:span></text:p>
      <text:p text:style-name="P12"><text:span text:style-name="T13"/></text:p>
      <text:p text:style-name="P13"><text:span text:style-name="T13">“Our Vitadae here is limited Rex. And we can’t recover it upon depletion either. Pretty sure you were informed at the briefing.” <text:s/>Rokolov gave his young ally a condescending look.</text:span></text:p>
      <text:p text:style-name="P12"><text:span text:style-name="T13"/></text:p>
      <text:p text:style-name="P14"><text:span text:style-name="T7">James quickly collected himself. “Wow!” He exclaimed. “What was that!?, Or more like, How did you do that!?” His eyes lit up and his head was filled with tonnes of new questions.</text:span></text:p>
      <text:p text:style-name="P14"><text:span text:style-name="T7"/></text:p>
      <text:p text:style-name="P14"><text:span text:style-name="T7">“No explanations, Remember?” </text:span><text:span text:style-name="T14">Said Rokolov. Daniel had finally recovered from the shock.</text:span></text:p>
      <text:p text:style-name="P14"><text:span text:style-name="T14"/></text:p>
      <text:p text:style-name="P14"><text:span text:style-name="T14"/></text:p>
      <text:p text:style-name="P14"><text:span text:style-name="T14"/></text:p>
      <text:p text:style-name="P10"><text:span text:style-name="T7"/></text:p>
      <text:p text:style-name="P10"><text:span text:style-name="T7"/></text:p>
      <text:p text:style-name="P10"><text:span text:style-name="T7"/></text:p>
      <text:p text:style-name="P10"><text:span text:style-name="T7"/></text:p>
      <text:p text:style-name="P9"><text:span text:style-name="T7"/></text:p>
      <text:p text:style-name="P9"><text:span text:style-name="T7"/></text:p>
      <text:p text:style-name="P4"/>
      <text:p text:style-name="P4"><text:span text:style-name="T3"><text:s text:c="2"/></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2T23:36:55.125000000</dc:date>
    <meta:editing-duration>PT8M39S</meta:editing-duration>
    <meta:editing-cycles>2</meta:editing-cycles>
    <meta:generator>LibreOffice/7.2.3.2$Windows_X86_64 LibreOffice_project/d166454616c1632304285822f9c83ce2e660fd92</meta:generator>
    <meta:document-statistic meta:table-count="0" meta:image-count="0" meta:object-count="0" meta:page-count="2" meta:paragraph-count="23" meta:word-count="839" meta:character-count="4941" meta:non-whitespace-character-count="4047"/>
  </office:meta>
</office:document-meta>
</file>