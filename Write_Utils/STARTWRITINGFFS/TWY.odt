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Serif" svg:font-family="LiberationSerif"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2" style:parent-style-name="Standard" style:family="paragraph">
      <style:paragraph-properties fo:text-align="justify" fo:text-indent="0.3152in"/>
      <style:text-properties style:font-name="Times New Roman" style:font-name-complex="Times New Roman"/>
    </style:style>
    <style:style style:name="P3" style:parent-style-name="Standard" style:family="paragraph">
      <style:paragraph-properties fo:text-align="justify" fo:text-indent="0.3152in"/>
      <style:text-properties style:font-name="Times New Roman" style:font-name-complex="Times New Roman"/>
    </style:style>
    <style:style style:name="P4" style:parent-style-name="Standard" style:family="paragraph">
      <style:paragraph-properties fo:text-align="justify" fo:text-indent="0.3152in"/>
      <style:text-properties style:font-name="Times New Roman" style:font-name-complex="Times New Roman"/>
    </style:style>
    <style:style style:name="P5" style:parent-style-name="Standard" style:family="paragraph">
      <style:paragraph-properties fo:text-align="justify" fo:text-indent="0.3152in"/>
      <style:text-properties style:font-name="Times New Roman" style:font-name-complex="Times New Roman"/>
    </style:style>
    <style:style style:name="P6" style:parent-style-name="Standard" style:family="paragraph">
      <style:paragraph-properties fo:text-align="justify" fo:text-indent="0.3152in"/>
      <style:text-properties style:font-name="Times New Roman" style:font-name-complex="Times New Roman"/>
    </style:style>
    <style:style style:name="P7" style:parent-style-name="Standard" style:family="paragraph">
      <style:paragraph-properties fo:text-align="justify" fo:text-indent="0.3152in"/>
      <style:text-properties style:font-name="Times New Roman" style:font-name-complex="Times New Roman"/>
    </style:style>
    <style:style style:name="P8"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9" style:parent-style-name="Standard" style:family="paragraph">
      <style:paragraph-properties fo:text-align="justify" fo:text-indent="0.3152in"/>
      <style:text-properties style:font-name="Times New Roman" style:font-name-complex="Times New Roman"/>
    </style:style>
    <style:style style:name="P10" style:parent-style-name="Standard" style:family="paragraph">
      <style:paragraph-properties fo:text-align="justify" fo:text-indent="0.3152in"/>
      <style:text-properties style:font-name="Times New Roman" style:font-name-complex="Times New Roman"/>
    </style:style>
    <style:style style:name="P11" style:parent-style-name="Standard" style:family="paragraph">
      <style:paragraph-properties fo:text-align="justify" fo:text-indent="0.3152in"/>
      <style:text-properties style:font-name="Times New Roman" style:font-name-complex="Times New Roman"/>
    </style:style>
    <style:style style:name="P12" style:parent-style-name="Standard" style:family="paragraph">
      <style:paragraph-properties fo:text-align="justify" fo:text-indent="0.3152in"/>
      <style:text-properties style:font-name="Times New Roman" style:font-name-complex="Times New Roman"/>
    </style:style>
    <style:style style:name="P13" style:parent-style-name="Standard" style:family="paragraph">
      <style:paragraph-properties fo:text-align="justify" fo:text-indent="0.3152in"/>
      <style:text-properties style:font-name="Times New Roman" style:font-name-complex="Times New Roman"/>
    </style:style>
    <style:style style:name="P14" style:parent-style-name="Standard" style:family="paragraph">
      <style:paragraph-properties fo:text-align="justify" fo:text-indent="0.3152in"/>
      <style:text-properties style:font-name="Times New Roman" style:font-name-complex="Times New Roman"/>
    </style:style>
    <style:style style:name="P15"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16" style:parent-style-name="Standard" style:family="paragraph">
      <style:paragraph-properties fo:text-align="justify" fo:text-indent="0.3152in"/>
      <style:text-properties style:font-name="Times New Roman" style:font-name-complex="Times New Roman"/>
    </style:style>
    <style:style style:name="P17" style:parent-style-name="Standard" style:family="paragraph">
      <style:paragraph-properties fo:text-align="justify" fo:text-indent="0.3152in"/>
      <style:text-properties style:font-name="Times New Roman" style:font-name-complex="Times New Roman"/>
    </style:style>
    <style:style style:name="P18" style:parent-style-name="Standard" style:family="paragraph">
      <style:paragraph-properties fo:text-align="justify" fo:text-indent="0.3152in"/>
      <style:text-properties style:font-name="Times New Roman" style:font-name-complex="Times New Roman"/>
    </style:style>
    <style:style style:name="P19" style:parent-style-name="Standard" style:family="paragraph">
      <style:paragraph-properties fo:text-align="justify" fo:text-indent="0.3152in"/>
      <style:text-properties style:font-name="Times New Roman" style:font-name-complex="Times New Roman"/>
    </style:style>
    <style:style style:name="P20" style:parent-style-name="Standard" style:family="paragraph">
      <style:paragraph-properties fo:text-align="justify" fo:text-indent="0.3152in"/>
      <style:text-properties style:font-name="Times New Roman" style:font-name-complex="Times New Roman"/>
    </style:style>
    <style:style style:name="P21" style:parent-style-name="Standard" style:family="paragraph">
      <style:paragraph-properties fo:text-align="justify" fo:text-indent="0.3152in"/>
      <style:text-properties style:font-name="Times New Roman" style:font-name-complex="Times New Roman"/>
    </style:style>
    <style:style style:name="P22" style:parent-style-name="Standard" style:family="paragraph">
      <style:paragraph-properties fo:text-align="justify" fo:text-indent="0.3152in"/>
      <style:text-properties style:font-name="Times New Roman" style:font-name-complex="Times New Roman"/>
    </style:style>
    <style:style style:name="P23" style:parent-style-name="Standard" style:family="paragraph">
      <style:paragraph-properties fo:text-align="justify" fo:text-indent="0.3152in"/>
      <style:text-properties style:font-name="Times New Roman" style:font-name-complex="Times New Roman"/>
    </style:style>
    <style:style style:name="P24"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25"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26" style:parent-style-name="Standard" style:family="paragraph">
      <style:paragraph-properties fo:text-align="justify" fo:text-indent="0.3152in"/>
      <style:text-properties style:font-name="Times New Roman" style:font-name-complex="Times New Roman"/>
    </style:style>
    <style:style style:name="P27" style:parent-style-name="Standard" style:family="paragraph">
      <style:paragraph-properties fo:text-align="justify" fo:text-indent="0.3152in"/>
      <style:text-properties style:font-name="Times New Roman" style:font-name-complex="Times New Roman"/>
    </style:style>
    <style:style style:name="P28"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29" style:parent-style-name="Standard" style:family="paragraph">
      <style:paragraph-properties fo:text-align="justify" fo:text-indent="0.3152in"/>
      <style:text-properties style:font-name="Times New Roman" style:font-name-complex="Times New Roman"/>
    </style:style>
    <style:style style:name="P30" style:parent-style-name="Standard" style:family="paragraph">
      <style:paragraph-properties fo:text-align="justify" fo:text-indent="0.3152in"/>
      <style:text-properties style:font-name="Times New Roman" style:font-name-complex="Times New Roman"/>
    </style:style>
    <style:style style:name="P31" style:parent-style-name="Standard" style:family="paragraph">
      <style:paragraph-properties fo:text-align="justify" fo:text-indent="0.3152in"/>
      <style:text-properties style:font-name="Times New Roman" style:font-name-complex="Times New Roman"/>
    </style:style>
    <style:style style:name="P32" style:parent-style-name="Standard" style:family="paragraph">
      <style:paragraph-properties fo:text-align="justify" fo:text-indent="0.3152in"/>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fo:font-style="italic" style:font-style-asian="italic" style:font-style-complex="italic"/>
    </style:style>
    <style:style style:name="T35" style:parent-style-name="DefaultParagraphFont" style:family="text">
      <style:text-properties style:font-name="Times New Roman" style:font-name-complex="Times New Roman"/>
    </style:style>
    <style:style style:name="P36" style:parent-style-name="Standard" style:family="paragraph">
      <style:paragraph-properties fo:text-align="justify" fo:text-indent="0.3152in"/>
      <style:text-properties style:font-name="Times New Roman" style:font-name-complex="Times New Roman"/>
    </style:style>
    <style:style style:name="P37" style:parent-style-name="Standard" style:family="paragraph">
      <style:paragraph-properties fo:text-align="justify" fo:text-indent="0.3152in"/>
      <style:text-properties style:font-name="Times New Roman" style:font-name-complex="Times New Roman"/>
    </style:style>
    <style:style style:name="P38" style:parent-style-name="Standard" style:family="paragraph">
      <style:paragraph-properties fo:text-align="justify" fo:text-indent="0.3152in"/>
      <style:text-properties style:font-name="Times New Roman" style:font-name-complex="Times New Roman"/>
    </style:style>
    <style:style style:name="P39" style:parent-style-name="Standard" style:family="paragraph">
      <style:paragraph-properties fo:text-align="justify" fo:text-indent="0.3152in"/>
      <style:text-properties style:font-name="Times New Roman" style:font-name-complex="Times New Roman"/>
    </style:style>
    <style:style style:name="P40" style:parent-style-name="Standard" style:family="paragraph">
      <style:paragraph-properties fo:text-align="justify" fo:text-indent="0.3152in"/>
      <style:text-properties style:font-name="Times New Roman" style:font-name-complex="Times New Roman"/>
    </style:style>
    <style:style style:name="P41"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42" style:parent-style-name="Standard" style:family="paragraph">
      <style:paragraph-properties fo:text-align="justify" fo:text-indent="0.3152in"/>
      <style:text-properties style:font-name="Times New Roman" style:font-name-complex="Times New Roman"/>
    </style:style>
    <style:style style:name="P43" style:parent-style-name="Standard" style:family="paragraph">
      <style:paragraph-properties fo:text-align="justify" fo:text-indent="0.3152in"/>
      <style:text-properties style:font-name="Times New Roman" style:font-name-complex="Times New Roman"/>
    </style:style>
    <style:style style:name="P44" style:parent-style-name="Standard" style:family="paragraph">
      <style:paragraph-properties fo:text-align="justify" fo:text-indent="0.3152in"/>
      <style:text-properties style:font-name="Times New Roman" style:font-name-complex="Times New Roman"/>
    </style:style>
    <style:style style:name="P45"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46" style:parent-style-name="Standard" style:family="paragraph">
      <style:paragraph-properties fo:text-align="justify" fo:text-indent="0.3152in"/>
      <style:text-properties style:font-name="Times New Roman" style:font-name-complex="Times New Roman"/>
    </style:style>
    <style:style style:name="P47" style:parent-style-name="Standard" style:family="paragraph">
      <style:paragraph-properties fo:text-align="justify" fo:text-indent="0.3152in"/>
      <style:text-properties style:font-name="Times New Roman" style:font-name-complex="Times New Roman"/>
    </style:style>
    <style:style style:name="P48"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49" style:parent-style-name="Standard" style:family="paragraph">
      <style:paragraph-properties fo:text-align="justify" fo:text-indent="0in"/>
      <style:text-properties style:font-name="Times New Roman" style:font-name-complex="Times New Roman"/>
    </style:style>
    <style:style style:name="P50" style:parent-style-name="Standard" style:family="paragraph">
      <style:paragraph-properties fo:text-align="justify" fo:text-indent="0.3152in"/>
      <style:text-properties style:font-name="Times New Roman" style:font-name-complex="Times New Roman"/>
    </style:style>
    <style:style style:name="P51" style:parent-style-name="Standard" style:family="paragraph">
      <style:paragraph-properties fo:text-align="justify" fo:text-indent="0.3152in"/>
      <style:text-properties style:font-name="Times New Roman" style:font-name-complex="Times New Roman"/>
    </style:style>
    <style:style style:name="P52" style:parent-style-name="Standard" style:family="paragraph">
      <style:paragraph-properties fo:text-align="justify" fo:text-indent="0.3152in"/>
      <style:text-properties style:font-name="Times New Roman" style:font-name-complex="Times New Roman"/>
    </style:style>
    <style:style style:name="P53" style:parent-style-name="Standard" style:family="paragraph">
      <style:paragraph-properties fo:text-align="justify" fo:text-indent="0.3152in"/>
      <style:text-properties style:font-name="Times New Roman" style:font-name-complex="Times New Roman"/>
    </style:style>
    <style:style style:name="P54" style:parent-style-name="Standard" style:family="paragraph">
      <style:paragraph-properties fo:text-align="justify" fo:text-indent="0.3152in"/>
      <style:text-properties style:font-name="Times New Roman" style:font-name-complex="Times New Roman"/>
    </style:style>
    <style:style style:name="P55" style:parent-style-name="Standard" style:family="paragraph">
      <style:paragraph-properties fo:text-align="justify" fo:text-indent="0.3152in"/>
      <style:text-properties style:font-name="Times New Roman" style:font-name-complex="Times New Roman"/>
    </style:style>
    <style:style style:name="P56" style:parent-style-name="Standard" style:family="paragraph">
      <style:paragraph-properties fo:text-align="justify" fo:text-indent="0.3152in"/>
      <style:text-properties style:font-name="Times New Roman" style:font-name-complex="Times New Roman"/>
    </style:style>
    <style:style style:name="P57"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58"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59" style:parent-style-name="Standard" style:family="paragraph">
      <style:paragraph-properties fo:text-align="justify" fo:text-indent="0.3152in"/>
      <style:text-properties style:font-name="Times New Roman" style:font-name-complex="Times New Roman"/>
    </style:style>
    <style:style style:name="P60"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61" style:parent-style-name="Standard" style:family="paragraph">
      <style:paragraph-properties fo:text-align="justify" fo:text-indent="0.3152in"/>
      <style:text-properties style:font-name="Times New Roman" style:font-name-complex="Times New Roman"/>
    </style:style>
    <style:style style:name="P62" style:parent-style-name="Standard" style:family="paragraph">
      <style:paragraph-properties fo:text-align="justify" fo:text-indent="0.3152in"/>
      <style:text-properties style:font-name="Times New Roman" style:font-name-complex="Times New Roman"/>
    </style:style>
    <style:style style:name="P63" style:parent-style-name="Standard" style:family="paragraph">
      <style:paragraph-properties fo:text-align="justify" fo:text-indent="0.3152in"/>
      <style:text-properties style:font-name="Times New Roman" style:font-name-complex="Times New Roman"/>
    </style:style>
    <style:style style:name="P64" style:parent-style-name="Standard" style:family="paragraph">
      <style:paragraph-properties fo:text-align="justify" fo:text-indent="0.3152in"/>
      <style:text-properties style:font-name="Times New Roman" style:font-name-complex="Times New Roman"/>
    </style:style>
    <style:style style:name="P65"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66" style:parent-style-name="Standard" style:family="paragraph">
      <style:paragraph-properties fo:text-align="justify" fo:text-indent="0.3152in"/>
      <style:text-properties style:font-name="Times New Roman" style:font-name-complex="Times New Roman"/>
    </style:style>
    <style:style style:name="P67" style:parent-style-name="Standard" style:family="paragraph">
      <style:paragraph-properties fo:text-align="justify" fo:text-indent="0.3152in"/>
      <style:text-properties style:font-name="Times New Roman" style:font-name-complex="Times New Roman"/>
    </style:style>
    <style:style style:name="P68" style:parent-style-name="Standard" style:family="paragraph">
      <style:paragraph-properties fo:text-align="justify" fo:text-indent="0.3152in"/>
      <style:text-properties style:font-name="Times New Roman" style:font-name-complex="Times New Roman"/>
    </style:style>
    <style:style style:name="P69" style:parent-style-name="Standard" style:family="paragraph">
      <style:paragraph-properties fo:text-align="justify" fo:text-indent="0.3152in"/>
      <style:text-properties style:font-name="Times New Roman" style:font-name-complex="Times New Roman"/>
    </style:style>
    <style:style style:name="P70" style:parent-style-name="Standard" style:family="paragraph">
      <style:paragraph-properties fo:text-align="justify" fo:text-indent="0.3152in"/>
      <style:text-properties style:font-name="Times New Roman" style:font-name-complex="Times New Roman"/>
    </style:style>
    <style:style style:name="P71" style:parent-style-name="Standard" style:family="paragraph">
      <style:paragraph-properties fo:text-align="justify" fo:text-indent="0.3152in"/>
      <style:text-properties style:font-name="Times New Roman" style:font-name-complex="Times New Roman"/>
    </style:style>
    <style:style style:name="P72" style:parent-style-name="Standard" style:family="paragraph">
      <style:paragraph-properties fo:text-align="justify" fo:text-indent="0.3152in"/>
      <style:text-properties style:font-name="Times New Roman" style:font-name-complex="Times New Roman"/>
    </style:style>
    <style:style style:name="P73" style:parent-style-name="Standard" style:family="paragraph">
      <style:paragraph-properties fo:text-align="justify" fo:text-indent="0.3152in"/>
      <style:text-properties style:font-name="Times New Roman" style:font-name-complex="Times New Roman"/>
    </style:style>
    <style:style style:name="P74" style:parent-style-name="Standard" style:family="paragraph">
      <style:paragraph-properties fo:text-align="justify" fo:text-indent="0.3152in"/>
      <style:text-properties style:font-name="Times New Roman" style:font-name-complex="Times New Roman"/>
    </style:style>
    <style:style style:name="P75" style:parent-style-name="Standard" style:family="paragraph">
      <style:paragraph-properties fo:text-align="justify" fo:text-indent="0.3152in"/>
      <style:text-properties style:font-name="Times New Roman" style:font-name-complex="Times New Roman"/>
    </style:style>
    <style:style style:name="P76"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77" style:parent-style-name="Standard" style:family="paragraph">
      <style:paragraph-properties fo:text-align="justify"/>
      <style:text-properties style:font-name="Times New Roman" style:font-name-complex="Times New Roman"/>
    </style:style>
    <style:style style:name="P78" style:parent-style-name="Standard" style:family="paragraph">
      <style:paragraph-properties fo:text-align="justify" fo:text-indent="0in"/>
      <style:text-properties style:font-name="Times New Roman" style:font-name-complex="Times New Roman"/>
    </style:style>
    <style:style style:name="P79"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80"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81"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82"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83"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84"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85"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86"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87"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88"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89"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90"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91"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92"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93"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94" style:parent-style-name="Standard" style:family="paragraph">
      <style:paragraph-properties fo:text-align="justify" fo:text-indent="0in"/>
      <style:text-properties style:font-name="Times New Roman" style:font-name-complex="Times New Roman" fo:font-weight="bold" style:font-weight-asian="bold" style:font-weight-complex="bold" fo:font-size="16pt" style:font-size-asian="16pt" style:font-size-complex="16pt"/>
    </style:style>
    <style:style style:name="P95" style:parent-style-name="Standard" style:family="paragraph">
      <style:paragraph-properties fo:text-align="justify" fo:text-indent="0.3152in"/>
      <style:text-properties style:font-name="Times New Roman" style:font-name-complex="Times New Roman"/>
    </style:style>
    <style:style style:name="P96" style:parent-style-name="Standard" style:family="paragraph">
      <style:paragraph-properties fo:text-align="justify" fo:text-indent="0.3152in"/>
      <style:text-properties style:font-name="Times New Roman" style:font-name-complex="Times New Roman"/>
    </style:style>
    <style:style style:name="P97" style:parent-style-name="Standard" style:family="paragraph">
      <style:paragraph-properties fo:text-align="justify" fo:text-indent="0.3152in"/>
      <style:text-properties style:font-name="Times New Roman" style:font-name-complex="Times New Roman"/>
    </style:style>
    <style:style style:name="P98"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99" style:parent-style-name="Standard" style:family="paragraph">
      <style:paragraph-properties fo:text-align="justify" fo:text-indent="0.3152in"/>
      <style:text-properties style:font-name="Times New Roman" style:font-name-complex="Times New Roman"/>
    </style:style>
    <style:style style:name="P100" style:parent-style-name="Standard" style:family="paragraph">
      <style:paragraph-properties fo:text-align="justify" fo:text-indent="0.3152in"/>
      <style:text-properties style:font-name="Times New Roman" style:font-name-complex="Times New Roman"/>
    </style:style>
    <style:style style:name="P101" style:parent-style-name="Standard" style:family="paragraph">
      <style:paragraph-properties fo:text-align="justify" fo:text-indent="0.3152in"/>
      <style:text-properties style:font-name="Times New Roman" style:font-name-complex="Times New Roman"/>
    </style:style>
    <style:style style:name="P102" style:parent-style-name="Standard" style:family="paragraph">
      <style:paragraph-properties fo:text-align="justify" fo:text-indent="0.3152in"/>
      <style:text-properties style:font-name="Times New Roman" style:font-name-complex="Times New Roman"/>
    </style:style>
    <style:style style:name="P103" style:parent-style-name="Standard" style:family="paragraph">
      <style:paragraph-properties fo:text-align="justify" fo:text-indent="0.3152in"/>
      <style:text-properties style:font-name="Times New Roman" style:font-name-complex="Times New Roman"/>
    </style:style>
    <style:style style:name="P104" style:parent-style-name="Standard" style:family="paragraph">
      <style:paragraph-properties fo:text-align="justify" fo:text-indent="0.3152in"/>
      <style:text-properties style:font-name="Times New Roman" style:font-name-complex="Times New Roman"/>
    </style:style>
    <style:style style:name="P105" style:parent-style-name="Standard" style:family="paragraph">
      <style:paragraph-properties fo:text-align="justify" fo:text-indent="0.3152in"/>
      <style:text-properties style:font-name="Times New Roman" style:font-name-complex="Times New Roman"/>
    </style:style>
    <style:style style:name="P106"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107" style:parent-style-name="Standard" style:family="paragraph">
      <style:paragraph-properties fo:text-align="justify" fo:text-indent="0.3152in"/>
      <style:text-properties style:font-name="Times New Roman" style:font-name-complex="Times New Roman"/>
    </style:style>
    <style:style style:name="P108" style:parent-style-name="Standard" style:family="paragraph">
      <style:paragraph-properties fo:text-align="justify" fo:text-indent="0.3152in"/>
      <style:text-properties style:font-name="Times New Roman" style:font-name-complex="Times New Roman"/>
    </style:style>
    <style:style style:name="P109" style:parent-style-name="Standard" style:family="paragraph">
      <style:paragraph-properties fo:text-align="justify" fo:text-indent="0.3152in"/>
      <style:text-properties style:font-name="Times New Roman" style:font-name-complex="Times New Roman"/>
    </style:style>
    <style:style style:name="P110" style:parent-style-name="Standard" style:family="paragraph">
      <style:paragraph-properties fo:text-align="justify" fo:text-indent="0.3152in"/>
      <style:text-properties style:font-name="Times New Roman" style:font-name-complex="Times New Roman"/>
    </style:style>
    <style:style style:name="P111" style:parent-style-name="Standard" style:family="paragraph">
      <style:paragraph-properties fo:text-align="justify" fo:text-indent="0.3152in"/>
      <style:text-properties style:font-name="Times New Roman" style:font-name-complex="Times New Roman"/>
    </style:style>
    <style:style style:name="P112" style:parent-style-name="Standard" style:family="paragraph">
      <style:paragraph-properties fo:text-align="justify" fo:text-indent="0.3152in"/>
      <style:text-properties style:font-name="Times New Roman" style:font-name-complex="Times New Roman"/>
    </style:style>
    <style:style style:name="P113" style:parent-style-name="Standard" style:family="paragraph">
      <style:paragraph-properties fo:text-align="justify" fo:text-indent="0.3152in"/>
      <style:text-properties style:font-name="Times New Roman" style:font-name-complex="Times New Roman"/>
    </style:style>
    <style:style style:name="P114" style:parent-style-name="Standard" style:family="paragraph">
      <style:paragraph-properties fo:text-align="justify" fo:text-indent="0.3152in"/>
    </style:style>
    <style:style style:name="T115" style:parent-style-name="DefaultParagraphFont" style:family="text">
      <style:text-properties style:font-name="Times New Roman" style:font-name-complex="Times New Roman" fo:font-style="italic" style:font-style-asian="italic" style:font-style-complex="italic"/>
    </style:style>
    <style:style style:name="T116" style:parent-style-name="DefaultParagraphFont" style:family="text">
      <style:text-properties style:font-name="Times New Roman" style:font-name-complex="Times New Roman"/>
    </style:style>
    <style:style style:name="P117" style:parent-style-name="Standard" style:family="paragraph">
      <style:paragraph-properties fo:text-align="justify" fo:text-indent="0.3152in"/>
      <style:text-properties style:font-name="Times New Roman" style:font-name-complex="Times New Roman"/>
    </style:style>
    <style:style style:name="P118" style:parent-style-name="Standard" style:family="paragraph">
      <style:paragraph-properties fo:text-align="justify" fo:text-indent="0.3152in"/>
      <style:text-properties style:font-name="Times New Roman" style:font-name-complex="Times New Roman"/>
    </style:style>
    <style:style style:name="P119" style:parent-style-name="Standard" style:family="paragraph">
      <style:paragraph-properties fo:text-align="justify" fo:text-indent="0.3152in"/>
      <style:text-properties style:font-name="Times New Roman" style:font-name-complex="Times New Roman"/>
    </style:style>
    <style:style style:name="P120" style:parent-style-name="Standard" style:family="paragraph">
      <style:paragraph-properties fo:text-align="justify" fo:text-indent="0.3152in"/>
      <style:text-properties style:font-name="Times New Roman" style:font-name-complex="Times New Roman"/>
    </style:style>
    <style:style style:name="P121" style:parent-style-name="Standard" style:family="paragraph">
      <style:paragraph-properties fo:text-align="justify" fo:text-indent="0.3152in"/>
      <style:text-properties style:font-name="Times New Roman" style:font-name-complex="Times New Roman"/>
    </style:style>
    <style:style style:name="P122" style:parent-style-name="Standard" style:family="paragraph">
      <style:paragraph-properties fo:text-align="justify" fo:text-indent="0.3152in"/>
      <style:text-properties style:font-name="Times New Roman" style:font-name-complex="Times New Roman"/>
    </style:style>
    <style:style style:name="P123" style:parent-style-name="Standard" style:family="paragraph">
      <style:paragraph-properties fo:text-align="justify" fo:text-indent="0.3152in"/>
      <style:text-properties style:font-name="Times New Roman" style:font-name-complex="Times New Roman"/>
    </style:style>
    <style:style style:name="P124" style:parent-style-name="Standard" style:family="paragraph">
      <style:paragraph-properties fo:text-align="justify" fo:text-indent="0.3152in"/>
      <style:text-properties style:font-name="Times New Roman" style:font-name-complex="Times New Roman"/>
    </style:style>
    <style:style style:name="P125" style:parent-style-name="Standard" style:family="paragraph">
      <style:paragraph-properties fo:text-align="justify" fo:text-indent="0.3152in"/>
      <style:text-properties style:font-name="Times New Roman" style:font-name-complex="Times New Roman"/>
    </style:style>
    <style:style style:name="P126" style:parent-style-name="Standard" style:family="paragraph">
      <style:paragraph-properties fo:text-align="justify" fo:text-indent="0.3152in"/>
      <style:text-properties style:font-name="Times New Roman" style:font-name-complex="Times New Roman"/>
    </style:style>
    <style:style style:name="P127"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128" style:parent-style-name="Standard" style:family="paragraph">
      <style:paragraph-properties fo:text-align="justify" fo:text-indent="0.3152in"/>
      <style:text-properties style:font-name="Times New Roman" style:font-name-complex="Times New Roman"/>
    </style:style>
    <style:style style:name="P129"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130"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131" style:parent-style-name="Standard" style:family="paragraph">
      <style:paragraph-properties fo:text-align="justify" fo:text-indent="0.3152in"/>
      <style:text-properties style:font-name="Times New Roman" style:font-name-complex="Times New Roman"/>
    </style:style>
    <style:style style:name="P132" style:parent-style-name="Standard" style:family="paragraph">
      <style:paragraph-properties fo:text-align="justify" fo:text-indent="0.3152in"/>
      <style:text-properties style:font-name="Times New Roman" style:font-name-complex="Times New Roman"/>
    </style:style>
    <style:style style:name="P133"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134" style:parent-style-name="Standard" style:family="paragraph">
      <style:paragraph-properties fo:text-align="justify" fo:text-indent="0.3152in"/>
      <style:text-properties style:font-name="Times New Roman" style:font-name-complex="Times New Roman"/>
    </style:style>
    <style:style style:name="P135" style:parent-style-name="Standard" style:family="paragraph">
      <style:paragraph-properties fo:text-align="justify" fo:text-indent="0.3152in"/>
      <style:text-properties style:font-name="Times New Roman" style:font-name-complex="Times New Roman"/>
    </style:style>
    <style:style style:name="P136"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137" style:parent-style-name="Standard" style:family="paragraph">
      <style:paragraph-properties fo:text-align="justify" fo:text-indent="0.3152in"/>
      <style:text-properties style:font-name="Times New Roman" style:font-name-complex="Times New Roman"/>
    </style:style>
    <style:style style:name="P138" style:parent-style-name="Standard" style:family="paragraph">
      <style:paragraph-properties fo:text-align="justify" fo:text-indent="0.3152in"/>
      <style:text-properties style:font-name="Times New Roman" style:font-name-complex="Times New Roman"/>
    </style:style>
    <style:style style:name="P139"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140" style:parent-style-name="Standard" style:family="paragraph">
      <style:paragraph-properties fo:text-align="justify" fo:text-indent="0.3152in"/>
      <style:text-properties style:font-name="Times New Roman" style:font-name-complex="Times New Roman"/>
    </style:style>
    <style:style style:name="P141" style:parent-style-name="Standard" style:family="paragraph">
      <style:paragraph-properties fo:text-align="justify" fo:text-indent="0.3152in"/>
      <style:text-properties style:font-name="Times New Roman" style:font-name-complex="Times New Roman"/>
    </style:style>
    <style:style style:name="P142" style:parent-style-name="Standard" style:family="paragraph">
      <style:paragraph-properties fo:text-align="justify" fo:text-indent="0.3152in"/>
      <style:text-properties style:font-name="Times New Roman" style:font-name-complex="Times New Roman"/>
    </style:style>
    <style:style style:name="P143" style:parent-style-name="Standard" style:family="paragraph">
      <style:paragraph-properties fo:text-align="justify" fo:text-indent="0.3152in"/>
      <style:text-properties style:font-name="Times New Roman" style:font-name-complex="Times New Roman"/>
    </style:style>
    <style:style style:name="P144" style:parent-style-name="Standard" style:family="paragraph">
      <style:paragraph-properties fo:text-align="justify" fo:text-indent="0.3152in"/>
      <style:text-properties style:font-name="Times New Roman" style:font-name-complex="Times New Roman"/>
    </style:style>
    <style:style style:name="P145" style:parent-style-name="Standard" style:family="paragraph">
      <style:paragraph-properties fo:text-align="justify" fo:text-indent="0.3152in"/>
      <style:text-properties style:font-name="Times New Roman" style:font-name-complex="Times New Roman"/>
    </style:style>
    <style:style style:name="P146" style:parent-style-name="Standard" style:family="paragraph">
      <style:paragraph-properties fo:text-align="justify" fo:text-indent="0.3152in"/>
      <style:text-properties style:font-name="Times New Roman" style:font-name-complex="Times New Roman"/>
    </style:style>
    <style:style style:name="P147" style:parent-style-name="Standard" style:family="paragraph">
      <style:paragraph-properties fo:text-align="justify" fo:text-indent="0.3152in"/>
      <style:text-properties style:font-name="Times New Roman" style:font-name-complex="Times New Roman"/>
    </style:style>
    <style:style style:name="P148" style:parent-style-name="Standard" style:family="paragraph">
      <style:paragraph-properties fo:text-align="justify" fo:text-indent="0.3152in"/>
      <style:text-properties style:font-name="Times New Roman" style:font-name-complex="Times New Roman"/>
    </style:style>
    <style:style style:name="P149" style:parent-style-name="Standard" style:family="paragraph">
      <style:paragraph-properties fo:text-align="justify" fo:text-indent="0.3152in"/>
      <style:text-properties style:font-name="Times New Roman" style:font-name-complex="Times New Roman"/>
    </style:style>
    <style:style style:name="P150" style:parent-style-name="Standard" style:family="paragraph">
      <style:paragraph-properties fo:text-align="justify" fo:text-indent="0.3152in"/>
      <style:text-properties style:font-name="Times New Roman" style:font-name-complex="Times New Roman"/>
    </style:style>
    <style:style style:name="P151" style:parent-style-name="Standard" style:family="paragraph">
      <style:paragraph-properties fo:text-align="justify" fo:text-indent="0.3152in"/>
      <style:text-properties style:font-name="Times New Roman" style:font-name-complex="Times New Roman"/>
    </style:style>
    <style:style style:name="P152" style:parent-style-name="Standard" style:family="paragraph">
      <style:paragraph-properties fo:text-align="justify" fo:text-indent="0.3152in"/>
      <style:text-properties style:font-name="Times New Roman" style:font-name-complex="Times New Roman"/>
    </style:style>
    <style:style style:name="P153" style:parent-style-name="Standard" style:family="paragraph">
      <style:paragraph-properties fo:text-align="justify" fo:text-indent="0.3152in"/>
      <style:text-properties style:font-name="Times New Roman" style:font-name-complex="Times New Roman"/>
    </style:style>
    <style:style style:name="P154" style:parent-style-name="Standard" style:family="paragraph">
      <style:paragraph-properties fo:text-align="justify" fo:text-indent="0.3152in"/>
      <style:text-properties style:font-name="Times New Roman" style:font-name-complex="Times New Roman"/>
    </style:style>
    <style:style style:name="P155" style:parent-style-name="Standard" style:family="paragraph">
      <style:paragraph-properties fo:text-align="justify" fo:text-indent="0.3152in"/>
      <style:text-properties style:font-name="Times New Roman" style:font-name-complex="Times New Roman"/>
    </style:style>
    <style:style style:name="P156" style:parent-style-name="Standard" style:family="paragraph">
      <style:paragraph-properties fo:text-align="justify" fo:text-indent="0.3152in"/>
      <style:text-properties style:font-name="Times New Roman" style:font-name-complex="Times New Roman"/>
    </style:style>
    <style:style style:name="P157" style:parent-style-name="Standard" style:family="paragraph">
      <style:paragraph-properties fo:text-align="justify" fo:text-indent="0.3152in"/>
      <style:text-properties style:font-name="Times New Roman" style:font-name-complex="Times New Roman"/>
    </style:style>
    <style:style style:name="P158" style:parent-style-name="Standard" style:family="paragraph">
      <style:paragraph-properties fo:text-align="justify" fo:text-indent="0.3152in"/>
      <style:text-properties style:font-name="Times New Roman" style:font-name-complex="Times New Roman"/>
    </style:style>
    <style:style style:name="P159" style:parent-style-name="Standard" style:family="paragraph">
      <style:paragraph-properties fo:text-align="justify" fo:text-indent="0.3152in"/>
      <style:text-properties style:font-name="Times New Roman" style:font-name-complex="Times New Roman"/>
    </style:style>
    <style:style style:name="P160" style:parent-style-name="Standard" style:family="paragraph">
      <style:paragraph-properties fo:text-align="justify" fo:text-indent="0.3152in"/>
      <style:text-properties style:font-name="Times New Roman" style:font-name-complex="Times New Roman"/>
    </style:style>
    <style:style style:name="P161" style:parent-style-name="Standard" style:family="paragraph">
      <style:paragraph-properties fo:text-align="justify" fo:text-indent="0.3152in"/>
      <style:text-properties style:font-name="Times New Roman" style:font-name-complex="Times New Roman"/>
    </style:style>
    <style:style style:name="P162" style:parent-style-name="Standard" style:family="paragraph">
      <style:paragraph-properties fo:text-align="justify" fo:text-indent="0.3152in"/>
      <style:text-properties style:font-name="Times New Roman" style:font-name-complex="Times New Roman"/>
    </style:style>
    <style:style style:name="P163" style:parent-style-name="Standard" style:family="paragraph">
      <style:paragraph-properties fo:text-align="justify" fo:text-indent="0.3152in"/>
      <style:text-properties style:font-name="Times New Roman" style:font-name-complex="Times New Roman"/>
    </style:style>
    <style:style style:name="P164" style:parent-style-name="Standard" style:family="paragraph">
      <style:paragraph-properties fo:text-align="justify" fo:text-indent="0.3152in"/>
      <style:text-properties style:font-name="Times New Roman" style:font-name-complex="Times New Roman"/>
    </style:style>
    <style:style style:name="P165" style:parent-style-name="Standard" style:family="paragraph">
      <style:paragraph-properties fo:text-align="justify" fo:text-indent="0.3152in"/>
      <style:text-properties style:font-name="Times New Roman" style:font-name-complex="Times New Roman"/>
    </style:style>
    <style:style style:name="P166" style:parent-style-name="Standard" style:family="paragraph">
      <style:paragraph-properties fo:text-align="justify" fo:text-indent="0.3152in"/>
      <style:text-properties style:font-name="Times New Roman" style:font-name-complex="Times New Roman"/>
    </style:style>
    <style:style style:name="P167" style:parent-style-name="Standard" style:family="paragraph">
      <style:paragraph-properties fo:text-align="justify" fo:text-indent="0.3152in"/>
      <style:text-properties style:font-name="Times New Roman" style:font-name-complex="Times New Roman"/>
    </style:style>
    <style:style style:name="P168" style:parent-style-name="Standard" style:family="paragraph">
      <style:paragraph-properties fo:text-align="justify" fo:text-indent="0.3152in"/>
      <style:text-properties style:font-name="Times New Roman" style:font-name-complex="Times New Roman"/>
    </style:style>
    <style:style style:name="P169" style:parent-style-name="Standard" style:family="paragraph">
      <style:paragraph-properties fo:text-align="justify" fo:text-indent="0.3152in"/>
      <style:text-properties style:font-name="Times New Roman" style:font-name-complex="Times New Roman"/>
    </style:style>
    <style:style style:name="P170" style:parent-style-name="Standard" style:family="paragraph">
      <style:paragraph-properties fo:text-align="justify" fo:text-indent="0.3152in"/>
      <style:text-properties style:font-name="Times New Roman" style:font-name-complex="Times New Roman" fo:font-style="italic" style:font-style-asian="italic" style:font-style-complex="italic"/>
    </style:style>
    <style:style style:name="P171" style:parent-style-name="Standard" style:family="paragraph">
      <style:paragraph-properties fo:text-align="justify" fo:text-indent="0.3152in"/>
      <style:text-properties style:font-name="Times New Roman" style:font-name-complex="Times New Roman"/>
    </style:style>
    <style:style style:name="P172" style:parent-style-name="Standard" style:family="paragraph">
      <style:paragraph-properties fo:text-align="justify" fo:text-indent="0.3152in"/>
      <style:text-properties style:font-name="Times New Roman" style:font-name-complex="Times New Roman"/>
    </style:style>
    <style:style style:name="P173" style:parent-style-name="Standard" style:family="paragraph">
      <style:paragraph-properties fo:text-align="justify" fo:text-indent="0.3152in"/>
      <style:text-properties style:font-name="Times New Roman" style:font-name-complex="Times New Roman"/>
    </style:style>
    <style:style style:name="P174" style:parent-style-name="Standard" style:family="paragraph">
      <style:paragraph-properties fo:text-align="justify" fo:text-indent="0.3152in"/>
      <style:text-properties style:font-name="Times New Roman" style:font-name-complex="Times New Roman"/>
    </style:style>
    <style:style style:name="P175" style:parent-style-name="Standard" style:family="paragraph">
      <style:paragraph-properties fo:text-align="justify" fo:text-indent="0.3152in"/>
      <style:text-properties style:font-name="Times New Roman" style:font-name-complex="Times New Roman"/>
    </style:style>
    <style:style style:name="P176" style:parent-style-name="Standard" style:family="paragraph">
      <style:paragraph-properties fo:text-align="justify" fo:text-indent="0.3152in"/>
      <style:text-properties style:font-name="Times New Roman" style:font-name-complex="Times New Roman"/>
    </style:style>
    <style:style style:name="P177" style:parent-style-name="Standard" style:family="paragraph">
      <style:paragraph-properties fo:text-align="justify" fo:text-indent="0in"/>
      <style:text-properties style:font-name="Times New Roman" style:font-name-complex="Times New Roman"/>
    </style:style>
    <style:style style:name="P178" style:parent-style-name="Standard" style:family="paragraph">
      <style:paragraph-properties fo:text-align="justify" fo:text-indent="0in"/>
      <style:text-properties style:font-name="Times New Roman" style:font-name-complex="Times New Roman"/>
    </style:style>
    <style:style style:name="P179" style:parent-style-name="Standard" style:family="paragraph">
      <style:paragraph-properties fo:text-align="justify" fo:text-indent="0in"/>
    </style:style>
    <style:style style:name="P180" style:parent-style-name="Standard" style:family="paragraph">
      <style:paragraph-properties fo:text-align="justify" fo:text-indent="0in"/>
      <style:text-properties style:font-name="Times New Roman" style:font-name-complex="Times New Roman"/>
    </style:style>
    <style:style style:name="P181" style:parent-style-name="Standard" style:family="paragraph">
      <style:paragraph-properties fo:text-align="justify" fo:text-indent="0.3152in"/>
      <style:text-properties style:font-name="Times New Roman" style:font-name-complex="Times New Roman"/>
    </style:style>
    <style:style style:name="P182" style:parent-style-name="Standard" style:family="paragraph">
      <style:paragraph-properties fo:text-align="justify" fo:text-indent="0.3152in"/>
      <style:text-properties style:font-name="Times New Roman" style:font-name-complex="Times New Roman"/>
    </style:style>
    <style:style style:name="P183" style:parent-style-name="Standard" style:family="paragraph">
      <style:paragraph-properties fo:text-align="justify" fo:text-indent="0.3152in"/>
      <style:text-properties style:font-name="Times New Roman" style:font-name-complex="Times New Roman"/>
    </style:style>
    <style:style style:name="P184" style:parent-style-name="Standard" style:family="paragraph">
      <style:paragraph-properties fo:text-align="justify" fo:text-indent="0.3152in"/>
      <style:text-properties style:font-name="Times New Roman" style:font-name-complex="Times New Roman"/>
    </style:style>
    <style:style style:name="P185" style:parent-style-name="Standard" style:family="paragraph">
      <style:paragraph-properties fo:text-align="justify" fo:text-indent="0.3152in"/>
      <style:text-properties style:font-name="Times New Roman" style:font-name-complex="Times New Roman"/>
    </style:style>
    <style:style style:name="P186" style:parent-style-name="Standard" style:family="paragraph">
      <style:paragraph-properties fo:text-align="justify" fo:text-indent="0.3152in"/>
      <style:text-properties style:font-name="Times New Roman" style:font-name-complex="Times New Roman"/>
    </style:style>
    <style:style style:name="P187" style:parent-style-name="Standard" style:family="paragraph">
      <style:paragraph-properties fo:text-align="justify" fo:text-indent="0.3152in"/>
      <style:text-properties style:font-name="Times New Roman" style:font-name-complex="Times New Roman"/>
    </style:style>
    <style:style style:name="P188" style:parent-style-name="Standard" style:family="paragraph">
      <style:paragraph-properties fo:text-align="justify" fo:text-indent="0.3152in"/>
      <style:text-properties style:font-name="Times New Roman" style:font-name-complex="Times New Roman"/>
    </style:style>
    <style:style style:name="P189" style:parent-style-name="Standard" style:family="paragraph">
      <style:paragraph-properties fo:text-align="justify" fo:text-indent="0.3152in"/>
      <style:text-properties style:font-name="Times New Roman" style:font-name-complex="Times New Roman"/>
    </style:style>
    <style:style style:name="P190" style:parent-style-name="Standard" style:family="paragraph">
      <style:paragraph-properties fo:text-align="justify" fo:text-indent="0in"/>
      <style:text-properties style:font-name="Times New Roman" style:font-name-complex="Times New Roman"/>
    </style:style>
    <style:style style:name="P191" style:parent-style-name="Standard" style:family="paragraph">
      <style:paragraph-properties fo:text-align="justify" fo:text-indent="0in"/>
      <style:text-properties style:font-name="Times New Roman" style:font-name-complex="Times New Roman"/>
    </style:style>
    <style:style style:name="P192" style:parent-style-name="Standard" style:family="paragraph">
      <style:paragraph-properties fo:text-align="justify" fo:text-indent="0in"/>
      <style:text-properties style:font-name="Times New Roman" style:font-name-complex="Times New Roman"/>
    </style:style>
    <style:style style:name="P193" style:parent-style-name="Standard" style:family="paragraph">
      <style:paragraph-properties fo:text-align="justify" fo:text-indent="0.3152in"/>
      <style:text-properties style:font-name="Times New Roman" style:font-name-complex="Times New Roman"/>
    </style:style>
    <style:style style:name="P194" style:parent-style-name="Standard" style:family="paragraph">
      <style:paragraph-properties fo:text-align="justify" fo:text-indent="0.3152in"/>
      <style:text-properties style:font-name="Times New Roman" style:font-name-complex="Times New Roman"/>
    </style:style>
    <style:style style:name="P195" style:parent-style-name="Standard" style:family="paragraph">
      <style:paragraph-properties fo:text-align="justify" fo:text-indent="0in"/>
      <style:text-properties style:font-name="Times New Roman" style:font-name-complex="Times New Roman" fo:font-style="italic" style:font-style-asian="italic" style:font-style-complex="italic"/>
    </style:style>
    <style:style style:name="P196" style:parent-style-name="Standard" style:family="paragraph">
      <style:paragraph-properties fo:text-align="justify" fo:text-indent="0in"/>
      <style:text-properties style:font-name="Times New Roman" style:font-name-complex="Times New Roman"/>
    </style:style>
    <style:style style:name="P197" style:parent-style-name="Standard" style:family="paragraph">
      <style:paragraph-properties fo:text-align="justify" fo:text-indent="0in"/>
      <style:text-properties style:font-name="Times New Roman" style:font-name-complex="Times New Roman"/>
    </style:style>
    <style:style style:name="P198" style:parent-style-name="Standard" style:family="paragraph">
      <style:paragraph-properties fo:text-align="justify" fo:text-indent="0in"/>
      <style:text-properties style:font-name="Times New Roman" style:font-name-complex="Times New Roman"/>
    </style:style>
    <style:style style:name="P199" style:parent-style-name="Standard" style:family="paragraph">
      <style:paragraph-properties fo:text-align="justify" fo:text-indent="0in"/>
      <style:text-properties style:font-name="Times New Roman" style:font-name-complex="Times New Roman"/>
    </style:style>
    <style:style style:name="P200" style:parent-style-name="Standard" style:family="paragraph">
      <style:paragraph-properties fo:text-align="justify" fo:text-indent="0in"/>
      <style:text-properties style:font-name="Times New Roman" style:font-name-complex="Times New Roman"/>
    </style:style>
    <style:style style:name="P201" style:parent-style-name="Standard" style:family="paragraph">
      <style:paragraph-properties fo:text-align="justify" fo:text-indent="0in"/>
      <style:text-properties style:font-name="Times New Roman" style:font-name-complex="Times New Roman"/>
    </style:style>
    <style:style style:name="P202" style:parent-style-name="Standard" style:family="paragraph">
      <style:paragraph-properties fo:text-align="justify" fo:text-indent="0.3152in"/>
      <style:text-properties style:font-name="Times New Roman" style:font-name-complex="Times New Roman"/>
    </style:style>
    <style:style style:name="P203" style:parent-style-name="Standard" style:family="paragraph">
      <style:paragraph-properties fo:text-align="justify" fo:text-indent="0.3152in"/>
      <style:text-properties style:font-name="Times New Roman" style:font-name-complex="Times New Roman"/>
    </style:style>
    <style:style style:name="P204" style:parent-style-name="Standard" style:family="paragraph">
      <style:paragraph-properties fo:text-align="justify" fo:text-indent="0.3152in"/>
      <style:text-properties style:font-name="Times New Roman" style:font-name-complex="Times New Roman"/>
    </style:style>
    <style:style style:name="P205" style:parent-style-name="Standard" style:family="paragraph">
      <style:paragraph-properties fo:text-align="justify" fo:text-indent="0.3152in"/>
      <style:text-properties style:font-name="Times New Roman" style:font-name-complex="Times New Roman"/>
    </style:style>
    <style:style style:name="P206" style:parent-style-name="Standard" style:family="paragraph">
      <style:paragraph-properties fo:text-align="justify" fo:text-indent="0.3152in"/>
      <style:text-properties style:font-name="Times New Roman" style:font-name-complex="Times New Roman"/>
    </style:style>
    <style:style style:name="P207" style:parent-style-name="Standard" style:family="paragraph">
      <style:paragraph-properties fo:text-align="justify" fo:text-indent="0.3152in"/>
      <style:text-properties style:font-name="LiberationSerif"/>
    </style:style>
    <style:style style:name="P208" style:parent-style-name="Standard" style:family="paragraph">
      <style:paragraph-properties fo:text-align="justify" fo:text-indent="0.3152in"/>
      <style:text-properties style:font-name="LiberationSerif"/>
    </style:style>
    <style:style style:name="P209" style:parent-style-name="Standard" style:family="paragraph">
      <style:paragraph-properties fo:text-align="justify" fo:text-indent="0.3152in"/>
      <style:text-properties style:font-name="LiberationSerif"/>
    </style:style>
    <style:style style:name="P210" style:parent-style-name="Standard" style:family="paragraph">
      <style:paragraph-properties fo:text-align="justify" fo:text-indent="0.3152in"/>
      <style:text-properties style:font-name="LiberationSerif"/>
    </style:style>
    <style:style style:name="P211" style:parent-style-name="Standard" style:family="paragraph">
      <style:paragraph-properties fo:text-align="justify" fo:text-indent="0.3152in"/>
      <style:text-properties style:font-name="LiberationSerif"/>
    </style:style>
    <style:style style:name="P212" style:parent-style-name="Standard" style:family="paragraph">
      <style:paragraph-properties fo:text-align="justify" fo:text-indent="0.3152in"/>
      <style:text-properties style:font-name="LiberationSerif"/>
    </style:style>
    <style:style style:name="P213" style:parent-style-name="Standard" style:family="paragraph">
      <style:paragraph-properties fo:text-align="justify" fo:text-indent="0.3152in"/>
      <style:text-properties style:font-name="LiberationSerif"/>
    </style:style>
    <style:style style:name="P214" style:parent-style-name="Standard" style:family="paragraph">
      <style:paragraph-properties fo:text-align="justify" fo:text-indent="0.3152in"/>
    </style:style>
    <style:style style:name="T215" style:parent-style-name="DefaultParagraphFont" style:family="text">
      <style:text-properties style:font-name="LiberationSerif"/>
    </style:style>
  </office:automatic-styles>
  <office:body>
    <office:text text:use-soft-page-breaks="true">
      <text:p text:style-name="P1">Prologue</text:p>
      <text:p text:style-name="P2">I don’t mind handling bandit camps, refugee hunts, or counter-thefts.</text:p>
      <text:p text:style-name="P3">But queues?<text:s/></text:p>
      <text:p text:style-name="P4">Damn, kill me, please.<text:s/></text:p>
      <text:p text:style-name="P5">Something about standing in a long line of people waiting to be moved pisses off every single cell in my body. I don’t like it when the control of my mobility is elsewhere. I’ll never understand how people have the patience to stand still and do nothing for such extended amounts of time.</text:p>
      <text:p text:style-name="P6">This particular queue, however, was three people long and was annoying me for a different reason.</text:p>
      <text:p text:style-name="P7">“You’re missing some papers here. This is as far as you go.” The immigration guy stared down at the frail man with glasses.<text:s/></text:p>
      <text:p text:style-name="P8">Seems like immigration shakedowns aren’t exclusive to the continent.</text:p>
      <text:p text:style-name="P9">“Very funny sir. I’ve got all my papers, and here is my transcript of trust.” he slammed his transcript on the table in front of him.</text:p>
      <text:p text:style-name="P10">This isn’t anything new, at least not in the continent. Corrupt officials kicking people out of trains for no reason is an everyday occurrence.</text:p>
      <text:p text:style-name="P11"/>
      <text:soft-page-break/>
      <text:p text:style-name="P12">Except, we were disembarking a ship on an island far away from the mainland. Someone paid this guy in more than just creds to pull this stunt.</text:p>
      <text:p text:style-name="P13">Stuck between me and the glasses guy was a girl, who was probably around my age. She was fiddling her hair as her feet tapped a rhythm of familiar annoyance.<text:s/></text:p>
      <text:p text:style-name="P14">I on the other hand was more than just restless, I was annoyed.<text:s/></text:p>
      <text:p text:style-name="P15">One last time gramps.</text:p>
      <text:p text:style-name="P16">I stepped out of the line and walked towards the ruckus.</text:p>
      <text:p text:style-name="P17">A hand grabbed my shirt and pulled me back.<text:s/></text:p>
      <text:p text:style-name="P18">“What do you think you’re doing?” the girl asked, with an incomprehensible stare on her face.<text:s/></text:p>
      <text:p text:style-name="P19">I ignored the fact that she pulled me for a second. “You want to be stuck in this queue forever?”</text:p>
      <text:p text:style-name="P20">“He’s doing it on purpose,” The girl adjusted her glasses, “Interfere and you’ll get kicked out as well. Go and be a hero somewhere else.” The girl raised her arm against my chest, blocking my path.</text:p>
      <text:p text:style-name="P21">She had a point. I couldn’t afford to get kicked out. Gramps would kill me. Worst case scenario, I’ll have to go back to the continent.<text:s/></text:p>
      <text:p text:style-name="P22">However, the last thing I care about is being a good Samaritan.<text:s/></text:p>
      <text:p text:style-name="P23">“Heroes are no fun. Queues are no fun either. I’m not doing this for<text:s/><text:soft-page-break/>either of you, but only for myself.”<text:s/></text:p>
      <text:p text:style-name="P24">More importantly, why are you staring at me like that?</text:p>
      <text:p text:style-name="P25">Oh, Wait.</text:p>
      <text:p text:style-name="P26">She saw my eyes. Her eyelids relaxed and her face gave out the expression of having confirmed a suspicion.</text:p>
      <text:p text:style-name="P27">“Whatever.” She lowered her arm.</text:p>
      <text:p text:style-name="P28">This couldn’t be her first time seeing a Revenant.</text:p>
      <text:p text:style-name="P29">Besides, something was off about her as well. But with her out of the way, I made my way to the centre of conflict.</text:p>
      <text:p text:style-name="P30">The officer wasn’t backing down. Normally, these people are paid to ensure that the victim doesn’t get to board the train, or in this case the ship, at all. Given that the glasses guy had clearly reached the island, it’s safe to assume that the officer messed up and was panicking.<text:s/></text:p>
      <text:p text:style-name="P31">Frustration. Not as fun as anger to play with, but still enjoyable.</text:p>
      <text:p text:style-name="P32"><text:span text:style-name="T33">“You should’ve scanned him at boarding. Your<text:s/></text:span><text:span text:style-name="T34">other<text:s/></text:span><text:span text:style-name="T35">employer won’t like this.”</text:span></text:p>
      <text:p text:style-name="P36">“Huh?” The officer turned towards me. “What the hell do you want brat?”</text:p>
      <text:p text:style-name="P37">“I don’t know how much they paid you, but I’m pretty sure the others in your crew didn’t get a cut.”<text:s/></text:p>
      <text:p text:style-name="P38"/>
      <text:p text:style-name="P39">That turned a few heads behind him. The immigration crew from the mainland’s embassy isn’t dumb enough to send one single officer. Although, it’s easy to buy out one high-ranking guy than several lower-ranking ones.</text:p>
      <text:p text:style-name="P40">But of course, they aren’t going to believe anything I say, it has to come out of his mouth. My eyes burned a deep bright scarlet.</text:p>
      <text:p text:style-name="P41">Increase.</text:p>
      <text:p text:style-name="P42">“Are you accusing me or something?” His voice exploded.<text:s/></text:p>
      <text:p text:style-name="P43">That was sooner than I anticipated. I wanted to go up to Level 4, but this guy was already on edge.</text:p>
      <text:p text:style-name="P44">“Yep, pretty sure you also have some forged documents to use as well, in case push comes to shove.”</text:p>
      <text:p text:style-name="P45">Increase.</text:p>
      <text:p text:style-name="P46">“Connor!” He called out to someone. A young man from the crew behind him walked up. “Write this guy up! Prohibited substance.”</text:p>
      <text:p text:style-name="P47">“Yo, Jimmy. Why are you getting all worked up?” another guy spoke from the crew. From his attire, I could see that he was of the same rank as Mr. Corrupt. “We haven’t even checked him yet.”</text:p>
      <text:p text:style-name="P48">Increase.</text:p>
      <text:p text:style-name="P49"/>
      <text:p text:style-name="P50">“I don’t care! I got paid to detain this imbecile and somehow he slipped past me at immigration! Do you have any idea what they’ll do to me if this guy entered the island!”</text:p>
      <text:p text:style-name="P51">The glasses guy gave me warm smile. I nodded.</text:p>
      <text:p text:style-name="P52">“Welp, that’s a full-blown confession right there,” My eyes went back to their usual crimson. I turned to the other officer. “Deal with him, please?”</text:p>
      <text:p text:style-name="P53">“Ugh,” he sighed. “We still have to check you three regardless.”</text:p>
      <text:p text:style-name="P54">“Fine by me” I turned back and looked at the girl. She also had a smile on her face. More akin to a grin perhaps. It wasn’t a warm ‘What a cool guy!’ smile of acknowledgment that I would’ve liked but rather a ‘Try that trick on me and you’re dead’ kind of smile.</text:p>
      <text:p text:style-name="P55">They took Mr. Corrupt inside, checked the three of us, and let us disembark. It felt weird not getting paid for this kind of work, but this might very well be the last time I get to use my power, so I can’t complain.</text:p>
      <text:p text:style-name="P56">Here I was. Downshore—The most peaceful place in the entire world, supposedly. As I stepped out, My gramps’ words echoed in my head.</text:p>
      <text:p text:style-name="P57">Keep your power under wraps.</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p text:style-name="P78"><text:s/></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I stared at the 1000-year-old crate from Earth with a familiar sense of disappointment. Not all old-world loot are treasures.</text:p>
      <text:p text:style-name="P96">“This is, uh, a first-lander’s personal cache,” I said. “You won’t find anything of value inside this, Mr. Cloud.” The look on his face matched mine upon hearing that.</text:p>
      <text:p text:style-name="P97">“But it’s a cache from the old-world right?” Mr. Cloud questioned. “Cache-hunters risk their lives for this stuff and you say it has no value?”</text:p>
      <text:p text:style-name="P98">This is becoming a chore.</text:p>
      <text:p text:style-name="P99">“Well, exactly. You didn’t risk your life, you said you found this on the beach,” I flipped the cache, pointing to the mini-floaters. “Only personal caches are built to float. Given the size of this, it probably is filled with toiletries and paper towels.” I explained.</text:p>
      <text:p text:style-name="P100">A crew from Earth was supposed to set up a human colony here on Ryfe, a good thousand years ago. The Atlas 99—humanity’s cargo ship, had a piece of everything Earth had to offer. <text:s/>Records of how civilizations evolved back on Earth, inclusive of all their knowledge and cultures. The contents of Atlas are called caches, crates that contained everything ranging from a crewmember’s personal cargo to advanced weapon schematics and each cache was color-coded and encrypted accordingly.<text:s/></text:p>
      <text:soft-page-break/>
      <text:p text:style-name="P101">“This here is a white crate, lowest priority. You won’t find weapons or schematics inside this,” I tapped at the small keypad on the crate’s left side. “You can guess the passcode, but fail thrice and it’s locked forever.”</text:p>
      <text:p text:style-name="P102">The failure of the first-landers is a story all kids on Ryfe are told growing up. Ryfe was a planet with a single continent that mimicked Earth in terms of astronomical behaviour and ecological conditions. Atlas blew up upon entering Ryfe’s orbit. The caches were extremely durable and survived the explosion, but were scattered across the continent.</text:p>
      <text:p text:style-name="P103">Over the last millennium, a lot of these caches have been found, mostly the larger-sized ones, and humanity has managed to rebuild to a significant degree. Although we were definitely centuries away from space travel.</text:p>
      <text:p text:style-name="P104">“You got all that Mr. Cloud?” I sighed. I was supposed to be here on vacation, hardly feels like it.<text:s/></text:p>
      <text:p text:style-name="P105">“Yeah. Looks like I was about to gift my fiancé a thousand-year-old toothbrush,” he laughed. “Art told me you were a private investigator. You deal with a lot of cache-hunter types?”</text:p>
      <text:p text:style-name="P106">Thanks gramps. Now I have to improvise.</text:p>
      <text:p text:style-name="P107">“Sometimes. Mostly it’s petty criminals. Sometimes refugees.”</text:p>
      <text:soft-page-break/>
      <text:p text:style-name="P108">My grandpa knew better than to reveal my former occupation to anyone. I don’t know why he decided to tell people that I was a private eye. It wasn’t too far off the mark. But it doesn’t sound as jarring as my actual work.<text:s/></text:p>
      <text:p text:style-name="P109">Regardless, I left that life behind, so it didn’t matter.</text:p>
      <text:p text:style-name="P110">“Sounds more like a cop than an investigator,” he said.<text:s/></text:p>
      <text:p text:style-name="P111">“Anyway, about the tour I was going to give you—” his phone buzzed before he could finish. He texted something before putting it back. “Avery!” he called out. A boy, probably about eight or nine showed up, perhaps out of thin air. I wasn’t paying much attention to the room we were in.</text:p>
      <text:p text:style-name="P112">“Mom’s back?” The little boy asked.<text:s/></text:p>
      <text:p text:style-name="P113">“Not yet, but listen,” Mr. Cloud pointed at me. “This is Art’s grandson. You’re giving him a tour of the town.”</text:p>
      <text:p text:style-name="P114"><text:span text:style-name="T115">He</text:span><text:span text:style-name="T116"><text:s/>was supposed to give me the tour. Perhaps that text earlier had something to do with it. Grandpa did say his wedding was coming up.</text:span></text:p>
      <text:p text:style-name="P117">“Name?” The little boy looked at me. “Mine’s Avery, Avery Harpner.”</text:p>
      <text:p text:style-name="P118"/>
      <text:p text:style-name="P119"/>
      <text:soft-page-break/>
      <text:p text:style-name="P120">“Rex, Rex Redallion.” I replied. <text:s text:c="2"/></text:p>
      <text:p text:style-name="P121">“Alright Rex, come along. I’ll give you the best tour of Downshore Island!” He exclaimed. I often forget how energetic kids can be.</text:p>
      <text:p text:style-name="P122">“Not the entire Island, just the town,” Mr. Cloud corrected.<text:s/></text:p>
      <text:p text:style-name="P123">“I know! I know!” Avery whined.<text:s/></text:p>
      <text:p text:style-name="P124">“I thought you were the best guide around these parts.” I looked at Mr. Cloud. He said this kid’s mom wasn’t back yet. If he was supposed to babysit and that job is being dumped on me, I wasn’t going to have it.</text:p>
      <text:p text:style-name="P125">“He was,” Avery continued. “Then they gave him a big promotion, now I am the new rising star!” This kid’s energy levels low-key bothered me. Perhaps it’s because of my lack of sleep. I landed on this island a day ago, and haven’t slept enough with all the unpacking I had to do.<text:s/></text:p>
      <text:p text:style-name="P126">“Sorry about that Rex, got a wedding to plan,” Mr. Cloud apologized. “Just follow him around, the kid knows this place. Downshore’s small, it won’t take too long.” He continued, “And thanks for the cache info.”</text:p>
      <text:p text:style-name="P127">Wedding? At this time of the year? Perhaps, he wanted to wait till the island was closed off to outsiders.</text:p>
      <text:p text:style-name="P128">Avery did a quick circle around me, swiftly grabbed my hand and dashed to the door. His pull was not that of an eleven-year-old.</text:p>
      <text:p text:style-name="P129"/>
      <text:soft-page-break/>
      <text:p text:style-name="P130">This kid had way too much energy for his own good. Guess I have to go along with this for now.</text:p>
      <text:p text:style-name="P131">Just as we stepped out, Mr. Cloud called out to us.</text:p>
      <text:p text:style-name="P132">“Oh, also!” he continued, “The kid is a Primo!”</text:p>
      <text:p text:style-name="P133">Sweet, now I have to deal with a kid with super-strength.</text:p>
      <text:p text:style-name="P134">At least that explained his energy levels.</text:p>
      <text:p text:style-name="P135">We stepped out of the manager’s cottage. I could feel my hair sway effortlessly, as I gazed at the sparkling water that stretched as far as the eye could see. I stepped off the porch and into the sand.</text:p>
      <text:p text:style-name="P136">Warm.</text:p>
      <text:p text:style-name="P137">Here I was, at the heart of the most popular and expensive holiday destination in all of Ryfe. The Downshore beach.<text:s/></text:p>
      <text:p text:style-name="P138">My hair wouldn’t stop swaying. A calming chill glazed across my face, which quickly spread across my body. I took a quick look around as I slipped back into my flip-flops.</text:p>
      <text:p text:style-name="P139">Empty. No locals either.</text:p>
      <text:p text:style-name="P140">I had used the roadside entrance to enter Mr. Cloud’s cottage this morning. The line of tall trees hardly allows you to see the beach unless you go further past the cottage.</text:p>
      <text:p text:style-name="P141">“Looking for people?” Avery asked.</text:p>
      <text:soft-page-break/>
      <text:p text:style-name="P142">“The island is closed off during the Stormtube. I know that much,” I continued, “But the locals don’t use the beach?”</text:p>
      <text:p text:style-name="P143">“It’s Monday morning,” said Avery. “People got school, work and all that.” He had his hands inside his pockets as he skipped about the sand walking towards the entrance of the beach. It was marked by a huge arch, directly connecting to the seaside road.</text:p>
      <text:p text:style-name="P144">“And why aren’t you at school?” I questioned, as we reached the arch. Avery signalled me to cross the road.<text:s/></text:p>
      <text:p text:style-name="P145">“Time to start your tour!”</text:p>
      <text:p text:style-name="P146">He ignored my question. And honestly, I didn’t care. I was no stranger to truancy myself.<text:s/></text:p>
      <text:p text:style-name="P147">Downshore Island—my new home. This was a sudden change in my life, but nothing I couldn’t adapt to. For most people from the mainland, this was paradise inaccessible. Thanks to the war between Mid City and Left City, you are forced to take a detour through Right City to avoid entering waters of conflict and reach Downshore. Citizens of the island don’t have to pay the astronomical ferry charges to reach this place, which also applies to descendants of citizens like myself.<text:s/></text:p>
      <text:p text:style-name="P148">But I’m not here for vacation. I’m here because I have no other choice. I need to finish this tour and go meet gramps. Asap.</text:p>
      <text:soft-page-break/>
      <text:p text:style-name="P149">For about ten months of the year, this town would usually be bustling with tourists. The Stormtube—a storm that circumferences the island, sets in at the end of every December. It is but one of many such bizarre phenomena found across Ryfe. The last ferry of the year is reserved for citizens and their families coming back to spend Founder’s Day, which coincides with New Year’s.</text:p>
      <text:p text:style-name="P150">We walked along the sidewalk till we reached a large billboard. It was a map of the town.</text:p>
      <text:p text:style-name="P151">“This is where we are now,” Avery pointed to Seaside Road on the map. “It’s a small town, we can cover it in a day,” Avery said.</text:p>
      <text:p text:style-name="P152">I took a look at the list of locations on the map. I expected a vacation town to be filled with resorts, restaurants, and hotels. But the entire town had only a single place to stay. Wrymlight Holidays. There were a few apartment buildings, one of which I was staying in. Wish I was still rich enough to stay in a resort all year.</text:p>
      <text:p text:style-name="P153">I didn’t like my mind wavering back to thoughts about my old job.</text:p>
      <text:p text:style-name="P154">The layout of the island itself was quite interesting. It had been divided into two halves. The northern half was the town of Downshore.</text:p>
      <text:p text:style-name="P155">The entire southern half was outlined in dashes and greyed out. According to the map legend, it was the property of ‘Venus Trades’.</text:p>
      <text:soft-page-break/>
      <text:p text:style-name="P156">Blue dotted lines covered a few roads on the map signifying the local mode of transport—Wrymcarts. Didn’t take me too long to make the connection.</text:p>
      <text:p text:style-name="P157">“So, the Wrymlight company,” I continued, “Know anything about them?”</text:p>
      <text:p text:style-name="P158">“I have a speech memorized about them if you want hear.” Avery said. He was a tour guide in training through and through.</text:p>
      <text:p text:style-name="P159">“Just basic info should be enough.”<text:s/></text:p>
      <text:p text:style-name="P160">“Well,” Avery got on the sidewalk railing, with his arms spread out, “Rich family, their dog Sheppy is good friends with Rollercoaster.”</text:p>
      <text:p text:style-name="P161">“Rollercoaster?” I asked.<text:s/></text:p>
      <text:p text:style-name="P162">“My dog,” He started walking across the railing with his arms out, “We call him Rolly.” He jumped off the railing and did a small twist in the air.<text:s/></text:p>
      <text:p text:style-name="P163">I gave him a short round of applause.</text:p>
      <text:p text:style-name="P164">“They own businesses and stuff, and I work for them, kinda, like if I grow up and become an actual guide, I’ll be working for them.”<text:s/></text:p>
      <text:p text:style-name="P165">We stopped at a Wrymcart station further down the road. “You’re paying for the cart, okay?” Avery continued, “Where shall we start?”</text:p>
      <text:p text:style-name="P166">“Your call, just save the police station for the last.” I replied.</text:p>
      <text:soft-page-break/>
      <text:p text:style-name="P167">“Well, we can’t go now even if we wanted to,” Avery continued, “It doesn’t open till snack bell.”</text:p>
      <text:p text:style-name="P168">“Snack bell?”</text:p>
      <text:p text:style-name="P169">“Yeah, we have a short break after the first two classes at school and that’s when Chief Clammens opens up the station.” He continued, “You’re a cop?”</text:p>
      <text:p text:style-name="P170">From a ‘Private Investigator’ to a cop. Nice.</text:p>
      <text:p text:style-name="P171">“Sort of.” I nodded.<text:s/></text:p>
      <text:p text:style-name="P172">But I honestly couldn’t choose a better profession to put my skills to good use. With tourists around the year, I could be handling some interesting cases. I hate fetch-quests though, and I feel like I’ll be dealing with a lot of those types here.</text:p>
      <text:p text:style-name="P173">Avery started to fiddle with the kiosk. He was quite tall for his age. I would have needed a stepladder to access such things when I was eleven.</text:p>
      <text:p text:style-name="P174">Not like you’re ever allowed to step out as a kid in Right City. It wasn’t as dangerous as living in Mid or Left, but still, bandits and looters don’t see age or territory. Mom was hardly ever around and dad didn’t enjoy the idea of me disappearing. Pretty sure he was more worried about explaining my disappearance to her.</text:p>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text:s/></text:p>
      <text:p text:style-name="P187"/>
      <text:p text:style-name="P188"/>
      <text:p text:style-name="P189"/>
      <text:p text:style-name="P190"/>
      <text:p text:style-name="P191"><text:tab/></text:p>
      <text:p text:style-name="P192"><text:tab/></text:p>
      <text:p text:style-name="P193">The explosion itself wasn’t considered a failure, but what happened after the survivors landed on the surface.<text:s/></text:p>
      <text:p text:style-name="P194">How much you’re told depends on your parents and by extension,<text:s/><text:soft-page-break/>your grandparents. Some families skip the gory, graphic details and just cover the gist. Must preserve childhood innocence, right?</text:p>
      <text:p text:style-name="P195">Right?</text:p>
      <text:p text:style-name="P196">My mom was a cache hunter. I was spared no detail.</text:p>
      <text:p text:style-name="P197"/>
      <text:p text:style-name="P198">“This was news to Xyrec. He was so used to possessing humans, the entire process was as simple as breathing, at least usually.</text:p>
      <text:p text:style-name="P199">‘What’s the deal with this guy? It’s like there is no entry, or more like its blocked all the time, guarded by a billion security measures, invisible even to my eye. What is going on?’</text:p>
      <text:p text:style-name="P200">‘Neurodivergence.’ Carson said, softly. ‘The kid’s got ADHD, and on top of that he lucid dreams. He’s an author as well, and plays shit tons of video games. There exists no crack nor crevice in his mind for you to exploit and enter, for his creativity is just way beyond the levels of a typical human. If this kid turns out to be a second Shelby, you and I both will have to find new jobs, and at least I have a physical body. This is not unheard of, but certainly uncommon.’”</text:p>
      <text:p text:style-name="P201"/>
      <text:p text:style-name="P202"><text:s text:c="4"/></text:p>
      <text:p text:style-name="P203"/>
      <text:p text:style-name="P204"/>
      <text:p text:style-name="P205">“Here, we found his Cortexial Blueprint. Look at this. A vast, wide void, akin to the brightest night sky one could ever find, littered across with countless constellations wherever you turn. Almost blinding if not for the streaks of aurora that break it apart here and there. And there are the tracks, a billion of them at least running omnidirectionally without interfering with each other, save for junctions that serve as track switches. Atop them are the trains running parallelly, without sopping. Seems like he takes trains of though a bit too literally, and these things swish across at unbelievable speeds all at once, switching tracks every other second. Within each of the coaches exists an entire ecosystem, privy only to the owner. I’ll assume each coach corresponds to a school of thought, or perhaps an ideology, a fragment of his self or some categorization that only he would understand, and even there it doesn’t stop, there are mail’s that fly between coaches, even across trains.<text:s/>And look, he has physics here,<text:s/>the ground reverberates and reacts to the movement of the trains, except it isn’t ground, we are walking on water, and these are ripples. I’ve been through hundreds of Cortexial BPs, but Physics? No one gives a damn about that unless some specific functionality within demands this, but here it just exists, perhaps for a reason but it juts feels like an artistic<text:s/><text:soft-page-break/>choice. This level of craftmanship within a Cognitive Realm is just unheard off.<text:s/>This elaborate setup is supposed to mimic how his mind works, but we can’t infer or extract anything if we can’t even comprehend this. And at the very least we need to get on one train, that is assuming we know which train does what, and if it would keep doing that for an extended period of time. Who even is this kid, man.<text:s/>I swear he’s bound to have Dreamkeepers in there, customized even. We can’t risk infiltrating without at least rendering him unconscious. And even then I am skeptical cuz what if he gains lucidity? The worst time to Invade a Cognitive Realm is when the Master is within. And this guy, he would’ve perfected Dream Reality Bending I swear.”</text:p>
      <text:p text:style-name="P206"/>
      <text:p text:style-name="P207"/>
      <text:p text:style-name="P208"/>
      <text:p text:style-name="P209"/>
      <text:p text:style-name="P210"/>
      <text:p text:style-name="P211"/>
      <text:p text:style-name="P212"/>
      <text:p text:style-name="P213"/>
      <text:p text:style-name="P214"><text:span text:style-name="T215"><text:s text:c="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Serif" svg:font-family="LiberationSerif"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200%" fo:text-indent="0.5in"/>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6in" fo:page-height="9in" style:print-orientation="portrait" fo:margin-top="0.5909in" fo:margin-left="0.5909in" fo:margin-bottom="0.5909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Sanjay Bharath</dc:creator>
    <meta:creation-date>2023-01-10T02:11:00Z</meta:creation-date>
    <dc:date>2025-07-27T03:33:00Z</dc:date>
    <meta:template xlink:href="Normal" xlink:type="simple"/>
    <meta:editing-cycles>350</meta:editing-cycles>
    <meta:editing-duration>PT71820S</meta:editing-duration>
    <meta:user-defined meta:name="GrammarlyDocumentId">c4eab01fde9e05a777f22aafbaf1619795cdf32f63721c7a841bdbd40054a4d7</meta:user-defined>
    <meta:document-statistic meta:page-count="20" meta:paragraph-count="37" meta:word-count="2795" meta:character-count="18692" meta:row-count="132" meta:non-whitespace-character-count="15934"/>
  </office:meta>
</office:document-meta>
</file>